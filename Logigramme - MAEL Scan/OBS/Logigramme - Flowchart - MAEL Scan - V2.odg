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81cm" draw:marker-start-width="0.321cm" draw:marker-end-width="0.321cm" draw:fill-color="#eeeeee" draw:textarea-horizontal-align="justify" draw:textarea-vertical-align="middle" draw:auto-grow-height="false" fo:min-height="104.17cm" fo:min-width="124.92cm" fo:padding-top="0.165cm" fo:padding-bottom="0.165cm" fo:padding-left="0.29cm" fo:padding-right="0.29cm" loext:decorative="false"/>
    </style:style>
    <style:style style:name="gr3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1.072cm" fo:min-width="124.92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draw:marker-start-width="0.321cm" draw:marker-end-width="0.321cm" draw:fill-color="#eeeeee" draw:textarea-horizontal-align="justify" draw:textarea-vertical-align="middle" draw:auto-grow-height="false" fo:min-height="26.5cm" fo:min-width="22.35cm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0.939cm" fo:min-width="22.35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526cm" fo:min-width="4.476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2.251cm" fo:min-width="5.428cm" fo:padding-top="0.165cm" fo:padding-bottom="0.165cm" fo:padding-left="0.29cm" fo:padding-right="0.29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81cm" svg:stroke-color="#000000" draw:marker-start-width="0.321cm" draw:marker-end="Extrémités_20_de_20_flèche_20_1" draw:marker-end-width="0.421cm" draw:fill="solid" draw:fill-color="#ffffff" draw:textarea-vertical-align="middle" fo:padding-top="0.165cm" fo:padding-bottom="0.165cm" fo:padding-left="0.29cm" fo:padding-right="0.29cm" loext:decorative="false"/>
    </style:style>
    <style:style style:name="gr9" style:family="graphic" style:parent-style-name="objectwithoutfill">
      <style:graphic-properties svg:stroke-width="0.081cm" svg:stroke-color="#000000" draw:marker-start-width="0.321cm" draw:marker-end="Extrémités_20_de_20_flèche_20_2" draw:marker-end-width="0.421cm" draw:fill="solid" draw:fill-color="#ffffff" draw:textarea-vertical-align="middle" fo:padding-top="0.165cm" fo:padding-bottom="0.165cm" fo:padding-left="0.29cm" fo:padding-right="0.29cm" loext:decorative="false"/>
    </style:style>
    <style:style style:name="gr10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11.079cm" fo:min-width="11.56cm" loext:decorative="false"/>
      <style:paragraph-properties style:writing-mode="lr-tb"/>
    </style:style>
    <style:style style:name="gr11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3.942cm" fo:min-width="25.219cm" loext:decorative="false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2.671cm" fo:min-width="9.746cm" fo:padding-top="0.165cm" fo:padding-bottom="0.165cm" fo:padding-left="0.29cm" fo:padding-right="0.29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526cm" fo:min-width="4.476cm" fo:padding-top="0.165cm" fo:padding-bottom="0.165cm" fo:padding-left="0.29cm" fo:padding-right="0.29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081cm" svg:stroke-color="#000000" draw:marker-start-width="0.321cm" draw:marker-end="Extrémités_20_de_20_flèche_20_3" draw:marker-end-width="0.421cm" draw:fill="none" draw:textarea-vertical-align="middle" fo:padding-top="0.165cm" fo:padding-bottom="0.165cm" fo:padding-left="0.29cm" fo:padding-right="0.29cm" loext:decorative="false"/>
    </style:style>
    <style:style style:name="gr1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05cm" fo:min-width="8.5cm" fo:padding-top="0.165cm" fo:padding-bottom="0.165cm" fo:padding-left="0.29cm" fo:padding-right="0.29cm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width="0.081cm" svg:stroke-color="#000000" draw:marker-start-width="0.321cm" draw:marker-end="Extrémités_20_de_20_flèche_20_4" draw:marker-end-width="0.421cm" draw:fill="none" draw:textarea-vertical-align="middle" fo:padding-top="0.165cm" fo:padding-bottom="0.165cm" fo:padding-left="0.29cm" fo:padding-right="0.29cm" loext:decorative="false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776cm" fo:min-width="4cm" fo:padding-top="0.165cm" fo:padding-bottom="0.165cm" fo:padding-left="0.29cm" fo:padding-right="0.29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3cm" fo:min-width="8.5cm" fo:padding-top="0.165cm" fo:padding-bottom="0.165cm" fo:padding-left="0.29cm" fo:padding-right="0.29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05cm" fo:min-width="8.5cm" fo:padding-top="0.165cm" fo:padding-bottom="0.165cm" fo:padding-left="0.29cm" fo:padding-right="0.29cm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width="0.081cm" svg:stroke-color="#000000" draw:marker-start-width="0.321cm" draw:marker-end="Extrémités_20_de_20_flèche_20_4" draw:marker-end-width="0.421cm" draw:fill="none" draw:textarea-vertical-align="middle" fo:padding-top="0.165cm" fo:padding-bottom="0.165cm" fo:padding-left="0.29cm" fo:padding-right="0.29cm" loext:decorative="false"/>
    </style:style>
    <style:style style:name="gr21" style:family="graphic" style:parent-style-name="objectwithoutfill">
      <style:graphic-properties svg:stroke-width="0.081cm" svg:stroke-color="#000000" draw:marker-start-width="0.321cm" draw:marker-end="Extrémités_20_de_20_flèche_20_6" draw:marker-end-width="0.421cm" draw:fill="none" draw:textarea-vertical-align="middle" fo:padding-top="0.165cm" fo:padding-bottom="0.165cm" fo:padding-left="0.29cm" fo:padding-right="0.29cm" loext:decorative="false"/>
    </style:style>
    <style:style style:name="gr22" style:family="graphic" style:parent-style-name="objectwithoutfill">
      <style:graphic-properties svg:stroke-width="0.081cm" svg:stroke-color="#000000" draw:marker-start-width="0.321cm" draw:marker-end="Extrémités_20_de_20_flèche_20_7" draw:marker-end-width="0.421cm" draw:fill="none" draw:textarea-vertical-align="middle" fo:padding-top="0.165cm" fo:padding-bottom="0.165cm" fo:padding-left="0.29cm" fo:padding-right="0.29cm" loext:decorative="false"/>
    </style:style>
    <style:style style:name="gr2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cm" fo:min-width="8.5cm" fo:padding-top="0.165cm" fo:padding-bottom="0.165cm" fo:padding-left="0.29cm" fo:padding-right="0.29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943cm" fo:min-width="4cm" fo:padding-top="0.165cm" fo:padding-bottom="0.165cm" fo:padding-left="0.29cm" fo:padding-right="0.29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225cm" fo:min-width="8.42cm" fo:padding-top="0.165cm" fo:padding-bottom="0.165cm" fo:padding-left="0.29cm" fo:padding-right="0.29cm" style:writing-mode="lr-tb" loext:decorative="false"/>
      <style:paragraph-properties style:writing-mode="lr-tb"/>
    </style:style>
    <style:style style:name="gr2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34cm" fo:min-width="8.42cm" fo:padding-top="0.165cm" fo:padding-bottom="0.165cm" fo:padding-left="0.29cm" fo:padding-right="0.29cm" style:writing-mode="lr-tb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942cm" fo:min-width="4cm" fo:padding-top="0.165cm" fo:padding-bottom="0.165cm" fo:padding-left="0.29cm" fo:padding-right="0.29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349cm" fo:min-width="8.42cm" fo:padding-top="0.165cm" fo:padding-bottom="0.165cm" fo:padding-left="0.29cm" fo:padding-right="0.29cm" style:writing-mode="lr-tb" loext:decorative="false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35cm" fo:min-width="8.42cm" fo:padding-top="0.165cm" fo:padding-bottom="0.165cm" fo:padding-left="0.29cm" fo:padding-right="0.29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width="0.081cm" svg:stroke-color="#000000" draw:marker-start-width="0.321cm" draw:marker-end-width="0.321cm" draw:fill="none" draw:fill-color="#ffffff" draw:textarea-vertical-align="middle" draw:auto-grow-height="true" draw:auto-grow-width="false" fo:min-height="2.337cm" loext:decorative="false"/>
      <style:paragraph-properties style:writing-mode="lr-tb"/>
    </style:style>
    <style:style style:name="gr31" style:family="graphic" style:parent-style-name="objectwithoutfill">
      <style:graphic-properties svg:stroke-width="0.081cm" svg:stroke-color="#1e6a39" draw:marker-start-width="0.321cm" draw:marker-end="Extrémités_20_de_20_flèche_20_8" draw:marker-end-width="0.421cm" draw:fill="none" draw:textarea-vertical-align="middle" fo:padding-top="0.165cm" fo:padding-bottom="0.165cm" fo:padding-left="0.29cm" fo:padding-right="0.29cm" loext:decorative="false"/>
    </style:style>
    <style:style style:name="gr32" style:family="graphic" style:parent-style-name="standard" style:list-style-name="L1">
      <style:graphic-properties draw:stroke="none" svg:stroke-width="0.081cm" svg:stroke-color="#000000" draw:marker-start-width="0.321cm" draw:marker-end-width="0.321cm" draw:fill="none" draw:fill-color="#ffffff" draw:textarea-vertical-align="middle" draw:auto-grow-height="true" draw:auto-grow-width="false" fo:min-height="2.336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width="0.081cm" svg:stroke-color="#000000" draw:marker-start-width="0.321cm" draw:marker-end-width="0.321cm" draw:fill="none" draw:fill-color="#ffffff" draw:textarea-vertical-align="middle" draw:auto-grow-height="true" draw:auto-grow-width="false" fo:min-height="1.75cm" loext:decorative="false"/>
      <style:paragraph-properties style:writing-mode="lr-tb"/>
    </style:style>
    <style:style style:name="gr34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vertical-align="middle" draw:auto-grow-height="true" draw:auto-grow-width="false" fo:min-height="1.75cm" loext:decorative="false"/>
      <style:paragraph-properties style:writing-mode="lr-tb"/>
    </style:style>
    <style:style style:name="gr35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2.05cm" fo:min-width="8.5cm" fo:padding-top="0.165cm" fo:padding-bottom="0.165cm" fo:padding-left="0.29cm" fo:padding-right="0.29cm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cm" fo:min-width="13.9cm" fo:padding-top="0.165cm" fo:padding-bottom="0.165cm" fo:padding-left="0.29cm" fo:padding-right="0.29cm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width="0.081cm" svg:stroke-color="#000000" draw:marker-start-width="0.321cm" draw:marker-end-width="0.321cm" draw:fill="none" draw:fill-color="#ffffff" draw:textarea-vertical-align="middle" draw:auto-grow-height="true" draw:auto-grow-width="false" fo:min-height="0.585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width="0.081cm" svg:stroke-color="#000000" draw:marker-start-width="0.321cm" draw:marker-end-width="0.321cm" draw:fill="none" draw:fill-color="#ffffff" draw:textarea-vertical-align="middle" draw:auto-grow-height="true" draw:auto-grow-width="false" fo:min-height="1.753cm" loext:decorative="false"/>
      <style:paragraph-properties style:writing-mode="lr-tb"/>
    </style:style>
    <style:style style:name="gr3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5cm" fo:min-width="8.5cm" fo:padding-top="0.165cm" fo:padding-bottom="0.165cm" fo:padding-left="0.29cm" fo:padding-right="0.29cm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5cm" fo:min-width="9.5cm" fo:padding-top="0.165cm" fo:padding-bottom="0.165cm" fo:padding-left="0.29cm" fo:padding-right="0.29cm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5cm" fo:min-width="8.85cm" fo:padding-top="0.165cm" fo:padding-bottom="0.165cm" fo:padding-left="0.29cm" fo:padding-right="0.29cm" style:writing-mode="lr-tb" loext:decorative="false"/>
      <style:paragraph-properties style:writing-mode="lr-tb"/>
    </style:style>
    <style:style style:name="gr4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001cm" fo:min-width="6.958cm" fo:padding-top="0.165cm" fo:padding-bottom="0.165cm" fo:padding-left="0.29cm" fo:padding-right="0.29cm" style:writing-mode="lr-tb" loext:decorative="false"/>
      <style:paragraph-properties style:writing-mode="lr-tb"/>
    </style:style>
    <style:style style:name="gr4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696cm" fo:min-width="3.566cm" fo:padding-top="0.165cm" fo:padding-bottom="0.165cm" fo:padding-left="0.29cm" fo:padding-right="0.29cm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863cm" fo:min-width="4.97cm" fo:padding-top="0.165cm" fo:padding-bottom="0.165cm" fo:padding-left="0.29cm" fo:padding-right="0.29cm" style:writing-mode="lr-tb" loext:decorative="false"/>
      <style:paragraph-properties style:writing-mode="lr-tb"/>
    </style:style>
    <style:style style:name="gr4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5cm" fo:min-width="6.25cm" fo:padding-top="0.165cm" fo:padding-bottom="0.165cm" fo:padding-left="0.29cm" fo:padding-right="0.29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943cm" fo:min-width="4.5cm" fo:padding-top="0.165cm" fo:padding-bottom="0.165cm" fo:padding-left="0.29cm" fo:padding-right="0.29cm" style:writing-mode="lr-tb" loext:decorative="false"/>
      <style:paragraph-properties style:writing-mode="lr-tb"/>
    </style:style>
    <style:style style:name="gr4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865cm" fo:min-width="2.7cm" fo:padding-top="0.165cm" fo:padding-bottom="0.165cm" fo:padding-left="0.29cm" fo:padding-right="0.29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5cm" fo:min-width="8.5cm" fo:padding-top="0.165cm" fo:padding-bottom="0.165cm" fo:padding-left="0.29cm" fo:padding-right="0.29cm" style:writing-mode="lr-tb" loext:decorative="false"/>
      <style:paragraph-properties style:writing-mode="lr-tb"/>
    </style:style>
    <style:style style:name="gr49" style:family="graphic" style:parent-style-name="objectwithoutfill">
      <style:graphic-properties draw:stroke="dash" draw:stroke-dash="Dash_20__28_Rounded_29_" svg:stroke-width="0.081cm" svg:stroke-color="#5983b0" draw:marker-start-width="0.321cm" draw:marker-end-width="0.321cm" svg:stroke-linecap="round" draw:fill="none" draw:textarea-vertical-align="middle" fo:padding-top="0.165cm" fo:padding-bottom="0.165cm" fo:padding-left="0.29cm" fo:padding-right="0.29cm" loext:decorative="false"/>
    </style:style>
    <style:style style:name="gr5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67cm" fo:min-width="9.42cm" fo:padding-top="0.165cm" fo:padding-bottom="0.165cm" fo:padding-left="0.29cm" fo:padding-right="0.29cm" style:writing-mode="lr-tb" loext:decorative="false"/>
      <style:paragraph-properties style:writing-mode="lr-tb"/>
    </style:style>
    <style:style style:name="gr5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46cm" fo:min-width="4.396cm" fo:padding-top="0.165cm" fo:padding-bottom="0.165cm" fo:padding-left="0.29cm" fo:padding-right="0.29cm" style:writing-mode="lr-tb" loext:decorative="false"/>
      <style:paragraph-properties style:writing-mode="lr-tb"/>
    </style:style>
    <style:style style:name="gr5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46cm" fo:min-width="4.97cm" fo:padding-top="0.165cm" fo:padding-bottom="0.165cm" fo:padding-left="0.29cm" fo:padding-right="0.29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46cm" fo:min-width="4.946cm" fo:padding-top="0.165cm" fo:padding-bottom="0.165cm" fo:padding-left="0.29cm" fo:padding-right="0.29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17cm" fo:min-width="9.92cm" fo:padding-top="0.165cm" fo:padding-bottom="0.165cm" fo:padding-left="0.29cm" fo:padding-right="0.29cm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vertical-align="middle" draw:auto-grow-height="true" draw:auto-grow-width="false" fo:min-height="2.337cm" loext:decorative="false"/>
      <style:paragraph-properties style:writing-mode="lr-tb"/>
    </style:style>
    <style:style style:name="gr56" style:family="graphic" style:parent-style-name="standard">
      <style:graphic-properties svg:stroke-width="0.081cm" draw:marker-start-width="0.321cm" draw:marker-end-width="0.321cm" draw:fill-color="#eeeeee" draw:textarea-horizontal-align="justify" draw:textarea-vertical-align="middle" draw:auto-grow-height="false" fo:min-height="33.67cm" fo:min-width="24.17cm" fo:padding-top="0.165cm" fo:padding-bottom="0.165cm" fo:padding-left="0.29cm" fo:padding-right="0.29cm" loext:decorative="false"/>
    </style:style>
    <style:style style:name="gr57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0.67cm" fo:min-width="24.17cm" fo:padding-top="0.165cm" fo:padding-bottom="0.165cm" fo:padding-left="0.29cm" fo:padding-right="0.29cm" style:writing-mode="lr-tb" loext:decorative="false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921cm" fo:min-width="6.878cm" fo:padding-top="0.165cm" fo:padding-bottom="0.165cm" fo:padding-left="0.29cm" fo:padding-right="0.29cm" style:writing-mode="lr-tb" loext:decorative="false"/>
      <style:paragraph-properties style:writing-mode="lr-tb"/>
    </style:style>
    <style:style style:name="gr5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616cm" fo:min-width="3.486cm" fo:padding-top="0.165cm" fo:padding-bottom="0.165cm" fo:padding-left="0.29cm" fo:padding-right="0.29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2cm" fo:min-width="9.67cm" fo:padding-top="0.165cm" fo:padding-bottom="0.165cm" fo:padding-left="0.29cm" fo:padding-right="0.29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2cm" fo:min-width="9.67cm" fo:padding-top="0.165cm" fo:padding-bottom="0.165cm" fo:padding-left="0.29cm" fo:padding-right="0.29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2cm" fo:min-width="9.67cm" fo:padding-top="0.165cm" fo:padding-bottom="0.165cm" fo:padding-left="0.29cm" fo:padding-right="0.29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2cm" fo:min-width="7.67cm" fo:padding-top="0.165cm" fo:padding-bottom="0.165cm" fo:padding-left="0.29cm" fo:padding-right="0.29cm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2cm" fo:min-width="9.67cm" fo:padding-top="0.165cm" fo:padding-bottom="0.165cm" fo:padding-left="0.29cm" fo:padding-right="0.29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2cm" fo:min-width="9.67cm" fo:padding-top="0.165cm" fo:padding-bottom="0.165cm" fo:padding-left="0.29cm" fo:padding-right="0.29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17cm" fo:min-width="9.92cm" fo:padding-top="0.165cm" fo:padding-bottom="0.165cm" fo:padding-left="0.29cm" fo:padding-right="0.29cm" style:writing-mode="lr-tb" loext:decorative="false"/>
      <style:paragraph-properties style:writing-mode="lr-tb"/>
    </style:style>
    <style:style style:name="gr67" style:family="graphic" style:parent-style-name="standard">
      <style:graphic-properties svg:stroke-width="0.081cm" draw:marker-start-width="0.321cm" draw:marker-end-width="0.321cm" draw:fill-color="#eeeeee" draw:textarea-horizontal-align="justify" draw:textarea-vertical-align="middle" draw:auto-grow-height="false" fo:min-height="20.42cm" fo:min-width="24.17cm" fo:padding-top="0.165cm" fo:padding-bottom="0.165cm" fo:padding-left="0.29cm" fo:padding-right="0.29cm" loext:decorative="false"/>
    </style:style>
    <style:style style:name="gr68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0.593cm" fo:min-width="24.17cm" fo:padding-top="0.165cm" fo:padding-bottom="0.165cm" fo:padding-left="0.29cm" fo:padding-right="0.29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17cm" fo:min-width="4.67cm" fo:padding-top="0.165cm" fo:padding-bottom="0.165cm" fo:padding-left="0.29cm" fo:padding-right="0.29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17cm" fo:min-width="9.67cm" fo:padding-top="0.165cm" fo:padding-bottom="0.165cm" fo:padding-left="0.29cm" fo:padding-right="0.29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17cm" fo:min-width="7.92cm" fo:padding-top="0.165cm" fo:padding-bottom="0.165cm" fo:padding-left="0.29cm" fo:padding-right="0.29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42cm" fo:min-width="6.42cm" fo:padding-top="0.165cm" fo:padding-bottom="0.165cm" fo:padding-left="0.29cm" fo:padding-right="0.29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17cm" fo:min-width="9.92cm" fo:padding-top="0.165cm" fo:padding-bottom="0.165cm" fo:padding-left="0.29cm" fo:padding-right="0.29cm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17cm" fo:min-width="9.92cm" fo:padding-top="0.165cm" fo:padding-bottom="0.165cm" fo:padding-left="0.29cm" fo:padding-right="0.29cm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17cm" fo:min-width="9.92cm" fo:padding-top="0.165cm" fo:padding-bottom="0.165cm" fo:padding-left="0.29cm" fo:padding-right="0.29cm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17cm" fo:min-width="9.92cm" fo:padding-top="0.165cm" fo:padding-bottom="0.165cm" fo:padding-left="0.29cm" fo:padding-right="0.29cm" style:writing-mode="lr-tb" loext:decorative="false"/>
      <style:paragraph-properties style:writing-mode="lr-tb"/>
    </style:style>
    <style:style style:name="gr77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vertical-align="middle" draw:auto-grow-height="true" draw:auto-grow-width="false" fo:min-height="1.5cm" loext:decorative="false"/>
      <style:paragraph-properties style:writing-mode="lr-tb"/>
    </style:style>
    <style:style style:name="gr7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17cm" fo:min-width="4.67cm" fo:padding-top="0.165cm" fo:padding-bottom="0.165cm" fo:padding-left="0.29cm" fo:padding-right="0.29cm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42cm" fo:min-width="6.42cm" fo:padding-top="0.165cm" fo:padding-bottom="0.165cm" fo:padding-left="0.29cm" fo:padding-right="0.29cm" style:writing-mode="lr-tb" loext:decorative="false"/>
      <style:paragraph-properties style:writing-mode="lr-tb"/>
    </style:style>
    <style:style style:name="gr8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4.421cm" fo:min-width="6.878cm" fo:padding-top="0.165cm" fo:padding-bottom="0.165cm" fo:padding-left="0.29cm" fo:padding-right="0.29cm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92cm" fo:min-width="6.42cm" fo:padding-top="0.165cm" fo:padding-bottom="0.165cm" fo:padding-left="0.29cm" fo:padding-right="0.29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92cm" fo:min-width="6.17cm" fo:padding-top="0.165cm" fo:padding-bottom="0.165cm" fo:padding-left="0.29cm" fo:padding-right="0.29cm" style:writing-mode="lr-tb" loext:decorative="false"/>
      <style:paragraph-properties style:writing-mode="lr-tb"/>
    </style:style>
    <style:style style:name="gr83" style:family="graphic" style:parent-style-name="standard">
      <style:graphic-properties svg:stroke-width="0.081cm" draw:marker-start-width="0.321cm" draw:marker-end-width="0.321cm" draw:fill-color="#eeeeee" draw:textarea-horizontal-align="justify" draw:textarea-vertical-align="middle" draw:auto-grow-height="false" fo:min-height="30.92cm" fo:min-width="24.17cm" fo:padding-top="0.165cm" fo:padding-bottom="0.165cm" fo:padding-left="0.29cm" fo:padding-right="0.29cm" loext:decorative="false"/>
    </style:style>
    <style:style style:name="gr8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57cm" fo:min-width="4.97cm" fo:padding-top="0.165cm" fo:padding-bottom="0.165cm" fo:padding-left="0.29cm" fo:padding-right="0.29cm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17cm" fo:min-width="4.67cm" fo:padding-top="0.165cm" fo:padding-bottom="0.165cm" fo:padding-left="0.29cm" fo:padding-right="0.29cm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17cm" fo:min-width="9.67cm" fo:padding-top="0.165cm" fo:padding-bottom="0.165cm" fo:padding-left="0.29cm" fo:padding-right="0.29cm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17cm" fo:min-width="7.92cm" fo:padding-top="0.165cm" fo:padding-bottom="0.165cm" fo:padding-left="0.29cm" fo:padding-right="0.29cm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42cm" fo:min-width="6.42cm" fo:padding-top="0.165cm" fo:padding-bottom="0.165cm" fo:padding-left="0.29cm" fo:padding-right="0.29cm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46cm" fo:min-width="3.296cm" fo:padding-top="0.165cm" fo:padding-bottom="0.165cm" fo:padding-left="0.29cm" fo:padding-right="0.29cm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46cm" fo:min-width="4.046cm" fo:padding-top="0.165cm" fo:padding-bottom="0.165cm" fo:padding-left="0.29cm" fo:padding-right="0.29cm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57cm" fo:min-width="4.97cm" fo:padding-top="0.165cm" fo:padding-bottom="0.165cm" fo:padding-left="0.29cm" fo:padding-right="0.29cm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2cm" fo:min-width="6.67cm" fo:padding-top="0.165cm" fo:padding-bottom="0.165cm" fo:padding-left="0.29cm" fo:padding-right="0.29cm" style:writing-mode="lr-tb" loext:decorative="false"/>
      <style:paragraph-properties style:writing-mode="lr-tb"/>
    </style:style>
    <style:style style:name="gr9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421cm" fo:min-width="6.878cm" fo:padding-top="0.165cm" fo:padding-bottom="0.165cm" fo:padding-left="0.29cm" fo:padding-right="0.29cm" style:writing-mode="lr-tb" loext:decorative="false"/>
      <style:paragraph-properties style:writing-mode="lr-tb"/>
    </style:style>
    <style:style style:name="gr94" style:family="graphic" style:parent-style-name="standard">
      <style:graphic-properties svg:stroke-width="0.081cm" draw:marker-start-width="0.321cm" draw:marker-end-width="0.321cm" draw:fill-color="#eeeeee" draw:textarea-horizontal-align="justify" draw:textarea-vertical-align="middle" draw:auto-grow-height="false" fo:min-height="17.42cm" fo:min-width="14.42cm" fo:padding-top="0.165cm" fo:padding-bottom="0.165cm" fo:padding-left="0.29cm" fo:padding-right="0.29cm" loext:decorative="false"/>
    </style:style>
    <style:style style:name="gr95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0.667cm" fo:min-width="14.42cm" fo:padding-top="0.165cm" fo:padding-bottom="0.165cm" fo:padding-left="0.29cm" fo:padding-right="0.29cm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2cm" fo:min-width="6.67cm" fo:padding-top="0.165cm" fo:padding-bottom="0.165cm" fo:padding-left="0.29cm" fo:padding-right="0.29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5.42cm" fo:min-width="10.67cm" fo:padding-top="0.165cm" fo:padding-bottom="0.165cm" fo:padding-left="0.29cm" fo:padding-right="0.29cm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92cm" fo:min-width="9.92cm" fo:padding-top="0.165cm" fo:padding-bottom="0.165cm" fo:padding-left="0.29cm" fo:padding-right="0.29cm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7.421cm" fo:min-width="5.088cm" fo:padding-top="0.165cm" fo:padding-bottom="0.165cm" fo:padding-left="0.29cm" fo:padding-right="0.29cm" style:writing-mode="lr-tb" loext:decorative="false"/>
      <style:paragraph-properties style:writing-mode="lr-tb"/>
    </style:style>
    <style:style style:name="gr100" style:family="graphic" style:parent-style-name="objectwithoutfill">
      <style:graphic-properties draw:stroke="dash" draw:stroke-dash="Dot" svg:stroke-width="0.081cm" svg:stroke-color="#5983b0" draw:marker-start-width="0.321cm" draw:marker-end-width="0.321cm" svg:stroke-linecap="butt" draw:fill="none" draw:textarea-vertical-align="middle" fo:padding-top="0.165cm" fo:padding-bottom="0.165cm" fo:padding-left="0.29cm" fo:padding-right="0.29cm" loext:decorative="false"/>
    </style:style>
    <style:style style:name="gr10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7.421cm" fo:min-width="5.088cm" fo:padding-top="0.165cm" fo:padding-bottom="0.165cm" fo:padding-left="0.29cm" fo:padding-right="0.29cm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width="0.081cm" svg:stroke-color="#000000" draw:marker-start-width="0.321cm" draw:marker-end-width="0.321cm" draw:fill="none" draw:fill-color="#ffffff" draw:textarea-vertical-align="middle" draw:auto-grow-height="true" draw:auto-grow-width="false" fo:min-height="2.708cm" loext:decorative="false"/>
      <style:paragraph-properties style:writing-mode="lr-tb"/>
    </style:style>
    <style:style style:name="gr10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7.421cm" fo:min-width="6.588cm" fo:padding-top="0.165cm" fo:padding-bottom="0.165cm" fo:padding-left="0.29cm" fo:padding-right="0.29cm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7.421cm" fo:min-width="6.588cm" fo:padding-top="0.165cm" fo:padding-bottom="0.165cm" fo:padding-left="0.29cm" fo:padding-right="0.29cm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svg:stroke-width="0.081cm" svg:stroke-color="#000000" draw:marker-start-width="0.321cm" draw:marker-end-width="0.321cm" draw:fill="none" draw:fill-color="#ffffff" draw:textarea-vertical-align="middle" draw:auto-grow-height="true" draw:auto-grow-width="false" fo:min-height="1.753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20.826cm" loext:decorative="false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 style:writing-mode="lr-tb"/>
    </style:style>
    <style:style style:name="P4" style:family="paragraph">
      <style:paragraph-properties fo:margin-top="0cm" fo:margin-bottom="0cm" fo:text-align="center"/>
      <style:text-properties fo:font-size="15pt" style:font-size-asian="10pt" style:font-size-complex="10pt"/>
    </style:style>
    <style:style style:name="P5" style:family="paragraph">
      <loext:graphic-properties draw:fill="solid" draw:fill-color="#ffffff"/>
      <style:paragraph-properties fo:margin-top="0cm" fo:margin-bottom="0cm" fo:text-align="center" style:writing-mode="lr-tb"/>
      <style:text-properties fo:font-size="15pt" style:font-size-asian="10pt" style:font-size-complex="10pt"/>
    </style:style>
    <style:style style:name="P6" style:family="paragraph">
      <style:paragraph-properties fo:margin-top="0.42cm" fo:margin-bottom="0.35cm" fo:text-align="center"/>
      <style:text-properties fo:font-size="15pt" style:font-size-asian="10pt" style:font-size-complex="10pt"/>
    </style:style>
    <style:style style:name="P7" style:family="paragraph">
      <loext:graphic-properties draw:fill="solid" draw:fill-color="#ffffff"/>
      <style:paragraph-properties fo:margin-top="0.42cm" fo:margin-bottom="0.35cm" fo:text-align="center" style:writing-mode="lr-tb"/>
      <style:text-properties fo:font-size="15pt" style:font-size-asian="10pt" style:font-size-complex="10pt"/>
    </style:style>
    <style:style style:name="P8" style:family="paragraph">
      <loext:graphic-properties draw:fill="solid" draw:fill-color="#ffffff"/>
      <style:paragraph-properties fo:text-align="center"/>
      <style:text-properties fo:font-size="15pt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 fo:text-align="start"/>
    </style:style>
    <style:style style:name="P11" style:family="paragraph">
      <loext:graphic-properties draw:fill="none" draw:fill-color="#ffffff"/>
      <style:paragraph-properties fo:margin-top="0.42cm" fo:margin-bottom="0.35cm"/>
    </style:style>
    <style:style style:name="P12" style:family="paragraph">
      <loext:graphic-properties draw:fill="none" draw:fill-color="#ffffff"/>
      <style:paragraph-properties fo:margin-top="0.42cm" fo:margin-bottom="0.35cm"/>
      <style:text-properties fo:font-size="100pt" fo:font-weight="bold" style:font-size-asian="100pt" style:font-weight-asian="bold" style:font-size-complex="100pt" style:font-weight-complex="bold"/>
    </style:style>
    <style:style style:name="P13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4" style:family="paragraph">
      <loext:graphic-properties draw:fill="solid" draw:fill-color="#ffffff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ffff"/>
      <style:paragraph-properties fo:margin-top="0cm" fo:margin-bottom="0cm" fo:text-align="center" style:writing-mode="lr-tb"/>
      <style:text-properties fo:font-size="15pt" style:font-size-asian="10pt" style:font-size-complex="10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top="0cm" fo:margin-bottom="0cm" fo:text-align="center"/>
      <style:text-properties style:font-name="Liberation Sans" fo:font-size="15pt" style:letter-kerning="true" style:font-name-asian="Noto Sans CJK SC" style:font-size-asian="10pt" style:font-name-complex="Noto Sans Devanagari" style:font-size-complex="10pt"/>
    </style:style>
    <style:style style:name="P18" style:family="paragraph">
      <loext:graphic-properties draw:fill-color="#ffffff"/>
      <style:paragraph-properties fo:margin-top="0cm" fo:margin-bottom="0cm" fo:text-align="center" style:writing-mode="lr-tb"/>
      <style:text-properties style:font-name="Liberation Sans" fo:font-size="15pt" style:letter-kerning="true" style:font-name-asian="Noto Sans CJK SC" style:font-size-asian="10pt" style:font-name-complex="Noto Sans Devanagari" style:font-size-complex="10pt"/>
    </style:style>
    <style:style style:name="P19" style:family="paragraph">
      <loext:graphic-properties draw:fill="none"/>
      <style:paragraph-properties fo:text-align="center"/>
      <style:text-properties fo:background-color="#ffffff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size="15pt" style:font-size-asian="10pt" style:font-size-complex="10pt"/>
    </style:style>
    <style:style style:name="P2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5pt" style:font-size-asian="10pt" style:font-size-complex="10pt"/>
    </style:style>
    <style:style style:name="P22" style:family="paragraph">
      <loext:graphic-properties draw:fill-color="#ffffff"/>
      <style:paragraph-properties fo:margin-top="0.42cm" fo:margin-bottom="0.35cm" fo:text-align="center" style:writing-mode="lr-tb"/>
      <style:text-properties fo:font-size="15pt" style:font-size-asian="10pt" style:font-size-complex="10pt"/>
    </style:style>
    <style:style style:name="P23" style:family="paragraph">
      <style:paragraph-properties fo:margin-left="0cm" fo:margin-right="0cm" fo:margin-top="0cm" fo:margin-bottom="0cm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text-indent="0cm"/>
      <style:text-properties fo:color="#127622" loext:opacity="100%" style:font-name="Liberation Serif" fo:font-size="15pt" fo:font-style="italic" style:letter-kerning="true" style:font-name-asian="Noto Sans CJK SC" style:font-size-asian="15pt" style:font-style-asian="italic" style:font-name-complex="Noto Sans Devanagari" style:font-size-complex="15pt" style:font-style-complex="italic"/>
    </style:style>
    <style:style style:name="P25" style:family="paragraph">
      <style:paragraph-properties fo:margin-left="0cm" fo:margin-right="0cm" fo:margin-top="0.42cm" fo:margin-bottom="0.35cm" fo:text-indent="0cm"/>
    </style:style>
    <style:style style:name="P26" style:family="paragraph">
      <loext:graphic-properties draw:fill="none" draw:fill-color="#ffffff"/>
      <style:paragraph-properties fo:margin-left="0cm" fo:margin-right="0cm" fo:margin-top="0.42cm" fo:margin-bottom="0.35cm" fo:text-indent="0cm"/>
      <style:text-properties fo:color="#127622" loext:opacity="100%" style:font-name="Liberation Serif" fo:font-size="10pt" fo:font-style="italic" style:letter-kerning="true" style:font-size-asian="10pt" style:font-style-asian="italic" style:font-size-complex="10pt" style:font-style-complex="italic"/>
    </style:style>
    <style:style style:name="P27" style:family="paragraph">
      <style:paragraph-properties fo:margin-top="0cm" fo:margin-bottom="0cm"/>
    </style:style>
    <style:style style:name="P28" style:family="paragraph">
      <loext:graphic-properties draw:fill="none" draw:fill-color="#ffffff"/>
      <style:paragraph-properties fo:margin-top="0cm" fo:margin-bottom="0cm"/>
      <style:text-properties fo:color="#127622" loext:opacity="100%" style:font-name="Liberation Serif" fo:font-size="15pt" fo:font-style="italic" fo:font-weight="normal" style:font-size-asian="15pt" style:font-style-asian="italic" style:font-size-complex="15pt" style:font-style-complex="italic"/>
    </style:style>
    <style:style style:name="P29" style:family="paragraph">
      <loext:graphic-properties draw:fill-color="#eeeeee"/>
      <style:paragraph-properties fo:margin-top="0cm" fo:margin-bottom="0cm" fo:text-align="center" style:writing-mode="lr-tb"/>
      <style:text-properties fo:font-size="15pt" style:font-size-asian="10pt" style:font-size-complex="10pt"/>
    </style:style>
    <style:style style:name="P30" style:family="paragraph">
      <style:paragraph-properties fo:margin-left="0cm" fo:margin-right="0cm" fo:margin-top="0.42cm" fo:margin-bottom="0.35cm" fo:line-height="100%" fo:text-align="center" fo:text-indent="0cm"/>
      <style:text-properties fo:font-size="15pt" style:font-size-asian="10pt" style:font-size-complex="10pt"/>
    </style:style>
    <style:style style:name="P31" style:family="paragraph">
      <loext:graphic-properties draw:fill-color="#ffffff"/>
      <style:paragraph-properties fo:margin-left="0cm" fo:margin-right="0cm" fo:margin-top="0.42cm" fo:margin-bottom="0.35cm" fo:line-height="100%" fo:text-align="center" fo:text-indent="0cm" style:writing-mode="lr-tb"/>
      <style:text-properties fo:font-size="15pt" style:font-size-asian="10pt" style:font-size-complex="10pt"/>
    </style:style>
    <style:style style:name="P32" style:family="paragraph">
      <style:paragraph-properties fo:text-align="center"/>
      <style:text-properties fo:font-size="15pt" style:font-size-asian="10pt" style:font-size-complex="10pt"/>
    </style:style>
    <style:style style:name="P33" style:family="paragraph">
      <loext:graphic-properties draw:fill-color="#ffffff"/>
      <style:paragraph-properties fo:text-align="center" style:writing-mode="lr-tb"/>
      <style:text-properties fo:font-size="15pt" style:font-size-asian="10pt" style:font-size-complex="10pt"/>
    </style:style>
    <style:style style:name="P34" style:family="paragraph">
      <style:paragraph-properties fo:margin-top="0cm" fo:margin-bottom="0cm" fo:text-align="center"/>
      <style:text-properties fo:font-size="10pt" style:font-size-asian="10pt" style:font-size-complex="10pt"/>
    </style:style>
    <style:style style:name="P35" style:family="paragraph">
      <loext:graphic-properties draw:fill="solid" draw:fill-color="#ffffff"/>
      <style:paragraph-properties fo:margin-top="0cm" fo:margin-bottom="0cm" fo:text-align="center" style:writing-mode="lr-tb"/>
      <style:text-properties fo:font-size="10pt" style:font-size-asian="10pt" style:font-size-complex="10pt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15pt" style:font-size-asian="10pt" style:font-size-complex="10pt"/>
    </style:style>
    <style:style style:name="P3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5pt" style:font-size-asian="10pt" style:font-size-complex="10pt"/>
    </style:style>
    <style:style style:name="P38" style:family="paragraph">
      <loext:graphic-properties draw:fill="none" draw:fill-color="#ffffff"/>
      <style:text-properties fo:font-size="96pt" style:font-size-asian="96pt" style:font-size-complex="9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" fo:font-size="15pt" style:letter-kerning="true" style:font-name-asian="Noto Sans CJK SC" style:font-size-asian="10pt" style:font-name-complex="Noto Sans Devanagari" style:font-size-complex="10pt"/>
    </style:style>
    <style:style style:name="T4" style:family="text">
      <style:text-properties fo:font-size="15pt" style:font-size-asian="10pt" style:font-size-complex="10pt"/>
    </style:style>
    <style:style style:name="T5" style:family="text">
      <style:text-properties fo:color="#0000ff" loext:opacity="100%" fo:font-size="15pt" style:font-size-asian="10pt" style:font-size-complex="10pt"/>
    </style:style>
    <style:style style:name="T6" style:family="text">
      <style:text-properties fo:font-size="42pt" fo:font-weight="bold" style:font-size-asian="42pt" style:font-weight-asian="bold" style:font-size-complex="42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00pt" fo:font-weight="bold" style:font-size-asian="100pt" style:font-weight-asian="bold" style:font-size-complex="100pt" style:font-weight-complex="bold"/>
    </style:style>
    <style:style style:name="T9" style:family="text">
      <style:text-properties fo:font-size="15pt" fo:font-weight="bold" style:font-size-asian="10pt" style:font-weight-asian="bold" style:font-size-complex="10pt" style:font-weight-complex="bold"/>
    </style:style>
    <style:style style:name="T10" style:family="text">
      <style:text-properties fo:color="#000000" loext:opacity="100%" fo:font-size="15pt" style:font-size-asian="10pt" style:font-size-complex="10pt"/>
    </style:style>
    <style:style style:name="T11" style:family="text">
      <style:text-properties style:text-position="super 58%" style:font-name="Liberation Sans" fo:font-size="15pt" style:letter-kerning="true" style:font-name-asian="Noto Sans CJK SC" style:font-size-asian="10pt" style:font-name-complex="Noto Sans Devanagari" style:font-size-complex="10pt"/>
    </style:style>
    <style:style style:name="T12" style:family="text">
      <style:text-properties fo:color="#0000ff" loext:opacity="100%" style:font-name="Liberation Sans" fo:font-size="15pt" style:letter-kerning="true" style:font-name-asian="Noto Sans CJK SC" style:font-size-asian="10pt" style:font-name-complex="Noto Sans Devanagari" style:font-size-complex="10pt"/>
    </style:style>
    <style:style style:name="T13" style:family="text">
      <style:text-properties fo:background-color="#ffffff"/>
    </style:style>
    <style:style style:name="T14" style:family="text">
      <style:text-properties fo:color="#0000ff" loext:opacity="100%" fo:font-size="15pt" fo:font-weight="normal" style:font-size-asian="10pt" style:font-weight-asian="normal" style:font-size-complex="10pt" style:font-weight-complex="normal"/>
    </style:style>
    <style:style style:name="T15" style:family="text">
      <style:text-properties fo:font-size="15pt" fo:font-weight="normal" style:font-size-asian="10pt" style:font-weight-asian="normal" style:font-size-complex="10pt" style:font-weight-complex="normal"/>
    </style:style>
    <style:style style:name="T16" style:family="text">
      <style:text-properties fo:color="#127622" loext:opacity="100%" style:font-name="Liberation Serif" fo:font-size="15pt" fo:font-style="italic" style:letter-kerning="true" style:font-name-asian="Noto Sans CJK SC" style:font-size-asian="15pt" style:font-style-asian="italic" style:font-name-complex="Noto Sans Devanagari" style:font-size-complex="15pt" style:font-style-complex="italic"/>
    </style:style>
    <style:style style:name="T17" style:family="text">
      <style:text-properties fo:color="#127622" loext:opacity="100%" style:font-name="Liberation Serif" fo:font-size="15pt" fo:font-style="italic" fo:font-weight="bold" style:letter-kerning="true" style:font-name-asian="Noto Sans CJK SC" style:font-size-asian="15pt" style:font-style-asian="italic" style:font-weight-asian="bold" style:font-name-complex="Noto Sans Devanagari" style:font-size-complex="15pt" style:font-style-complex="italic" style:font-weight-complex="bold"/>
    </style:style>
    <style:style style:name="T18" style:family="text">
      <style:text-properties fo:color="#127622" loext:opacity="100%" style:font-name="Liberation Serif" fo:font-size="15pt" fo:font-style="italic" fo:font-weight="normal" style:font-size-asian="15pt" style:font-style-asian="italic" style:font-weight-asian="bold" style:font-size-complex="15pt" style:font-style-complex="italic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style:letter-kerning="true" style:font-name-asian="Noto Sans CJK SC" style:font-size-asian="10pt" style:font-style-asian="normal" style:font-name-complex="Noto Sans Devanagari" style:font-size-complex="10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127622" loext:opacity="100%" style:font-name="Liberation Serif" fo:font-size="15pt" fo:font-style="italic" fo:font-weight="normal" style:letter-kerning="true" style:font-name-asian="Noto Sans CJK SC" style:font-size-asian="15pt" style:font-style-asian="italic" style:font-weight-asian="normal" style:font-name-complex="Noto Sans Devanagari" style:font-size-complex="15pt" style:font-style-complex="italic" style:font-weight-complex="normal"/>
    </style:style>
    <style:style style:name="T23" style:family="text">
      <style:text-properties fo:color="#ff0000" loext:opacity="100%" style:font-name="Liberation Sans" fo:font-size="15pt" fo:font-weight="bold" style:letter-kerning="true" style:font-name-asian="Noto Sans CJK SC" style:font-size-asian="10pt" style:font-weight-asian="bold" style:font-name-complex="Noto Sans Devanagari" style:font-size-complex="10pt" style:font-weight-complex="bold"/>
    </style:style>
    <style:style style:name="T24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fo:font-size="15pt" style:font-size-asian="10pt" style:font-size-complex="10pt"/>
    </style:style>
    <style:style style:name="T26" style:family="text">
      <style:text-properties fo:color="#000000" loext:opacity="100%" style:font-name="Liberation Sans" fo:font-size="15pt" style:letter-kerning="true" style:font-name-asian="Noto Sans CJK SC" style:font-size-asian="10pt" style:font-name-complex="Noto Sans Devanagari" style:font-size-complex="10pt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3pt" fo:font-style="italic" style:font-size-asian="13pt" style:font-style-asian="italic" style:font-size-complex="13pt" style:font-style-complex="italic"/>
    </style:style>
    <style:style style:name="T29" style:family="text">
      <style:text-properties fo:color="#ff0000" loext:opacity="100%" fo:font-size="15pt" fo:font-weight="bold" style:font-size-asian="10pt" style:font-weight-asian="bold" style:font-size-complex="10pt" style:font-weight-complex="bold"/>
    </style:style>
    <style:style style:name="T30" style:family="text">
      <style:text-properties fo:font-variant="normal" fo:text-transform="none" fo:color="#55215b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text-outline="false" style:text-line-through-style="none" style:text-line-through-type="none" style:text-position="super 58%" style:font-name="Liberation Sans" fo:font-size="15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style:font-name="Liberation Sans" fo:font-size="15pt" fo:font-style="normal" fo:text-shadow="none" style:text-underline-style="none" style:letter-kerning="true" style:font-name-asian="Noto Sans CJK SC" style:font-size-asian="10pt" style:font-style-asian="normal" style:font-name-complex="Noto Sans Devanagari" style:font-size-complex="10pt" style:font-style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ff" loext:opacity="100%" style:font-name="Liberation Mono" fo:font-size="15pt" fo:font-style="italic" fo:font-weight="normal" style:font-size-asian="15pt" style:font-style-asian="italic" style:font-weight-asian="bold" style:font-size-complex="15pt" style:font-style-complex="italic" style:font-weight-complex="bold"/>
    </style:style>
    <style:style style:name="T36" style:family="text">
      <style:text-properties fo:font-variant="normal" fo:text-transform="none" fo:color="#127622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5pt" fo:font-style="normal" fo:text-shadow="none" style:text-underline-style="none" style:letter-kerning="true" style:font-name-asian="Noto Sans CJK SC" style:font-size-asian="10pt" style:font-style-asian="normal" style:font-name-complex="Noto Sans Devanagari" style:font-size-complex="10pt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3pt" style:font-size-asian="13pt" style:font-size-complex="13pt"/>
    </style:style>
    <style:style style:name="T39" style:family="text">
      <style:text-properties fo:color="#000000" loext:opacity="100%" fo:font-size="15pt" fo:font-weight="bold" style:font-size-asian="10pt" style:font-weight-asian="bold" style:font-size-complex="10pt" style:font-weight-complex="bold"/>
    </style:style>
    <style:style style:name="T40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custom-shape draw:style-name="gr2" draw:text-style-name="P1" draw:layer="layout" svg:width="125.5cm" svg:height="104.5cm" svg:x="13.75cm" svg:y="16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25.5cm" svg:height="1.402cm" svg:x="13.75cm" svg:y="16.6cm">
            <text:p text:style-name="P2"><text:span text:style-name="T1">Reco_bal() </text:span><text:span text:style-name="T2">(Reconnaissance de la </text:span><text:span text:style-name="T2">balise)</text:span></text:p>
            <draw:enhanced-geometry svg:viewBox="0 0 21600 21600" draw:type="rectangle" draw:enhanced-path="M 0 0 L 21600 0 21600 21600 0 21600 0 0 Z N"/>
          </draw:custom-shape>
        </draw:g>
        <draw:g draw:style-name="gr1" xml:id="id38" draw:id="id38">
          <draw:custom-shape draw:style-name="gr4" draw:text-style-name="P1" draw:layer="layout" svg:width="22.85cm" svg:height="26.75cm" svg:x="16.35cm" svg:y="77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22.85cm" svg:height="1.189cm" svg:x="16.35cm" svg:y="77.35cm">
            <text:p text:style-name="P2"><text:span text:style-name="T1">Mode_dicté</text:span><text:span text:style-name="T1">e() </text:span><text:span text:style-name="T2">(si finit </text:span><text:span text:style-name="T2">par #d → </text:span><text:span text:style-name="T2">transformer </text:span><text:span text:style-name="T2">texte en </text:span><text:span text:style-name="T2">tableau de </text:span><text:span text:style-name="T2">ch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5" xml:id="id1" draw:id="id1" draw:layer="layout" svg:width="4.75cm" svg:height="2.5cm" svg:x="26.638cm" svg:y="4.1cm">
          <text:p text:style-name="P4"><text:span text:style-name="T3">Code barre scann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2" draw:id="id2" draw:layer="layout" svg:width="7.75cm" svg:height="2.5cm" svg:x="25.138cm" svg:y="8.35cm">
          <text:p text:style-name="P6"><text:span text:style-name="T4">Alg</text:span><text:span text:style-name="T4">orit</text:span><text:span text:style-name="T4">hm</text:span><text:span text:style-name="T4">e </text:span><text:span text:style-name="T4">de </text:span><text:span text:style-name="T4">dé</text:span><text:span text:style-name="T4">cry</text:span><text:span text:style-name="T4">pta</text:span><text:span text:style-name="T4">g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5" xml:id="id3" draw:id="id3" draw:layer="layout" svg:width="9cm" svg:height="2.25cm" svg:x="24.5cm" svg:y="12.6cm">
          <text:p text:style-name="P4"><text:span text:style-name="T5">Contenu_QR</text:span><text:span text:style-name="T3"> <text:s/>= contenu du QR décrypté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8" draw:layer="layout" draw:type="lines" svg:x1="29.013cm" svg:y1="6.6cm" svg:x2="29.013cm" svg:y2="8.35cm" draw:start-shape="id1" draw:start-glue-point="8" draw:end-shape="id2" svg:d="M29013 6600v542 667 541" svg:viewBox="0 0 1 1751">
          <text:p/>
        </draw:connector>
        <draw:connector draw:style-name="gr9" draw:text-style-name="P8" draw:layer="layout" draw:type="lines" svg:x1="29.013cm" svg:y1="10.85cm" svg:x2="29cm" svg:y2="12.6cm" draw:start-shape="id2" draw:start-glue-point="2" draw:end-shape="id3" draw:end-glue-point="4" svg:d="M29013 10850v542l-13 667v541" svg:viewBox="0 0 14 1751">
          <text:p/>
        </draw:connector>
        <draw:frame draw:style-name="gr10" draw:text-style-name="P11" draw:layer="layout" svg:width="12.06cm" svg:height="11.329cm" svg:x="11.5cm" svg:y="2.85cm">
          <draw:text-box>
            <text:p text:style-name="P9"><text:span text:style-name="T6">Initiali</text:span><text:span text:style-name="T6">sation</text:span><text:span text:style-name="T6">s</text:span></text:p>
            <text:p text:style-name="P10"><text:span text:style-name="T7">URL = ""</text:span></text:p>
            <text:p text:style-name="P10"><text:span text:style-name="T7">phrase = "Bonjour. </text:span><text:span text:style-name="T7">Cette application </text:span><text:span text:style-name="T7">permet..."</text:span></text:p>
            <text:p text:style-name="P10"><text:span text:style-name="T7">Contenu_QR = </text:span><text:span text:style-name="T7">"Scannez un code </text:span><text:span text:style-name="T7">QR"</text:span></text:p>
            <text:p text:style-name="P10"><text:span text:style-name="T7">tabChar = []</text:span></text:p>
            <text:p text:style-name="P10"><text:span text:style-name="T7">code_lang = "fr"</text:span></text:p>
            <text:p text:style-name="P10"><text:span text:style-name="T7">code_pays = "FRA"</text:span></text:p>
            <text:p text:style-name="P10"><text:span text:style-name="T7">balise = "&lt;frFRA&gt;"</text:span></text:p>
            <text:p text:style-name="P10"><text:span text:style-name="T7">mp3_BM = "Pas un </text:span><text:span text:style-name="T7">son !"</text:span></text:p>
            <text:p text:style-name="P10"><text:span text:style-name="T7">Mode = "lecture"</text:span></text:p>
          </draw:text-box>
        </draw:frame>
        <draw:frame draw:style-name="gr11" draw:text-style-name="P12" draw:layer="layout" svg:width="25.719cm" svg:height="4.192cm" svg:x="57.695cm" svg:y="3.6cm">
          <draw:text-box>
            <text:p text:style-name="P9"><text:span text:style-name="T8">M</text:span><text:span text:style-name="T8">AE</text:span><text:span text:style-name="T8">L </text:span><text:span text:style-name="T8">Sc</text:span><text:span text:style-name="T8">an </text:span><text:span text:style-name="T8">5.1</text:span></text:p>
          </draw:text-box>
        </draw:frame>
        <draw:custom-shape draw:style-name="gr12" draw:text-style-name="P14" xml:id="id4" draw:id="id4" draw:layer="layout" svg:width="13.5cm" svg:height="3cm" svg:x="22.3cm" svg:y="18.35cm">
          <text:p text:style-name="P13"><text:span text:style-name="T9">Text2list()</text:span></text:p>
          <text:p text:style-name="P13"><text:span text:style-name="T10">Créer tableau </text:span><text:span text:style-name="T5">tabChar </text:span></text:p>
          <text:p text:style-name="P13"><text:span text:style-name="T10">à partir des </text:span><text:span text:style-name="T10">lettres de </text:span><text:span text:style-name="T5">Contenu_QR</text:span></text:p>
          <text:p text:style-name="P13"><text:span text:style-name="T5"/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13" draw:text-style-name="P15" xml:id="id5" draw:id="id5" draw:layer="layout" svg:width="9.95cm" svg:height="3.55cm" svg:x="24.1cm" svg:y="22.25cm">
          <text:p text:style-name="P4"><text:span text:style-name="T3">1</text:span><text:span text:style-name="T11">er</text:span><text:span text:style-name="T3"> charactère</text:span></text:p>
          <text:p text:style-name="P4"><text:span text:style-name="T3">de</text:span><text:span text:style-name="T5"> tabCha</text:span><text:span text:style-name="T3">r = "&lt;"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6" draw:layer="layout" draw:type="lines" svg:x1="29cm" svg:y1="14.85cm" svg:x2="29.05cm" svg:y2="18.35cm" draw:end-shape="id4" draw:end-glue-point="0" svg:d="M29000 14850l50 2824v676" svg:viewBox="0 0 51 3501">
          <text:p/>
        </draw:connector>
        <draw:connector draw:style-name="gr14" draw:text-style-name="P16" draw:layer="layout" draw:type="lines" draw:line-skew="-0.292cm" svg:x1="29.05cm" svg:y1="21.35cm" svg:x2="29.075cm" svg:y2="22.25cm" draw:start-shape="id4" draw:start-glue-point="2" draw:end-shape="id5" draw:end-glue-point="4" svg:d="M29050 21350v250l25 109v541" svg:viewBox="0 0 26 901">
          <text:p/>
        </draw:connector>
        <draw:custom-shape draw:style-name="gr15" draw:text-style-name="P18" xml:id="id6" draw:id="id6" draw:layer="layout" svg:width="9cm" svg:height="2.3cm" svg:x="24.75cm" svg:y="27.45cm">
          <text:p text:style-name="P17"><text:span text:style-name="T12">code_lang</text:span><text:span text:style-name="T3"> =</text:span></text:p>
          <text:p text:style-name="P17"><text:span text:style-name="T3">2</text:span><text:span text:style-name="T11">e</text:span><text:span text:style-name="T3"> et 3</text:span><text:span text:style-name="T11">e</text:span><text:span text:style-name="T3"> chr de</text:span><text:span text:style-name="T12"> </text:span><text:span text:style-name="T12">tabChar</text:span></text:p>
          <draw:enhanced-geometry svg:viewBox="0 0 21600 21600" draw:type="rectangle" draw:enhanced-path="M 0 0 L 21600 0 21600 21600 0 21600 0 0 Z N"/>
        </draw:custom-shape>
        <draw:connector draw:style-name="gr16" draw:text-style-name="P19" draw:layer="layout" draw:type="lines" svg:x1="29.075cm" svg:y1="25.8cm" svg:x2="29.25cm" svg:y2="27.45cm" draw:start-shape="id5" draw:start-glue-point="6" draw:end-shape="id6" draw:end-glue-point="0" svg:d="M29075 25800v542l175 567v541" svg:viewBox="0 0 176 1651">
          <text:p text:style-name="P2"><text:span text:style-name="T13">oui</text:span></text:p>
        </draw:connector>
        <draw:connector draw:style-name="gr16" draw:text-style-name="P19" draw:layer="layout" draw:type="lines" svg:x1="34.05cm" svg:y1="24.025cm" svg:x2="65.525cm" svg:y2="23.825cm" draw:start-shape="id5" draw:start-glue-point="7" draw:end-shape="id7" draw:end-glue-point="5" svg:d="M34050 24025h542l30392-200h541" svg:viewBox="0 0 31476 201">
          <text:p text:style-name="P2"><text:span text:style-name="T13">non</text:span></text:p>
        </draw:connector>
        <draw:custom-shape draw:style-name="gr17" draw:text-style-name="P21" xml:id="id8" draw:id="id8" draw:layer="layout" svg:width="9cm" svg:height="4.05cm" svg:x="24.9cm" svg:y="31.6cm">
          <text:p text:style-name="P20"><text:span text:style-name="T3">4</text:span><text:span text:style-name="T11">e</text:span><text:span text:style-name="T3"> charactère</text:span></text:p>
          <text:p text:style-name="P20"><text:span text:style-name="T3">de </text:span><text:span text:style-name="T5">tabChar</text:span><text:span text:style-name="T3"> = "&gt;"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2" xml:id="id9" draw:id="id9" draw:layer="layout" svg:width="9cm" svg:height="2.55cm" svg:x="25cm" svg:y="39.55cm">
          <text:p text:style-name="P6"><text:span text:style-name="T5">code_pays</text:span><text:span text:style-name="T4"> = </text:span><text:span text:style-name="T4">default</text:span></text:p>
          <draw:enhanced-geometry svg:viewBox="0 0 21600 21600" draw:type="rectangle" draw:enhanced-path="M 0 0 L 21600 0 21600 21600 0 21600 0 0 Z N"/>
        </draw:custom-shape>
        <draw:connector draw:style-name="gr16" draw:text-style-name="P19" draw:layer="layout" draw:type="lines" svg:x1="29.4cm" svg:y1="35.65cm" svg:x2="29.5cm" svg:y2="39.55cm" draw:start-shape="id8" draw:start-glue-point="6" draw:end-shape="id9" draw:end-glue-point="0" svg:d="M29400 35650v542l100 2817v541" svg:viewBox="0 0 101 3901">
          <text:p text:style-name="P2"><text:span text:style-name="T13">oui</text:span></text:p>
        </draw:connector>
        <draw:connector draw:style-name="gr16" draw:text-style-name="P19" draw:layer="layout" draw:type="lines" svg:x1="33.9cm" svg:y1="33.625cm" svg:x2="42.1cm" svg:y2="33.55cm" draw:start-shape="id8" draw:start-glue-point="7" draw:end-shape="id10" draw:end-glue-point="3" svg:d="M33900 33625h542l7117-75h541" svg:viewBox="0 0 8201 76">
          <text:p text:style-name="P2"><text:span text:style-name="T13">non</text:span></text:p>
        </draw:connector>
        <draw:custom-shape draw:style-name="gr19" draw:text-style-name="P21" xml:id="id10" draw:id="id10" draw:layer="layout" svg:width="9cm" svg:height="2.3cm" svg:x="42.1cm" svg:y="32.4cm">
          <text:p text:style-name="P20"><text:span text:style-name="T5">code_pays</text:span><text:span text:style-name="T4"> =</text:span></text:p>
          <text:p text:style-name="P20"><text:span text:style-name="T4">4e, 5e et 6e chr de</text:span><text:span text:style-name="T5"> </text:span><text:span text:style-name="T5">tabChar</text:span></text:p>
          <draw:enhanced-geometry svg:viewBox="0 0 21600 21600" draw:type="rectangle" draw:enhanced-path="M 0 0 L 21600 0 21600 21600 0 21600 0 0 Z N"/>
        </draw:custom-shape>
        <draw:connector draw:style-name="gr20" draw:text-style-name="P19" draw:layer="layout" draw:type="lines" svg:x1="29.25cm" svg:y1="29.75cm" svg:x2="29.4cm" svg:y2="31.6cm" draw:start-shape="id6" draw:start-glue-point="2" draw:end-shape="id8" draw:end-glue-point="4" svg:d="M29250 29750v541l150 768v541" svg:viewBox="0 0 151 1851">
          <text:p/>
        </draw:connector>
        <draw:connector draw:style-name="gr21" draw:text-style-name="P16" draw:layer="layout" draw:type="lines" svg:x1="29.5cm" svg:y1="42.1cm" svg:x2="21.814cm" svg:y2="46.142cm" draw:start-shape="id9" draw:start-glue-point="2" draw:end-shape="id11" draw:end-glue-point="4" svg:d="M29500 42100v541l-7686 2959v542" svg:viewBox="0 0 7687 4043">
          <text:p/>
        </draw:connector>
        <draw:connector draw:style-name="gr22" draw:text-style-name="P16" draw:layer="layout" draw:type="lines" svg:x1="29.5cm" svg:y1="42.1cm" svg:x2="37.5cm" svg:y2="47.45cm" draw:start-shape="id9" draw:start-glue-point="2" draw:end-shape="id12" draw:end-glue-point="0" svg:d="M29500 42100v541l8000 4268v541" svg:viewBox="0 0 8001 5351">
          <text:p/>
        </draw:connector>
        <draw:custom-shape draw:style-name="gr23" draw:text-style-name="P22" xml:id="id12" draw:id="id12" draw:layer="layout" svg:width="9cm" svg:height="1.65cm" svg:x="33cm" svg:y="47.45cm">
          <text:p text:style-name="P6"><text:span text:style-name="T5">balise</text:span><text:span text:style-name="T4"> = </text:span><text:span text:style-name="T9">&lt;</text:span><text:span text:style-name="T4"> + min(</text:span><text:span text:style-name="T14">code_lang</text:span><text:span text:style-name="T15">)</text:span><text:span text:style-name="T4"> + </text:span><text:span text:style-name="T9">&gt;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xml:id="id11" draw:id="id11" draw:layer="layout" svg:width="9cm" svg:height="4.385cm" svg:x="17.314cm" svg:y="46.142cm">
          <text:p text:style-name="P6"><text:span text:style-name="T5">code_lang</text:span><text:span text:style-name="T4"> = p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22" xml:id="id13" draw:id="id13" draw:layer="layout" svg:width="9cm" svg:height="1.555cm" svg:x="17.314cm" svg:y="52.445cm">
          <text:p text:style-name="P6"><text:span text:style-name="T5">code_pays</text:span><text:span text:style-name="T4"> = BRA</text:span></text:p>
          <draw:enhanced-geometry svg:viewBox="0 0 21600 21600" draw:type="rectangle" draw:enhanced-path="M 0 0 L 21600 0 21600 21600 0 21600 0 0 Z N"/>
        </draw:custom-shape>
        <draw:connector draw:style-name="gr16" draw:text-style-name="P19" draw:layer="layout" draw:type="lines" svg:x1="21.814cm" svg:y1="50.527cm" svg:x2="21.814cm" svg:y2="52.445cm" draw:start-shape="id11" draw:start-glue-point="6" draw:end-shape="id13" draw:end-glue-point="0" svg:d="M21814 50527v541 835 542" svg:viewBox="0 0 1 1919">
          <text:p text:style-name="P2"><text:span text:style-name="T13">oui</text:span></text:p>
        </draw:connector>
        <draw:connector draw:style-name="gr16" draw:text-style-name="P19" draw:layer="layout" draw:type="lines" svg:x1="26.314cm" svg:y1="48.335cm" svg:x2="29.964cm" svg:y2="54.44cm" draw:start-shape="id11" draw:start-glue-point="7" draw:end-shape="id14" draw:end-glue-point="4" svg:d="M26314 48335h542l3108 5563v542" svg:viewBox="0 0 3651 6106">
          <text:p text:style-name="P2"><text:span text:style-name="T13">non</text:span></text:p>
        </draw:connector>
        <draw:custom-shape draw:style-name="gr24" draw:text-style-name="P22" xml:id="id14" draw:id="id14" draw:layer="layout" svg:width="9cm" svg:height="4.385cm" svg:x="25.464cm" svg:y="54.44cm">
          <text:p text:style-name="P6"><text:span text:style-name="T5">code_lang</text:span><text:span text:style-name="T4"> = 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2" xml:id="id15" draw:id="id15" draw:layer="layout" svg:width="9cm" svg:height="1.67cm" svg:x="25.464cm" svg:y="61.08cm">
          <text:p text:style-name="P6"><text:span text:style-name="T5">code_pays</text:span><text:span text:style-name="T4"> = GBR</text:span></text:p>
          <draw:enhanced-geometry svg:viewBox="0 0 21600 21600" draw:type="rectangle" draw:enhanced-path="M 0 0 L 21600 0 21600 21600 0 21600 0 0 Z N"/>
        </draw:custom-shape>
        <draw:connector draw:style-name="gr16" draw:text-style-name="P19" draw:layer="layout" draw:type="lines" svg:x1="29.964cm" svg:y1="58.825cm" svg:x2="29.964cm" svg:y2="61.08cm" draw:start-shape="id14" draw:start-glue-point="6" draw:end-shape="id15" draw:end-glue-point="0" svg:d="M29964 58825v541 1173 541" svg:viewBox="0 0 1 2256">
          <text:p text:style-name="P2"><text:span text:style-name="T13">oui</text:span></text:p>
        </draw:connector>
        <draw:connector draw:style-name="gr16" draw:text-style-name="P19" draw:layer="layout" draw:type="lines" svg:x1="34.464cm" svg:y1="56.633cm" svg:x2="38.714cm" svg:y2="62.6cm" draw:start-shape="id14" draw:start-glue-point="7" draw:end-shape="id16" draw:end-glue-point="4" svg:d="M34464 56633h542l3708 5426v541" svg:viewBox="0 0 4251 5968">
          <text:p text:style-name="P2"><text:span text:style-name="T13">non</text:span></text:p>
        </draw:connector>
        <draw:custom-shape draw:style-name="gr27" draw:text-style-name="P22" xml:id="id16" draw:id="id16" draw:layer="layout" svg:width="9cm" svg:height="4.384cm" svg:x="34.214cm" svg:y="62.6cm">
          <text:p text:style-name="P6"><text:span text:style-name="T5">code_lang</text:span><text:span text:style-name="T4"> = 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xml:id="id17" draw:id="id17" draw:layer="layout" svg:width="9cm" svg:height="1.679cm" svg:x="34.214cm" svg:y="69.071cm">
          <text:p text:style-name="P6"><text:span text:style-name="T5">code_pays</text:span><text:span text:style-name="T4"> = USA</text:span></text:p>
          <draw:enhanced-geometry svg:viewBox="0 0 21600 21600" draw:type="rectangle" draw:enhanced-path="M 0 0 L 21600 0 21600 21600 0 21600 0 0 Z N"/>
        </draw:custom-shape>
        <draw:connector draw:style-name="gr16" draw:text-style-name="P19" draw:layer="layout" draw:type="lines" svg:x1="38.714cm" svg:y1="66.984cm" svg:x2="38.714cm" svg:y2="69.071cm" draw:start-shape="id16" draw:start-glue-point="6" draw:end-shape="id17" draw:end-glue-point="0" svg:d="M38714 66984v542 1003 542" svg:viewBox="0 0 1 2088">
          <text:p text:style-name="P2"><text:span text:style-name="T13">oui</text:span></text:p>
        </draw:connector>
        <draw:connector draw:style-name="gr16" draw:text-style-name="P19" draw:layer="layout" draw:type="lines" svg:x1="43.214cm" svg:y1="64.792cm" svg:x2="47.414cm" svg:y2="70.6cm" draw:start-shape="id16" draw:start-glue-point="7" draw:end-shape="id18" draw:end-glue-point="4" svg:d="M43214 64792h542l3658 5266v542" svg:viewBox="0 0 4201 5809">
          <text:p text:style-name="P2"><text:span text:style-name="T13">non</text:span></text:p>
        </draw:connector>
        <draw:custom-shape draw:style-name="gr24" draw:text-style-name="P22" xml:id="id18" draw:id="id18" draw:layer="layout" svg:width="9cm" svg:height="4.385cm" svg:x="42.914cm" svg:y="70.6cm">
          <text:p text:style-name="P6"><text:span text:style-name="T5">code_lang</text:span><text:span text:style-name="T4"> = f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22" xml:id="id19" draw:id="id19" draw:layer="layout" svg:width="9cm" svg:height="1.68cm" svg:x="43cm" svg:y="77.32cm">
          <text:p text:style-name="P6"><text:span text:style-name="T5">code_pays</text:span><text:span text:style-name="T4"> = F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9" draw:layer="layout" draw:type="lines" svg:x1="47.414cm" svg:y1="74.985cm" svg:x2="47.5cm" svg:y2="77.32cm" draw:start-shape="id18" draw:start-glue-point="6" draw:end-shape="id19" draw:end-glue-point="0" svg:d="M47414 74985v541l86 1253v541" svg:viewBox="0 0 87 2336">
          <text:p text:style-name="P2"><text:span text:style-name="T13">oui</text:span></text:p>
        </draw:connector>
        <draw:connector draw:style-name="gr16" draw:text-style-name="P19" draw:layer="layout" draw:type="lines" svg:x1="29.05cm" svg:y1="86.158cm" svg:x2="31.95cm" svg:y2="86.225cm" draw:start-shape="id20" draw:start-glue-point="7" draw:end-shape="id21" draw:end-glue-point="3" svg:d="M29050 86158h542l1817 67h541" svg:viewBox="0 0 2901 68">
          <text:p text:style-name="P2"><text:span text:style-name="T13">non</text:span></text:p>
        </draw:connector>
        <draw:frame draw:style-name="gr30" draw:text-style-name="P24" xml:id="id22" draw:id="id22" draw:layer="layout" svg:width="11.5cm" svg:height="2.587cm" svg:x="48.25cm" svg:y="46.1cm">
          <draw:text-box>
            <text:p text:style-name="P23"><text:span text:style-name="T16">Pourquoi ne pas </text:span><text:span text:style-name="T16">mettre la balise </text:span><text:span text:style-name="T16">longue ?</text:span></text:p>
            <text:p text:style-name="P23"><text:span text:style-name="T16">Pourquoi </text:span><text:span text:style-name="T16">configurer ici </text:span><text:span text:style-name="T16">"code_pays</text:span></text:p>
            <text:p text:style-name="P23"><text:span text:style-name="T16">mais ne pas </text:span><text:span text:style-name="T16">l'inclure dans la </text:span><text:span text:style-name="T16">balis</text:span></text:p>
            <text:p text:style-name="P23"><text:span text:style-name="T16">pour traitement </text:span><text:span text:style-name="T16">ultérieur ?</text:span></text:p>
          </draw:text-box>
        </draw:frame>
        <draw:connector draw:style-name="gr31" draw:text-style-name="P16" draw:layer="layout" draw:type="curve" svg:x1="48.25cm" svg:y1="47.393cm" svg:x2="42cm" svg:y2="48.275cm" draw:start-shape="id22" draw:start-glue-point="3" draw:end-shape="id12" draw:end-glue-point="1" svg:d="M48250 47393c-4656 0-1531 882-6250 882" svg:viewBox="0 0 6251 883">
          <text:p/>
        </draw:connector>
        <draw:frame draw:style-name="gr32" draw:text-style-name="P24" xml:id="id23" draw:id="id23" draw:layer="layout" svg:width="15.5cm" svg:height="2.586cm" svg:x="41.75cm" svg:y="41.85cm">
          <draw:text-box>
            <text:p text:style-name="P23"><text:span text:style-name="T17">Est-ce utile ?</text:span></text:p>
            <text:p text:style-name="P23"><text:span text:style-name="T16">Mettre le code pays </text:span><text:span text:style-name="T16">par défaut quand il </text:span><text:span text:style-name="T16">n'est pas précisé.</text:span></text:p>
            <text:p text:style-name="P23"><text:span text:style-name="T16">--&gt; il n'est pas précisé </text:span><text:span text:style-name="T16">dans les balises </text:span><text:span text:style-name="T16">courtes définies juste </text:span><text:span text:style-name="T16">après</text:span></text:p>
          </draw:text-box>
        </draw:frame>
        <draw:connector draw:style-name="gr31" draw:text-style-name="P16" draw:layer="layout" draw:type="curve" svg:x1="41.75cm" svg:y1="43.143cm" svg:x2="34cm" svg:y2="40.825cm" draw:start-shape="id23" draw:start-glue-point="3" draw:end-shape="id9" draw:end-glue-point="1" svg:d="M41750 43143c-5781 0-1906-2318-7750-2318" svg:viewBox="0 0 7751 2319">
          <text:p/>
        </draw:connector>
        <draw:frame draw:style-name="gr33" draw:text-style-name="P26" xml:id="id24" draw:id="id24" draw:layer="layout" svg:width="11.5cm" svg:height="2cm" svg:x="40.5cm" svg:y="30.35cm">
          <draw:text-box>
            <text:p text:style-name="P25"><text:span text:style-name="T16">Cas </text:span><text:span text:style-name="T16">des </text:span><text:span text:style-name="T16">bali</text:span><text:span text:style-name="T16">ses </text:span><text:span text:style-name="T16">cou</text:span><text:span text:style-name="T16">rtes </text:span><text:span text:style-name="T16">gén</text:span><text:span text:style-name="T16">éré</text:span><text:span text:style-name="T16">es </text:span><text:span text:style-name="T16">par </text:span><text:span text:style-name="T16">MA</text:span><text:span text:style-name="T16">EL </text:span><text:span text:style-name="T16">Ge</text:span><text:span text:style-name="T16">n</text:span></text:p>
          </draw:text-box>
        </draw:frame>
        <draw:connector draw:style-name="gr31" draw:text-style-name="P16" draw:layer="layout" draw:type="curve" svg:x1="40.5cm" svg:y1="31.35cm" svg:x2="29.4cm" svg:y2="35.65cm" draw:start-shape="id24" draw:start-glue-point="3" draw:end-shape="id8" draw:end-glue-point="6" svg:d="M40500 31350c-4918 0-4098 2422-5644 3700s-5456 1413-5456 600" svg:viewBox="0 0 11101 4809">
          <text:p/>
        </draw:connector>
        <draw:frame draw:style-name="gr34" draw:text-style-name="P28" xml:id="id25" draw:id="id25" draw:layer="layout" svg:width="8.75cm" svg:height="2cm" svg:x="41.25cm" svg:y="26.35cm">
          <draw:text-box>
            <text:p text:style-name="P27"><text:span text:style-name="T18">Détection des balises de langues</text:span></text:p>
          </draw:text-box>
        </draw:frame>
        <draw:connector draw:style-name="gr31" draw:text-style-name="P16" draw:layer="layout" draw:type="curve" svg:x1="41.25cm" svg:y1="27.35cm" svg:x2="29.075cm" svg:y2="25.8cm" draw:start-shape="id25" draw:start-glue-point="3" draw:end-shape="id5" draw:end-glue-point="6" svg:d="M41250 27350c-8117 0-12175-516-12175-1550" svg:viewBox="0 0 12176 1551">
          <text:p/>
        </draw:connector>
        <draw:custom-shape draw:style-name="gr35" draw:text-style-name="P29" xml:id="id34" draw:id="id34" draw:layer="layout" svg:width="9cm" svg:height="2.3cm" svg:x="55.75cm" svg:y="71.6cm">
          <text:p text:style-name="P4"><text:span text:style-name="T4">print(« pas une langue par défaut »)</text:span></text:p>
          <draw:enhanced-geometry svg:viewBox="0 0 21600 21600" draw:type="rectangle" draw:enhanced-path="M 0 0 L 21600 0 21600 21600 0 21600 0 0 Z N"/>
        </draw:custom-shape>
        <draw:custom-shape draw:style-name="gr36" draw:text-style-name="P22" xml:id="id26" draw:id="id26" draw:layer="layout" svg:width="14.4cm" svg:height="1.65cm" svg:x="39.35cm" svg:y="36.85cm">
          <text:p text:style-name="P6"><text:span text:style-name="T5">balise</text:span><text:span text:style-name="T19"> = </text:span><text:span text:style-name="T20">&lt;</text:span><text:span text:style-name="T19"> + min</text:span><text:span text:style-name="T4">(</text:span><text:span text:style-name="T5">code_lang</text:span><text:span text:style-name="T4">)</text:span><text:span text:style-name="T20"> </text:span><text:span text:style-name="T20">+ </text:span><text:span text:style-name="T21">maj(</text:span><text:span text:style-name="T5">code_pays</text:span><text:span text:style-name="T15">)</text:span><text:span text:style-name="T4"> + </text:span><text:span text:style-name="T9">&gt;</text:span></text:p>
          <draw:enhanced-geometry svg:viewBox="0 0 21600 21600" draw:type="rectangle" draw:enhanced-path="M 0 0 L 21600 0 21600 21600 0 21600 0 0 Z N"/>
        </draw:custom-shape>
        <draw:connector draw:style-name="gr22" draw:text-style-name="P16" draw:layer="layout" draw:type="lines" svg:x1="46.6cm" svg:y1="34.7cm" svg:x2="46.55cm" svg:y2="36.85cm" draw:start-shape="id10" draw:start-glue-point="2" draw:end-shape="id26" draw:end-glue-point="0" svg:d="M46600 34700v541l-50 1068v541" svg:viewBox="0 0 51 2151">
          <text:p/>
        </draw:connector>
        <draw:frame draw:style-name="gr37" draw:text-style-name="P24" xml:id="id27" draw:id="id27" draw:layer="layout" svg:width="10.75cm" svg:height="0.835cm" svg:x="51.25cm" svg:y="39.85cm">
          <draw:text-box>
            <text:p text:style-name="P23"><text:span text:style-name="T17">Pas de vérification de </text:span><text:span text:style-name="T17">fermeture de la balise &gt;</text:span></text:p>
          </draw:text-box>
        </draw:frame>
        <draw:connector draw:style-name="gr31" draw:text-style-name="P16" draw:layer="layout" draw:type="curve" svg:x1="51.25cm" svg:y1="40.267cm" svg:x2="46.55cm" svg:y2="38.5cm" draw:start-shape="id27" draw:start-glue-point="3" draw:end-shape="id26" draw:end-glue-point="2" svg:d="M51250 40267c-3134 0-4700-589-4700-1767" svg:viewBox="0 0 4701 1768">
          <text:p/>
        </draw:connector>
        <draw:frame draw:style-name="gr38" draw:text-style-name="P24" xml:id="id101" draw:id="id101" draw:layer="layout" svg:width="11.5cm" svg:height="2.003cm" svg:x="52.5cm" svg:y="66.142cm">
          <draw:text-box>
            <text:p text:style-name="P23"><text:span text:style-name="T16">Normalement, les seules </text:span><text:span text:style-name="T16">langues avec pays par défaut </text:span><text:span text:style-name="T16">générées par MAEL Gen sont : </text:span><text:span text:style-name="T17">fr, en, es, pt</text:span><text:span text:style-name="T17"><text:line-break/></text:span><text:span text:style-name="T22">Donc pas d’autres possibilité...</text:span></text:p>
          </draw:text-box>
        </draw:frame>
        <draw:custom-shape draw:style-name="gr39" draw:text-style-name="P18" xml:id="id28" draw:id="id28" draw:layer="layout" svg:width="9cm" svg:height="1.3cm" svg:x="43cm" svg:y="81.35cm">
          <text:p text:style-name="P17"><text:span text:style-name="T12">phrase</text:span><text:span text:style-name="T3"> = </text:span><text:span text:style-name="T12">Contenu_QR</text:span><text:span text:style-name="T3"> </text:span><text:span text:style-name="T23">-</text:span><text:span text:style-name="T3"> </text:span><text:span text:style-name="T12">balise</text:span></text:p>
          <draw:enhanced-geometry svg:viewBox="0 0 21600 21600" draw:type="rectangle" draw:enhanced-path="M 0 0 L 21600 0 21600 21600 0 21600 0 0 Z N"/>
        </draw:custom-shape>
        <draw:connector draw:style-name="gr20" draw:text-style-name="P19" draw:layer="layout" draw:type="lines" svg:x1="47.5cm" svg:y1="79cm" svg:x2="47.5cm" svg:y2="81.35cm" draw:start-shape="id19" draw:start-glue-point="2" draw:end-shape="id28" draw:end-glue-point="0" svg:d="M47500 79000v541 1268 541" svg:viewBox="0 0 1 2351">
          <text:p/>
        </draw:connector>
        <draw:custom-shape draw:style-name="gr40" draw:text-style-name="P31" xml:id="id29" draw:id="id29" draw:layer="layout" svg:width="10cm" svg:height="1cm" svg:x="42.5cm" svg:y="84cm">
          <text:p text:style-name="P30"><text:span text:style-name="T24">Texte_à_parole.Langue</text:span><text:span text:style-name="T21"> = </text:span><text:span text:style-name="T5">code_lang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xml:id="id30" draw:id="id30" draw:layer="layout" svg:width="9.35cm" svg:height="1cm" svg:x="42.85cm" svg:y="86.5cm">
          <text:p text:style-name="P30"><text:span text:style-name="T24">Texte_à_parole.Pays</text:span><text:span text:style-name="T21"> = </text:span><text:span text:style-name="T5">code_pays</text:span></text:p>
          <draw:enhanced-geometry svg:viewBox="0 0 21600 21600" draw:type="rectangle" draw:enhanced-path="M 0 0 L 21600 0 21600 21600 0 21600 0 0 Z N"/>
        </draw:custom-shape>
        <draw:connector draw:style-name="gr20" draw:text-style-name="P19" draw:layer="layout" draw:type="lines" svg:x1="47.5cm" svg:y1="82.65cm" svg:x2="47.5cm" svg:y2="84cm" draw:start-shape="id28" draw:start-glue-point="2" draw:end-shape="id29" draw:end-glue-point="0" svg:d="M47500 82650v541 268 541" svg:viewBox="0 0 1 1351">
          <text:p/>
        </draw:connector>
        <draw:connector draw:style-name="gr20" draw:text-style-name="P19" draw:layer="layout" draw:type="lines" svg:x1="47.525cm" svg:y1="87.5cm" svg:x2="47.507cm" svg:y2="88.85cm" draw:start-shape="id30" draw:start-glue-point="2" draw:end-shape="id31" draw:end-glue-point="0" svg:d="M47525 87500v541l-18 268v541" svg:viewBox="0 0 19 1351">
          <text:p/>
        </draw:connector>
        <draw:custom-shape draw:style-name="gr42" draw:text-style-name="P33" xml:id="id31" draw:id="id31" draw:layer="layout" svg:width="9.75cm" svg:height="3.25cm" svg:x="42.632cm" svg:y="88.85cm">
          <text:p text:style-name="P32"><text:span text:style-name="T9">Mode_dictée()</text:span></text:p>
          <text:p text:style-name="P32"><text:span text:style-name="T4"/></text:p>
          <text:p text:style-name="P32"><text:span text:style-name="T4">Détecte si #d</text:span></text:p>
          <text:p text:style-name="P32"><text:span text:style-name="T4">à la fin de </text:span><text:span text:style-name="T5">tab_ch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3" draw:text-style-name="P33" xml:id="id33" draw:id="id33" draw:layer="layout" svg:width="5.75cm" svg:height="2.75cm" svg:x="20.6cm" svg:y="79.35cm">
          <text:p text:style-name="P32"><text:span text:style-name="T4">Reçoit tabCh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1" xml:id="id20" draw:id="id20" draw:layer="layout" svg:width="11.1cm" svg:height="4.385cm" svg:x="17.95cm" svg:y="83.965cm">
          <text:p text:style-name="P20"><text:span text:style-name="T4">Avant-dernier chr de</text:span><text:span text:style-name="T5"> tabChar</text:span><text:span text:style-name="T25"> = #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9" draw:layer="layout" draw:type="lines" svg:x1="23.5cm" svg:y1="88.35cm" svg:x2="23.6cm" svg:y2="91.1cm" draw:start-shape="id20" draw:start-glue-point="6" draw:end-shape="id32" draw:end-glue-point="4" svg:d="M23500 88350v541l100 1667v542" svg:viewBox="0 0 101 2751">
          <text:p text:style-name="P2"><text:span text:style-name="T13">oui</text:span></text:p>
        </draw:connector>
        <draw:connector draw:style-name="gr20" draw:text-style-name="P19" draw:layer="layout" draw:type="lines" svg:x1="23.475cm" svg:y1="82.1cm" svg:x2="23.5cm" svg:y2="83.965cm" draw:start-shape="id33" draw:start-glue-point="8" draw:end-shape="id20" draw:end-glue-point="4" svg:d="M23475 82100v542l25 781v542" svg:viewBox="0 0 26 1866">
          <text:p/>
        </draw:connector>
        <draw:connector draw:style-name="gr16" draw:text-style-name="P19" draw:layer="layout" draw:type="lines" svg:x1="51.914cm" svg:y1="72.793cm" svg:x2="55.75cm" svg:y2="72.75cm" draw:start-shape="id18" draw:start-glue-point="7" draw:end-shape="id34" draw:end-glue-point="3" svg:d="M51914 72793h542l2753-43h541" svg:viewBox="0 0 3837 44">
          <text:p text:style-name="P2"><text:span text:style-name="T13">non</text:span></text:p>
        </draw:connector>
        <draw:custom-shape draw:style-name="gr45" draw:text-style-name="P22" xml:id="id21" draw:id="id21" draw:layer="layout" svg:width="6.75cm" svg:height="1.75cm" svg:x="31.95cm" svg:y="85.35cm">
          <text:p text:style-name="P6"><text:span text:style-name="T5">Mode</text:span><text:span text:style-name="T4"> = lecture</text:span></text:p>
          <draw:enhanced-geometry svg:viewBox="0 0 21600 21600" draw:type="rectangle" draw:enhanced-path="M 0 0 L 21600 0 21600 21600 0 21600 0 0 Z N"/>
        </draw:custom-shape>
        <draw:connector draw:style-name="gr16" draw:text-style-name="P19" draw:layer="layout" draw:type="lines" svg:x1="28.6cm" svg:y1="93.293cm" svg:x2="31.95cm" svg:y2="93.307cm" draw:start-shape="id32" draw:start-glue-point="7" draw:end-shape="id35" draw:end-glue-point="3" svg:d="M28600 93293h542l2267 14h541" svg:viewBox="0 0 3351 15">
          <text:p text:style-name="P2"><text:span text:style-name="T13">non</text:span></text:p>
        </draw:connector>
        <draw:custom-shape draw:style-name="gr46" draw:text-style-name="P21" xml:id="id32" draw:id="id32" draw:layer="layout" svg:width="10cm" svg:height="4.385cm" svg:x="18.6cm" svg:y="91.1cm">
          <text:p text:style-name="P20"><text:span text:style-name="T4">Dernier chr de</text:span><text:span text:style-name="T5"> tabChar</text:span><text:span text:style-name="T25"> = 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9" draw:layer="layout" draw:type="lines" svg:x1="23.6cm" svg:y1="95.485cm" svg:x2="23.575cm" svg:y2="98.1cm" draw:start-shape="id32" draw:start-glue-point="6" draw:end-shape="id36" draw:end-glue-point="0" svg:d="M23600 95485v541l-25 1533v541" svg:viewBox="0 0 26 2616">
          <text:p text:style-name="P2"><text:span text:style-name="T13">oui</text:span></text:p>
        </draw:connector>
        <draw:custom-shape draw:style-name="gr47" draw:text-style-name="P22" xml:id="id35" draw:id="id35" draw:layer="layout" svg:width="3.2cm" svg:height="1.115cm" svg:x="31.95cm" svg:y="92.75cm">
          <text:p text:style-name="P6"><text:span text:style-name="T4">pass</text:span></text:p>
          <draw:enhanced-geometry svg:viewBox="0 0 21600 21600" draw:type="rectangle" draw:enhanced-path="M 0 0 L 21600 0 21600 21600 0 21600 0 0 Z N"/>
        </draw:custom-shape>
        <draw:custom-shape draw:style-name="gr45" draw:text-style-name="P22" xml:id="id36" draw:id="id36" draw:layer="layout" svg:width="6.75cm" svg:height="1.75cm" svg:x="20.2cm" svg:y="98.1cm">
          <text:p text:style-name="P6"><text:span text:style-name="T5">Mode</text:span><text:span text:style-name="T4"> = dictee</text:span></text:p>
          <draw:enhanced-geometry svg:viewBox="0 0 21600 21600" draw:type="rectangle" draw:enhanced-path="M 0 0 L 21600 0 21600 21600 0 21600 0 0 Z N"/>
        </draw:custom-shape>
        <draw:custom-shape draw:style-name="gr48" draw:text-style-name="P18" xml:id="id37" draw:id="id37" draw:layer="layout" svg:width="9cm" svg:height="1.3cm" svg:x="19.05cm" svg:y="101.35cm">
          <text:p text:style-name="P17"><text:span text:style-name="T24">phrase</text:span><text:span text:style-name="T21"> = </text:span><text:span text:style-name="T12">phrase</text:span><text:span text:style-name="T3"> </text:span><text:span text:style-name="T23">-</text:span><text:span text:style-name="T3"> </text:span><text:span text:style-name="T26">#d</text:span></text:p>
          <draw:enhanced-geometry svg:viewBox="0 0 21600 21600" draw:type="rectangle" draw:enhanced-path="M 0 0 L 21600 0 21600 21600 0 21600 0 0 Z N"/>
        </draw:custom-shape>
        <draw:connector draw:style-name="gr20" draw:text-style-name="P19" draw:layer="layout" draw:type="lines" svg:x1="23.575cm" svg:y1="99.85cm" svg:x2="23.55cm" svg:y2="101.35cm" draw:start-shape="id36" draw:start-glue-point="2" draw:end-shape="id37" draw:end-glue-point="0" svg:d="M23575 99850v541l-25 418v541" svg:viewBox="0 0 26 1501">
          <text:p/>
        </draw:connector>
        <draw:connector draw:style-name="gr20" draw:text-style-name="P19" draw:layer="layout" draw:type="lines" svg:x1="47.5cm" svg:y1="85cm" svg:x2="47.525cm" svg:y2="86.5cm" draw:start-shape="id29" draw:start-glue-point="2" draw:end-shape="id30" draw:end-glue-point="0" svg:d="M47500 85000v541l25 418v541" svg:viewBox="0 0 26 1501">
          <text:p/>
        </draw:connector>
        <draw:connector draw:style-name="gr49" draw:text-style-name="P16" draw:layer="layout" draw:type="curve" svg:x1="39.2cm" svg:y1="90.725cm" svg:x2="42.632cm" svg:y2="90.475cm" draw:start-shape="id38" draw:start-glue-point="1" draw:end-shape="id31" draw:end-glue-point="3" svg:d="M39200 90725c2574 0 858-250 3432-250" svg:viewBox="0 0 3433 251">
          <text:p/>
        </draw:connector>
        <draw:custom-shape draw:style-name="gr50" draw:text-style-name="P31" xml:id="id39" draw:id="id39" draw:layer="layout" svg:width="10cm" svg:height="1cm" svg:x="42.5cm" svg:y="94.1cm">
          <text:p text:style-name="P30"><text:span text:style-name="T24">Tex</text:span><text:span text:style-name="T24">te_</text:span><text:span text:style-name="T24">à_</text:span><text:span text:style-name="T24">par</text:span><text:span text:style-name="T24">ole</text:span><text:span text:style-name="T21"> </text:span><text:span text:style-name="T21">&gt; </text:span><text:span text:style-name="T21">par</text:span><text:span text:style-name="T21">ler </text:span><text:span text:style-name="T21">&gt; </text:span><text:span text:style-name="T24">phr</text:span><text:span text:style-name="T24">as</text:span><text:span text:style-name="T24">e</text:span></text:p>
          <draw:enhanced-geometry svg:viewBox="0 0 21600 21600" draw:type="rectangle" draw:enhanced-path="M 0 0 L 21600 0 21600 21600 0 21600 0 0 Z N"/>
        </draw:custom-shape>
        <draw:connector draw:style-name="gr20" draw:text-style-name="P19" draw:layer="layout" draw:type="lines" svg:x1="47.507cm" svg:y1="92.1cm" svg:x2="47.5cm" svg:y2="94.1cm" draw:start-shape="id31" draw:start-glue-point="2" draw:end-shape="id39" draw:end-glue-point="0" svg:d="M47507 92100v542l-7 917v541" svg:viewBox="0 0 8 2001">
          <text:p/>
        </draw:connector>
        <draw:custom-shape draw:style-name="gr51" draw:text-style-name="P15" xml:id="id7" draw:id="id7" draw:layer="layout" svg:width="9.95cm" svg:height="3.55cm" svg:x="65.525cm" svg:y="22.05cm">
          <text:p text:style-name="P4"><text:span text:style-name="T3">1</text:span><text:span text:style-name="T11">er</text:span><text:span text:style-name="T3"> caractère</text:span></text:p>
          <text:p text:style-name="P4"><text:span text:style-name="T3">de</text:span><text:span text:style-name="T5"> tabCha</text:span><text:span text:style-name="T3">r = "*"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5" xml:id="id41" draw:id="id41" draw:layer="layout" svg:width="11.1cm" svg:height="3.55cm" svg:x="80.9cm" svg:y="22.05cm">
          <text:p text:style-name="P4"><text:span text:style-name="T3">Les 4 1</text:span><text:span text:style-name="T11">er</text:span><text:span text:style-name="T3"> caractères</text:span></text:p>
          <text:p text:style-name="P4"><text:span text:style-name="T3">de</text:span><text:span text:style-name="T5"> tabCha</text:span><text:span text:style-name="T3">r = "-bm-"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9" draw:layer="layout" draw:type="lines" svg:x1="70.5cm" svg:y1="25.6cm" svg:x2="70.5cm" svg:y2="29.6cm" draw:start-shape="id7" draw:start-glue-point="6" draw:end-shape="id40" draw:end-glue-point="0" svg:d="M70500 25600v542 2917 541" svg:viewBox="0 0 1 4001">
          <text:p text:style-name="P2"><text:span text:style-name="T13">oui</text:span></text:p>
        </draw:connector>
        <draw:connector draw:style-name="gr16" draw:text-style-name="P19" draw:layer="layout" draw:type="lines" svg:x1="75.475cm" svg:y1="23.825cm" svg:x2="80.9cm" svg:y2="23.825cm" draw:start-shape="id7" draw:start-glue-point="7" draw:end-shape="id41" draw:end-glue-point="5" svg:d="M75475 23825h542 4342 541" svg:viewBox="0 0 5426 1">
          <text:p text:style-name="P2"><text:span text:style-name="T13">non</text:span></text:p>
        </draw:connector>
        <draw:connector draw:style-name="gr16" draw:text-style-name="P19" draw:layer="layout" draw:type="lines" svg:x1="86.45cm" svg:y1="25.6cm" svg:x2="86.45cm" svg:y2="29.75cm" draw:start-shape="id41" draw:start-glue-point="6" draw:end-shape="id42" draw:end-glue-point="0" svg:d="M86450 25600v542 3067 541" svg:viewBox="0 0 1 4151">
          <text:p text:style-name="P2"><text:span text:style-name="T13">oui</text:span></text:p>
        </draw:connector>
        <draw:custom-shape draw:style-name="gr53" draw:text-style-name="P21" xml:id="id43" draw:id="id43" draw:layer="layout" svg:width="11.05cm" svg:height="3.55cm" svg:x="96.7cm" svg:y="22.05cm">
          <text:p text:style-name="P20"><text:span text:style-name="T3">Les 4 1</text:span><text:span text:style-name="T11">er</text:span><text:span text:style-name="T3"> caractères</text:span></text:p>
          <text:p text:style-name="P20"><text:span text:style-name="T3">de</text:span><text:span text:style-name="T12"> tabCha</text:span><text:span text:style-name="T3">r = "/gd/"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9" draw:layer="layout" draw:type="lines" svg:x1="92cm" svg:y1="23.825cm" svg:x2="96.7cm" svg:y2="23.825cm" draw:start-shape="id41" draw:start-glue-point="7" draw:end-shape="id43" draw:end-glue-point="5" svg:d="M92000 23825h542 3617 541" svg:viewBox="0 0 4701 1">
          <text:p text:style-name="P2"><text:span text:style-name="T13">non</text:span></text:p>
        </draw:connector>
        <draw:connector draw:style-name="gr16" draw:text-style-name="P19" draw:layer="layout" draw:type="lines" svg:x1="102.225cm" svg:y1="25.6cm" svg:x2="102.225cm" svg:y2="29.5cm" draw:start-shape="id43" draw:start-glue-point="6" draw:end-shape="id44" draw:end-glue-point="0" svg:d="M102225 25600v542 2817 541" svg:viewBox="0 0 1 3901">
          <text:p text:style-name="P2"><text:span text:style-name="T13">oui</text:span></text:p>
        </draw:connector>
        <draw:custom-shape draw:style-name="gr54" draw:text-style-name="P21" xml:id="id40" draw:id="id40" draw:layer="layout" svg:width="10.5cm" svg:height="1.5cm" svg:x="65.25cm" svg:y="29.6cm">
          <text:p text:style-name="P20"><text:span text:style-name="T5">Contenu_QR</text:span><text:span text:style-name="T4"> = </text:span><text:span text:style-name="T27">maj(</text:span><text:span text:style-name="T5">Contenu_</text:span><text:span text:style-name="T5">QR</text:span><text:span text:style-name="T10">)</text:span></text:p>
          <draw:enhanced-geometry svg:viewBox="0 0 21600 21600" draw:type="rectangle" draw:enhanced-path="M 0 0 L 21600 0 21600 21600 0 21600 0 0 Z N"/>
        </draw:custom-shape>
        <draw:frame draw:style-name="gr55" draw:text-style-name="P28" xml:id="id45" draw:id="id45" draw:layer="layout" svg:width="8.75cm" svg:height="2.587cm" svg:x="50.175cm" svg:y="19.557cm">
          <draw:text-box>
            <text:p text:style-name="P27"><text:span text:style-name="T18">Balise pour aller chercher les lettres et </text:span><text:span text:style-name="T18">les mots au format mp3 pour </text:span><text:span text:style-name="T18">l’abécédaire Consigny (FR et ES </text:span><text:span text:style-name="T18">seulement)</text:span></text:p>
          </draw:text-box>
        </draw:frame>
        <draw:connector draw:style-name="gr31" draw:text-style-name="P16" draw:layer="layout" draw:type="curve" svg:x1="58.925cm" svg:y1="20.85cm" svg:x2="70.5cm" svg:y2="22.05cm" draw:start-shape="id45" draw:end-shape="id7" draw:end-glue-point="4" svg:d="M58925 20850c7717 0 11575 400 11575 1200" svg:viewBox="0 0 11576 1201">
          <text:p/>
        </draw:connector>
        <draw:frame draw:style-name="gr34" draw:text-style-name="P28" xml:id="id46" draw:id="id46" draw:layer="layout" svg:width="5.2cm" svg:height="2cm" svg:x="56cm" svg:y="29.143cm">
          <draw:text-box>
            <text:p text:style-name="P27"><text:span text:style-name="T18">Fichier MP3 dont le nom est en majuscule</text:span></text:p>
          </draw:text-box>
        </draw:frame>
        <draw:connector draw:style-name="gr31" draw:text-style-name="P16" draw:layer="layout" draw:type="curve" svg:x1="61.2cm" svg:y1="30.143cm" svg:x2="65.25cm" svg:y2="30.35cm" draw:start-shape="id46" draw:end-shape="id40" draw:end-glue-point="3" svg:d="M61200 30143c3007 0 983 207 4050 207" svg:viewBox="0 0 4051 208">
          <text:p/>
        </draw:connector>
        <draw:g draw:style-name="gr1" xml:id="id51" draw:id="id51">
          <draw:custom-shape draw:style-name="gr56" draw:text-style-name="P1" draw:layer="layout" svg:width="24.75cm" svg:height="34cm" svg:x="75.75cm" svg:y="8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3" draw:layer="layout" svg:width="24.75cm" svg:height="1cm" svg:x="75.75cm" svg:y="84.5cm">
            <text:p text:style-name="P2"><text:span text:style-name="T1">Lire_mp3() </text:span><text:span text:style-name="T28">(Lit le </text:span><text:span text:style-name="T28">fichier mp3 </text:span><text:span text:style-name="T28">correspondant + ajuste </text:span><text:span text:style-name="T28">nom du fichier pour </text:span><text:span text:style-name="T28">affich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8" draw:text-style-name="P33" xml:id="id52" draw:id="id52" draw:layer="layout" svg:width="9.75cm" svg:height="3.25cm" svg:x="65.625cm" svg:y="32.85cm">
          <text:p text:style-name="P32"><text:span text:style-name="T9">Lire_mp3()</text:span></text:p>
          <text:p text:style-name="P32"><text:span text:style-name="T4"/></text:p>
          <text:p text:style-name="P32"><text:span text:style-name="T4">Détecte si #d</text:span></text:p>
          <text:p text:style-name="P32"><text:span text:style-name="T4">à la fin de </text:span><text:span text:style-name="T5">tab_ch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9" draw:text-style-name="P33" xml:id="id47" draw:id="id47" draw:layer="layout" svg:width="5.75cm" svg:height="2.75cm" svg:x="81.075cm" svg:y="86.75cm">
          <text:p text:style-name="P32"><text:span text:style-name="T4">Reçoit</text:span></text:p>
          <text:p text:style-name="P32"><text:span text:style-name="T5">Contenu_Q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9" draw:layer="layout" draw:type="lines" svg:x1="83.95cm" svg:y1="89.5cm" svg:x2="83.95cm" svg:y2="91.75cm" draw:start-shape="id47" draw:start-glue-point="8" draw:end-shape="id48" draw:end-glue-point="0" svg:d="M83950 89500v542 1167 541" svg:viewBox="0 0 1 2251">
          <text:p/>
        </draw:connector>
        <draw:custom-shape draw:style-name="gr60" draw:text-style-name="P21" xml:id="id48" draw:id="id48" draw:layer="layout" svg:width="10.25cm" svg:height="1.75cm" svg:x="78.825cm" svg:y="91.75cm">
          <text:p text:style-name="P20"><text:span text:style-name="T24">avec_acc</text:span><text:span text:style-name="T21"> = </text:span><text:span text:style-name="T5">Contenu_QR</text:span></text:p>
          <draw:enhanced-geometry svg:viewBox="0 0 21600 21600" draw:type="rectangle" draw:enhanced-path="M 0 0 L 21600 0 21600 21600 0 21600 0 0 Z N"/>
        </draw:custom-shape>
        <draw:connector draw:style-name="gr20" draw:text-style-name="P19" draw:layer="layout" draw:type="lines" svg:x1="83.95cm" svg:y1="106.75cm" svg:x2="83.95cm" svg:y2="108.25cm" draw:start-shape="id49" draw:start-glue-point="2" draw:end-shape="id50" draw:end-glue-point="0" svg:d="M83950 106750v541 418 541" svg:viewBox="0 0 1 1501">
          <text:p/>
        </draw:connector>
        <draw:connector draw:style-name="gr49" draw:text-style-name="P16" draw:layer="layout" draw:type="curve" svg:x1="75.75cm" svg:y1="101.5cm" svg:x2="70.5cm" svg:y2="36.1cm" draw:start-shape="id51" draw:start-glue-point="3" draw:end-shape="id52" draw:end-glue-point="2" svg:d="M75750 101500c-3500 0-5250-21800-5250-65400" svg:viewBox="0 0 5251 65401">
          <text:p/>
        </draw:connector>
        <draw:connector draw:style-name="gr20" draw:text-style-name="P19" draw:layer="layout" draw:type="lines" svg:x1="70.5cm" svg:y1="31.1cm" svg:x2="70.5cm" svg:y2="32.85cm" draw:start-shape="id40" draw:start-glue-point="2" draw:end-shape="id52" draw:end-glue-point="0" svg:d="M70500 31100v541 668 541" svg:viewBox="0 0 1 1751">
          <text:p/>
        </draw:connector>
        <draw:custom-shape draw:style-name="gr58" draw:text-style-name="P33" xml:id="id53" draw:id="id53" draw:layer="layout" svg:width="9.75cm" svg:height="3.25cm" svg:x="79.075cm" svg:y="94.75cm">
          <text:p text:style-name="P32"><text:span text:style-name="T9">qui</text:span><text:span text:style-name="T9">t_a</text:span><text:span text:style-name="T9">cc(</text:span><text:span text:style-name="T9">)</text:span></text:p>
          <text:p text:style-name="P32"><text:span text:style-name="T4"/></text:p>
          <text:p text:style-name="P32"><text:span text:style-name="T4">Enl</text:span><text:span text:style-name="T4">èv</text:span><text:span text:style-name="T4">e </text:span><text:span text:style-name="T4">les </text:span><text:span text:style-name="T4">acc</text:span><text:span text:style-name="T4">ent</text:span><text:span text:style-name="T4">s </text:span><text:span text:style-name="T4">de</text:span></text:p>
          <text:p text:style-name="P20"><text:span text:style-name="T24">av</text:span><text:span text:style-name="T24">ec</text:span><text:span text:style-name="T24">_a</text:span><text:span text:style-name="T24">cc</text:span><text:span text:style-name="T21"> </text:span><text:span text:style-name="T21">et </text:span><text:span text:style-name="T21">cré</text:span><text:span text:style-name="T21">e </text:span><text:span text:style-name="T24">sa</text:span><text:span text:style-name="T24">ns</text:span><text:span text:style-name="T24">_a</text:span><text:span text:style-name="T24">cc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0" draw:text-style-name="P19" draw:layer="layout" draw:type="lines" svg:x1="83.95cm" svg:y1="93.5cm" svg:x2="83.95cm" svg:y2="94.75cm" draw:start-shape="id48" draw:start-glue-point="2" draw:end-shape="id53" draw:end-glue-point="0" svg:d="M83950 93500v541 168 541" svg:viewBox="0 0 1 1251">
          <text:p/>
        </draw:connector>
        <draw:custom-shape draw:style-name="gr61" draw:text-style-name="P21" xml:id="id54" draw:id="id54" draw:layer="layout" svg:width="10.25cm" svg:height="1.75cm" svg:x="78.825cm" svg:y="99.25cm">
          <text:p text:style-name="P20"><text:span text:style-name="T24">nom_mp3</text:span><text:span text:style-name="T21"> = </text:span><text:span text:style-name="T24">sans_acc</text:span><text:span text:style-name="T4"> </text:span><text:span text:style-name="T29">+</text:span><text:span text:style-name="T4"> « .mp3 »</text:span></text:p>
          <draw:enhanced-geometry svg:viewBox="0 0 21600 21600" draw:type="rectangle" draw:enhanced-path="M 0 0 L 21600 0 21600 21600 0 21600 0 0 Z N"/>
        </draw:custom-shape>
        <draw:connector draw:style-name="gr20" draw:text-style-name="P19" draw:layer="layout" draw:type="lines" svg:x1="83.95cm" svg:y1="98cm" svg:x2="83.95cm" svg:y2="99.25cm" draw:start-shape="id53" draw:start-glue-point="2" draw:end-shape="id54" draw:end-glue-point="0" svg:d="M83950 98000v542 167 541" svg:viewBox="0 0 1 1251">
          <text:p/>
        </draw:connector>
        <draw:custom-shape draw:style-name="gr62" draw:text-style-name="P21" xml:id="id55" draw:id="id55" draw:layer="layout" svg:width="10.25cm" svg:height="1.75cm" svg:x="78.825cm" svg:y="102cm">
          <text:p text:style-name="P20"><text:span text:style-name="T24">TaifunPlayer1.</text:span><text:span text:style-name="T30">source</text:span><text:span text:style-name="T21"> = </text:span><text:span text:style-name="T24">nom_mp3</text:span></text:p>
          <draw:enhanced-geometry svg:viewBox="0 0 21600 21600" draw:type="rectangle" draw:enhanced-path="M 0 0 L 21600 0 21600 21600 0 21600 0 0 Z N"/>
        </draw:custom-shape>
        <draw:connector draw:style-name="gr20" draw:text-style-name="P19" draw:layer="layout" draw:type="lines" svg:x1="83.95cm" svg:y1="101cm" svg:x2="83.95cm" svg:y2="102cm" draw:start-shape="id54" draw:start-glue-point="2" draw:end-shape="id55" draw:end-glue-point="0" svg:d="M83950 101000v541-82 541" svg:viewBox="0 0 1 1001">
          <text:p/>
        </draw:connector>
        <draw:custom-shape draw:style-name="gr63" draw:text-style-name="P21" xml:id="id49" draw:id="id49" draw:layer="layout" svg:width="8.25cm" svg:height="1.75cm" svg:x="79.825cm" svg:y="105cm">
          <text:p text:style-name="P20"><text:span text:style-name="T24">TaifunPlayer1.</text:span><text:span text:style-name="T30">Commencer</text:span></text:p>
          <draw:enhanced-geometry svg:viewBox="0 0 21600 21600" draw:type="rectangle" draw:enhanced-path="M 0 0 L 21600 0 21600 21600 0 21600 0 0 Z N"/>
        </draw:custom-shape>
        <draw:connector draw:style-name="gr20" draw:text-style-name="P19" draw:layer="layout" draw:type="lines" svg:x1="83.95cm" svg:y1="103.75cm" svg:x2="83.95cm" svg:y2="105cm" draw:start-shape="id55" draw:start-glue-point="2" draw:end-shape="id49" draw:end-glue-point="0" svg:d="M83950 103750v541 168 541" svg:viewBox="0 0 1 1251">
          <text:p/>
        </draw:connector>
        <draw:custom-shape draw:style-name="gr12" draw:text-style-name="P35" xml:id="id50" draw:id="id50" draw:layer="layout" svg:width="13.5cm" svg:height="3cm" svg:x="77.2cm" svg:y="108.25cm">
          <text:p text:style-name="P34"><text:span text:style-name="T9">Text2list()</text:span></text:p>
          <text:p text:style-name="P34"><text:span text:style-name="T10">Créer tableau </text:span><text:span text:style-name="T5">tabChar</text:span></text:p>
          <text:p text:style-name="P34"><text:span text:style-name="T10">à partir des </text:span><text:span text:style-name="T10">lettres de </text:span><text:span text:style-name="T5">Contenu_Q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64" draw:text-style-name="P21" xml:id="id56" draw:id="id56" draw:layer="layout" svg:width="10.25cm" svg:height="1.75cm" svg:x="78.825cm" svg:y="112.5cm">
          <text:p text:style-name="P20"><text:span text:style-name="T24">code_lang</text:span><text:span text:style-name="T31"> = </text:span><text:span text:style-name="T31">2</text:span><text:span text:style-name="T32">e</text:span><text:span text:style-name="T31"> et 3</text:span><text:span text:style-name="T32">e</text:span><text:span text:style-name="T31"> chr de </text:span><text:span text:style-name="T24">tabChar</text:span></text:p>
          <draw:enhanced-geometry svg:viewBox="0 0 21600 21600" draw:type="rectangle" draw:enhanced-path="M 0 0 L 21600 0 21600 21600 0 21600 0 0 Z N"/>
        </draw:custom-shape>
        <draw:custom-shape draw:style-name="gr65" draw:text-style-name="P21" xml:id="id57" draw:id="id57" draw:layer="layout" svg:width="10.25cm" svg:height="1.75cm" svg:x="78.825cm" svg:y="115.5cm">
          <text:p text:style-name="P20"><text:span text:style-name="T24">phrase</text:span><text:span text:style-name="T21"> = </text:span><text:span text:style-name="T24">Contenu_</text:span><text:span text:style-name="T24">QR</text:span><text:span text:style-name="T33"> </text:span><text:span text:style-name="T34">-</text:span><text:span text:style-name="T21"> * </text:span><text:span text:style-name="T24">code_lang</text:span><text:span text:style-name="T4"> </text:span><text:span text:style-name="T4">*</text:span></text:p>
          <draw:enhanced-geometry svg:viewBox="0 0 21600 21600" draw:type="rectangle" draw:enhanced-path="M 0 0 L 21600 0 21600 21600 0 21600 0 0 Z N"/>
        </draw:custom-shape>
        <draw:connector draw:style-name="gr20" draw:text-style-name="P19" draw:layer="layout" draw:type="lines" svg:x1="83.95cm" svg:y1="111.25cm" svg:x2="83.95cm" svg:y2="112.5cm" draw:start-shape="id50" draw:start-glue-point="2" draw:end-shape="id56" draw:end-glue-point="0" svg:d="M83950 111250v542 167 541" svg:viewBox="0 0 1 1251">
          <text:p/>
        </draw:connector>
        <draw:connector draw:style-name="gr20" draw:text-style-name="P19" draw:layer="layout" draw:type="lines" svg:x1="83.95cm" svg:y1="114.25cm" svg:x2="83.95cm" svg:y2="115.5cm" draw:start-shape="id56" draw:start-glue-point="2" draw:end-shape="id57" draw:end-glue-point="0" svg:d="M83950 114250v541 168 541" svg:viewBox="0 0 1 1251">
          <text:p/>
        </draw:connector>
        <draw:frame draw:style-name="gr34" draw:text-style-name="P28" xml:id="id58" draw:id="id58" draw:layer="layout" svg:width="7.05cm" svg:height="2cm" svg:x="91.95cm" svg:y="114.75cm">
          <draw:text-box>
            <text:p text:style-name="P27"><text:span text:style-name="T35">phrase</text:span><text:span text:style-name="T18"> est affichée</text:span></text:p>
            <text:p text:style-name="P27"><text:span text:style-name="T18">Il faut donc enlever le préfixe</text:span></text:p>
          </draw:text-box>
        </draw:frame>
        <draw:connector draw:style-name="gr31" draw:text-style-name="P16" draw:layer="layout" draw:type="curve" svg:x1="91.95cm" svg:y1="115.75cm" svg:x2="89.075cm" svg:y2="116.375cm" draw:start-shape="id58" draw:start-glue-point="3" draw:end-shape="id57" draw:end-glue-point="1" svg:d="M91950 115750c-2125 0-688 625-2875 625" svg:viewBox="0 0 2876 626">
          <text:p/>
        </draw:connector>
        <draw:custom-shape draw:style-name="gr66" draw:text-style-name="P21" xml:id="id42" draw:id="id42" draw:layer="layout" svg:width="10.5cm" svg:height="1.5cm" svg:x="81.2cm" svg:y="29.75cm">
          <text:p text:style-name="P20"><text:span text:style-name="T5">phrase</text:span><text:span text:style-name="T4"> = </text:span><text:span text:style-name="T5">Contenu_QR</text:span><text:span text:style-name="T10"> </text:span><text:span text:style-name="T29">-</text:span><text:span text:style-name="T10"> </text:span><text:span text:style-name="T10">-bm-</text:span></text:p>
          <draw:enhanced-geometry svg:viewBox="0 0 21600 21600" draw:type="rectangle" draw:enhanced-path="M 0 0 L 21600 0 21600 21600 0 21600 0 0 Z N"/>
        </draw:custom-shape>
        <draw:g draw:style-name="gr1" xml:id="id65" draw:id="id65">
          <draw:custom-shape draw:style-name="gr67" draw:text-style-name="P1" draw:layer="layout" svg:width="24.75cm" svg:height="20.75cm" svg:x="75.75cm" svg:y="60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3" draw:layer="layout" svg:width="24.75cm" svg:height="0.923cm" svg:x="75.75cm" svg:y="60.75cm">
            <text:p text:style-name="P2"><text:span text:style-name="T1">Borel_M() </text:span><text:span text:style-name="T28">(va chercher le </text:span><text:span text:style-name="T28">mp3 qui correspond à </text:span><text:span text:style-name="T28">‘phrase’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9" draw:text-style-name="P33" xml:id="id59" draw:id="id59" draw:layer="layout" svg:width="5.75cm" svg:height="2.75cm" svg:x="80.2cm" svg:y="63cm">
          <text:p text:style-name="P32"><text:span text:style-name="T4">Reçoit</text:span></text:p>
          <text:p text:style-name="P32"><text:span text:style-name="T5">phr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9" draw:layer="layout" draw:type="lines" svg:x1="83.075cm" svg:y1="65.75cm" svg:x2="83.075cm" svg:y2="67.411cm" draw:start-shape="id59" draw:start-glue-point="8" draw:end-shape="id60" draw:end-glue-point="4" svg:d="M83075 65750v542 578 541" svg:viewBox="0 0 1 1662">
          <text:p/>
        </draw:connector>
        <draw:custom-shape draw:style-name="gr51" draw:text-style-name="P15" xml:id="id60" draw:id="id60" draw:layer="layout" svg:width="9.95cm" svg:height="3.55cm" svg:x="78.1cm" svg:y="67.411cm">
          <text:p text:style-name="P4"><text:span text:style-name="T3">‘</text:span><text:span text:style-name="T5">phrase</text:span><text:span text:style-name="T3">’ est présent dans </text:span><text:span text:style-name="T5">list_B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9" draw:layer="layout" draw:type="lines" svg:x1="88.05cm" svg:y1="69.186cm" svg:x2="92.325cm" svg:y2="69.186cm" draw:start-shape="id60" draw:start-glue-point="7" draw:end-shape="id61" draw:end-glue-point="3" svg:d="M88050 69186h542 3192 541" svg:viewBox="0 0 4276 1">
          <text:p text:style-name="P2"><text:span text:style-name="T13">non</text:span></text:p>
        </draw:connector>
        <draw:connector draw:style-name="gr16" draw:text-style-name="P19" draw:layer="layout" draw:type="lines" svg:x1="83.075cm" svg:y1="70.961cm" svg:x2="83.075cm" svg:y2="73.85cm" draw:start-shape="id60" draw:start-glue-point="6" draw:end-shape="id62" draw:end-glue-point="0" svg:d="M83075 70961v542 1806 541" svg:viewBox="0 0 1 2890">
          <text:p text:style-name="P2"><text:span text:style-name="T13">oui</text:span></text:p>
        </draw:connector>
        <draw:connector draw:style-name="gr20" draw:text-style-name="P19" draw:layer="layout" draw:type="lines" svg:x1="83.075cm" svg:y1="76.35cm" svg:x2="83.075cm" svg:y2="79.1cm" draw:start-shape="id62" draw:start-glue-point="2" draw:end-shape="id63" draw:end-glue-point="0" svg:d="M83075 76350v541 1668 541" svg:viewBox="0 0 1 2751">
          <text:p/>
        </draw:connector>
        <draw:custom-shape draw:style-name="gr69" draw:text-style-name="P37" xml:id="id61" draw:id="id61" draw:layer="layout" svg:width="5.25cm" svg:height="2.5cm" svg:x="92.325cm" svg:y="67.936cm">
          <text:p text:style-name="P36"><text:span text:style-name="T10">Mettre </text:span><text:span text:style-name="T5">Texte_à_parole</text:span><text:span text:style-name="T10"> :</text:span><text:span text:style-name="T10"><text:line-break/></text:span><text:span text:style-name="T5">langue</text:span><text:span text:style-name="T10"> : fr</text:span><text:span text:style-name="T10"><text:line-break/></text:span><text:span text:style-name="T5">Pays</text:span><text:span text:style-name="T10"> : FRA</text:span></text:p>
          <draw:enhanced-geometry svg:viewBox="0 0 21600 21600" draw:type="rectangle" draw:enhanced-path="M 0 0 L 21600 0 21600 21600 0 21600 0 0 Z N"/>
        </draw:custom-shape>
        <draw:custom-shape draw:style-name="gr70" draw:text-style-name="P37" xml:id="id62" draw:id="id62" draw:layer="layout" svg:width="10.25cm" svg:height="2.5cm" svg:x="77.95cm" svg:y="73.85cm">
          <text:p text:style-name="P36"><text:span text:style-name="T10">Renvoyer le nom du fichier + .mp3 </text:span><text:span text:style-name="T10">correspondant </text:span><text:span text:style-name="T5">TaifunPlayer1</text:span></text:p>
          <draw:enhanced-geometry svg:viewBox="0 0 21600 21600" draw:type="rectangle" draw:enhanced-path="M 0 0 L 21600 0 21600 21600 0 21600 0 0 Z N"/>
        </draw:custom-shape>
        <draw:custom-shape draw:style-name="gr71" draw:text-style-name="P37" xml:id="id63" draw:id="id63" draw:layer="layout" svg:width="8.5cm" svg:height="1.5cm" svg:x="78.825cm" svg:y="79.1cm">
          <text:p text:style-name="P36"><text:span text:style-name="T5">TaifunPlayer1</text:span><text:span text:style-name="T10">.Comm</text:span><text:span text:style-name="T10">encer</text:span></text:p>
          <draw:enhanced-geometry svg:viewBox="0 0 21600 21600" draw:type="rectangle" draw:enhanced-path="M 0 0 L 21600 0 21600 21600 0 21600 0 0 Z N"/>
        </draw:custom-shape>
        <draw:custom-shape draw:style-name="gr72" draw:text-style-name="P37" xml:id="id64" draw:id="id64" draw:layer="layout" svg:width="7cm" svg:height="2.75cm" svg:x="91.45cm" svg:y="74.35cm">
          <text:p text:style-name="P36"><text:span text:style-name="T5">Texte_à_parole</text:span><text:span text:style-name="T10">.Parler =</text:span></text:p>
          <text:p text:style-name="P36"><text:span text:style-name="T10">« Ce n'est pas un son Borel-</text:span><text:span text:style-name="T10">Maisonny »</text:span></text:p>
          <draw:enhanced-geometry svg:viewBox="0 0 21600 21600" draw:type="rectangle" draw:enhanced-path="M 0 0 L 21600 0 21600 21600 0 21600 0 0 Z N"/>
        </draw:custom-shape>
        <draw:connector draw:style-name="gr20" draw:text-style-name="P19" draw:layer="layout" draw:type="lines" svg:x1="94.95cm" svg:y1="70.436cm" svg:x2="94.95cm" svg:y2="74.35cm" draw:start-shape="id61" draw:start-glue-point="2" draw:end-shape="id64" draw:end-glue-point="0" svg:d="M94950 70436v541 2832 541" svg:viewBox="0 0 1 3915">
          <text:p/>
        </draw:connector>
        <draw:connector draw:style-name="gr49" draw:text-style-name="P16" draw:layer="layout" draw:type="curve" svg:x1="88.125cm" svg:y1="60.75cm" svg:x2="86.45cm" svg:y2="36.25cm" draw:start-shape="id65" draw:start-glue-point="0" draw:end-shape="id66" draw:end-glue-point="2" svg:d="M88125 60750c0-18375-1675-6125-1675-24500" svg:viewBox="0 0 1676 24501">
          <text:p/>
        </draw:connector>
        <draw:custom-shape draw:style-name="gr58" draw:text-style-name="P33" xml:id="id66" draw:id="id66" draw:layer="layout" svg:width="9.75cm" svg:height="3.25cm" svg:x="81.575cm" svg:y="33cm">
          <text:p text:style-name="P32"><text:span text:style-name="T9">Borel_M()</text:span></text:p>
          <text:p text:style-name="P32"><text:span text:style-name="T4"/></text:p>
          <text:p text:style-name="P20"><text:span text:style-name="T21">Lire le mp3 </text:span><text:span text:style-name="T21">correspond</text:span><text:span text:style-name="T21">ant à </text:span><text:span text:style-name="T5">phras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0" draw:text-style-name="P19" draw:layer="layout" draw:type="lines" svg:x1="86.45cm" svg:y1="31.25cm" svg:x2="86.45cm" svg:y2="33cm" draw:start-shape="id42" draw:start-glue-point="2" draw:end-shape="id66" draw:end-glue-point="0" svg:d="M86450 31250v541 668 541" svg:viewBox="0 0 1 1751">
          <text:p/>
        </draw:connector>
        <draw:custom-shape draw:style-name="gr73" draw:text-style-name="P21" xml:id="id44" draw:id="id44" draw:layer="layout" svg:width="10.5cm" svg:height="1.5cm" svg:x="96.975cm" svg:y="29.5cm">
          <text:p text:style-name="P20"><text:span text:style-name="T24">URL</text:span><text:span text:style-name="T31"> = </text:span><text:span text:style-name="T31">‘</text:span><text:span text:style-name="T36">https://dri</text:span><text:span text:style-name="T36">ve.google</text:span><text:span text:style-name="T36">.com/uc?</text:span><text:span text:style-name="T36">id=</text:span><text:span text:style-name="T27">’</text:span><text:span text:style-name="T37"> </text:span><text:span text:style-name="T34">+</text:span><text:span text:style-name="T27"> </text:span><text:span text:style-name="T27">(</text:span><text:span text:style-name="T24">Contenu</text:span><text:span text:style-name="T24">_QR</text:span><text:span text:style-name="T10"> </text:span><text:span text:style-name="T29">-</text:span><text:span text:style-name="T10"> </text:span><text:span text:style-name="T10">/gd/ )</text:span></text:p>
          <draw:enhanced-geometry svg:viewBox="0 0 21600 21600" draw:type="rectangle" draw:enhanced-path="M 0 0 L 21600 0 21600 21600 0 21600 0 0 Z N"/>
        </draw:custom-shape>
        <draw:connector draw:style-name="gr20" draw:text-style-name="P19" draw:layer="layout" draw:type="lines" svg:x1="102.225cm" svg:y1="31cm" svg:x2="102.225cm" svg:y2="32.75cm" draw:start-shape="id44" draw:start-glue-point="2" draw:end-shape="id67" draw:end-glue-point="0" svg:d="M102225 31000v541 668 541" svg:viewBox="0 0 1 1751">
          <text:p/>
        </draw:connector>
        <draw:custom-shape draw:style-name="gr74" draw:text-style-name="P37" xml:id="id67" draw:id="id67" draw:layer="layout" svg:width="10.5cm" svg:height="2.5cm" svg:x="96.975cm" svg:y="32.75cm">
          <text:p text:style-name="P36"><text:span text:style-name="T10">Aller chercher à cette adresse le </text:span><text:span text:style-name="T10">fichier qui sera nommé : </text:span><text:span text:style-name="T10">‘MAELtemp.mp3’</text:span></text:p>
          <draw:enhanced-geometry svg:viewBox="0 0 21600 21600" draw:type="rectangle" draw:enhanced-path="M 0 0 L 21600 0 21600 21600 0 21600 0 0 Z N"/>
        </draw:custom-shape>
        <draw:custom-shape draw:style-name="gr75" draw:text-style-name="P37" xml:id="id68" draw:id="id68" draw:layer="layout" svg:width="10.5cm" svg:height="1.5cm" svg:x="96.975cm" svg:y="36.75cm">
          <text:p text:style-name="P36"><text:span text:style-name="T10">Afficher une </text:span><text:span text:style-name="T10">animation de </text:span><text:span text:style-name="T10">chargement</text:span></text:p>
          <draw:enhanced-geometry svg:viewBox="0 0 21600 21600" draw:type="rectangle" draw:enhanced-path="M 0 0 L 21600 0 21600 21600 0 21600 0 0 Z N"/>
        </draw:custom-shape>
        <draw:custom-shape draw:style-name="gr76" draw:text-style-name="P37" xml:id="id69" draw:id="id69" draw:layer="layout" svg:width="10.5cm" svg:height="1.5cm" svg:x="96.975cm" svg:y="39.5cm">
          <text:p text:style-name="P36"><text:span text:style-name="T10">Afficher la section du lecteur audio</text:span></text:p>
          <draw:enhanced-geometry svg:viewBox="0 0 21600 21600" draw:type="rectangle" draw:enhanced-path="M 0 0 L 21600 0 21600 21600 0 21600 0 0 Z N"/>
        </draw:custom-shape>
        <draw:connector draw:style-name="gr20" draw:text-style-name="P19" draw:layer="layout" draw:type="lines" svg:x1="102.225cm" svg:y1="35.25cm" svg:x2="102.225cm" svg:y2="36.75cm" draw:start-shape="id67" draw:start-glue-point="2" draw:end-shape="id68" draw:end-glue-point="0" svg:d="M102225 35250v541 418 541" svg:viewBox="0 0 1 1501">
          <text:p/>
        </draw:connector>
        <draw:connector draw:style-name="gr20" draw:text-style-name="P19" draw:layer="layout" draw:type="lines" svg:x1="102.225cm" svg:y1="38.25cm" svg:x2="102.225cm" svg:y2="39.5cm" draw:start-shape="id68" draw:start-glue-point="2" draw:end-shape="id69" draw:end-glue-point="0" svg:d="M102225 38250v541 168 541" svg:viewBox="0 0 1 1251">
          <text:p/>
        </draw:connector>
        <draw:connector draw:style-name="gr16" draw:text-style-name="P19" xml:id="id72" draw:id="id72" draw:layer="layout" draw:type="lines" svg:x1="107.75cm" svg:y1="23.825cm" svg:x2="118cm" svg:y2="24cm" draw:start-shape="id43" draw:start-glue-point="7" draw:end-shape="id70" draw:end-glue-point="3" svg:d="M107750 23825h542l9167 175h541" svg:viewBox="0 0 10251 176">
          <text:p text:style-name="P2"><text:span text:style-name="T13">non</text:span></text:p>
        </draw:connector>
        <draw:frame draw:style-name="gr77" draw:text-style-name="P28" xml:id="id71" draw:id="id71" draw:layer="layout" svg:width="8.75cm" svg:height="1.75cm" svg:x="110.175cm" svg:y="19.25cm">
          <draw:text-box>
            <text:p text:style-name="P27"><text:span text:style-name="T18">Aucun préfixe valide trouvé.</text:span></text:p>
            <text:p text:style-name="P27"><text:span text:style-name="T18">(Considère qu’il n’y a pas de préfixe)</text:span></text:p>
          </draw:text-box>
        </draw:frame>
        <draw:connector draw:style-name="gr31" draw:text-style-name="P16" draw:layer="layout" draw:type="curve" svg:x1="114.55cm" svg:y1="21cm" svg:x2="112.875cm" svg:y2="23.912cm" draw:start-shape="id71" draw:end-shape="id72" draw:end-glue-point="0" svg:d="M114550 21000c0 2088-1675 632-1675 2912" svg:viewBox="0 0 1676 2913">
          <text:p/>
        </draw:connector>
        <draw:custom-shape draw:style-name="gr78" draw:text-style-name="P37" xml:id="id70" draw:id="id70" draw:layer="layout" svg:width="5.25cm" svg:height="2.5cm" svg:x="118cm" svg:y="22.75cm">
          <text:p text:style-name="P36"><text:span text:style-name="T10">Mettre </text:span><text:span text:style-name="T5">Texte_à_paro</text:span><text:span text:style-name="T5">le</text:span><text:span text:style-name="T10"> :</text:span><text:span text:style-name="T10"><text:line-break/></text:span><text:span text:style-name="T5">langue</text:span><text:span text:style-name="T10"> : fr</text:span><text:span text:style-name="T10"><text:line-break/></text:span><text:span text:style-name="T5">Pays</text:span><text:span text:style-name="T10"> : FRA</text:span></text:p>
          <draw:enhanced-geometry svg:viewBox="0 0 21600 21600" draw:type="rectangle" draw:enhanced-path="M 0 0 L 21600 0 21600 21600 0 21600 0 0 Z N"/>
        </draw:custom-shape>
        <draw:custom-shape draw:style-name="gr79" draw:text-style-name="P37" xml:id="id73" draw:id="id73" draw:layer="layout" svg:width="7cm" svg:height="2.75cm" svg:x="117.125cm" svg:y="27.5cm">
          <text:p text:style-name="P36"><text:span text:style-name="T24">phrase</text:span><text:span text:style-name="T27"> = </text:span><text:span text:style-name="T24">Contenu_</text:span><text:span text:style-name="T24">QR</text:span></text:p>
          <text:p text:style-name="P36"><text:span text:style-name="T10">« Ce n'est </text:span><text:span text:style-name="T10">pas un son </text:span><text:span text:style-name="T10">Borel-</text:span><text:span text:style-name="T10">Maisonny </text:span><text:span text:style-name="T10">»</text:span></text:p>
          <draw:enhanced-geometry svg:viewBox="0 0 21600 21600" draw:type="rectangle" draw:enhanced-path="M 0 0 L 21600 0 21600 21600 0 21600 0 0 Z N"/>
        </draw:custom-shape>
        <draw:connector draw:style-name="gr20" draw:text-style-name="P19" draw:layer="layout" draw:type="lines" svg:x1="120.625cm" svg:y1="25.25cm" svg:x2="120.625cm" svg:y2="27.5cm" draw:start-shape="id70" draw:start-glue-point="2" draw:end-shape="id73" draw:end-glue-point="0" svg:d="M120625 25250v541 1168 541" svg:viewBox="0 0 1 2251">
          <text:p/>
        </draw:connector>
        <draw:custom-shape draw:style-name="gr58" draw:text-style-name="P33" xml:id="id74" draw:id="id74" draw:layer="layout" svg:width="9.75cm" svg:height="3.25cm" svg:x="115.75cm" svg:y="32.5cm">
          <text:p text:style-name="P32"><text:span text:style-name="T9">Mode_dictée()</text:span></text:p>
          <text:p text:style-name="P32"><text:span text:style-name="T4"/></text:p>
          <text:p text:style-name="P32"><text:span text:style-name="T4">Détecte si #d</text:span></text:p>
          <text:p text:style-name="P32"><text:span text:style-name="T4">à la fin de </text:span><text:span text:style-name="T5">tab_ch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9" draw:text-style-name="P16" draw:layer="layout" draw:type="curve" svg:x1="27.775cm" svg:y1="104.078cm" svg:x2="115.75cm" svg:y2="34.125cm" draw:end-shape="id74" draw:end-glue-point="3" svg:d="M27775 104078c65575 0 21588-69953 87975-69953" svg:viewBox="0 0 87976 69954">
          <text:p/>
        </draw:connector>
        <draw:custom-shape draw:style-name="gr80" draw:text-style-name="P33" xml:id="id75" draw:id="id75" draw:layer="layout" svg:width="9.75cm" svg:height="4.75cm" svg:x="115.75cm" svg:y="37cm">
          <text:p text:style-name="P32"><text:span text:style-name="T9">Mode_épeler()</text:span></text:p>
          <text:p text:style-name="P32"><text:span text:style-name="T4"/></text:p>
          <text:p text:style-name="P32"><text:span text:style-name="T4">Détecter #e</text:span></text:p>
          <text:p text:style-name="P20"><text:span text:style-name="T38">Créer une liste contenant, pour </text:span><text:span text:style-name="T38">chaque Chr de tabChar un Str de ce </text:span><text:span text:style-name="T38">qu’il faut dire.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0" draw:text-style-name="P19" draw:layer="layout" draw:type="lines" svg:x1="120.625cm" svg:y1="30.25cm" svg:x2="120.625cm" svg:y2="32.5cm" draw:start-shape="id73" draw:start-glue-point="2" draw:end-shape="id74" draw:end-glue-point="0" svg:d="M120625 30250v541 1168 541" svg:viewBox="0 0 1 2251">
          <text:p/>
        </draw:connector>
        <draw:connector draw:style-name="gr20" draw:text-style-name="P19" draw:layer="layout" draw:type="lines" svg:x1="120.625cm" svg:y1="35.75cm" svg:x2="120.625cm" svg:y2="37cm" draw:start-shape="id74" draw:start-glue-point="2" draw:end-shape="id75" draw:end-glue-point="0" svg:d="M120625 35750v542 167 541" svg:viewBox="0 0 1 1251">
          <text:p/>
        </draw:connector>
        <draw:custom-shape draw:style-name="gr52" draw:text-style-name="P15" xml:id="id76" draw:id="id76" draw:layer="layout" svg:width="11.1cm" svg:height="3.55cm" svg:x="115.05cm" svg:y="43.15cm">
          <text:p text:style-name="P4"><text:span text:style-name="T3">Mode = ’epeler’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9" draw:layer="layout" draw:type="lines" svg:x1="120.6cm" svg:y1="46.7cm" svg:x2="120.5cm" svg:y2="49.75cm" draw:start-shape="id76" draw:start-glue-point="6" draw:end-shape="id77" draw:end-glue-point="0" svg:d="M120600 46700v542l-100 1967v541" svg:viewBox="0 0 101 3051">
          <text:p text:style-name="P2"><text:span text:style-name="T13">oui</text:span></text:p>
        </draw:connector>
        <draw:connector draw:style-name="gr16" draw:text-style-name="P19" draw:layer="layout" draw:type="lines" svg:x1="126.15cm" svg:y1="44.925cm" svg:x2="131cm" svg:y2="44.875cm" draw:start-shape="id76" draw:start-glue-point="7" draw:end-shape="id78" draw:end-glue-point="3" svg:d="M126150 44925h542l3767-50h541" svg:viewBox="0 0 4851 51">
          <text:p text:style-name="P2"><text:span text:style-name="T13">non</text:span></text:p>
        </draw:connector>
        <draw:connector draw:style-name="gr20" draw:text-style-name="P19" draw:layer="layout" draw:type="lines" svg:x1="120.625cm" svg:y1="41.75cm" svg:x2="120.6cm" svg:y2="43.15cm" draw:start-shape="id75" draw:start-glue-point="2" draw:end-shape="id76" draw:end-glue-point="4" svg:d="M120625 41750v542l-25 317v541" svg:viewBox="0 0 26 1401">
          <text:p/>
        </draw:connector>
        <draw:custom-shape draw:style-name="gr81" draw:text-style-name="P37" xml:id="id77" draw:id="id77" draw:layer="layout" svg:width="7cm" svg:height="2.25cm" svg:x="117cm" svg:y="49.75cm">
          <text:p text:style-name="P36"><text:span text:style-name="T5">Tex</text:span><text:span text:style-name="T5">te_</text:span><text:span text:style-name="T5">à_</text:span><text:span text:style-name="T5">par</text:span><text:span text:style-name="T5">ole</text:span><text:span text:style-name="T10">.Pa</text:span><text:span text:style-name="T10">rler </text:span><text:span text:style-name="T10">= </text:span></text:p>
          <text:p text:style-name="P36"><text:span text:style-name="T5">List</text:span><text:span text:style-name="T5">Ep</text:span><text:span text:style-name="T5">ela</text:span><text:span text:style-name="T5">ble</text:span></text:p>
          <draw:enhanced-geometry svg:viewBox="0 0 21600 21600" draw:type="rectangle" draw:enhanced-path="M 0 0 L 21600 0 21600 21600 0 21600 0 0 Z N"/>
        </draw:custom-shape>
        <draw:custom-shape draw:style-name="gr82" draw:text-style-name="P37" xml:id="id78" draw:id="id78" draw:layer="layout" svg:width="6.75cm" svg:height="2.25cm" svg:x="131cm" svg:y="43.75cm">
          <text:p text:style-name="P36"><text:span text:style-name="T5">Texte_à_parole</text:span><text:span text:style-name="T10">.Parler = </text:span></text:p>
          <text:p text:style-name="P36"><text:span text:style-name="T5">phrase</text:span></text:p>
          <draw:enhanced-geometry svg:viewBox="0 0 21600 21600" draw:type="rectangle" draw:enhanced-path="M 0 0 L 21600 0 21600 21600 0 21600 0 0 Z N"/>
        </draw:custom-shape>
        <draw:g draw:style-name="gr1" xml:id="id92" draw:id="id92">
          <draw:custom-shape draw:style-name="gr83" draw:text-style-name="P1" draw:layer="layout" svg:width="24.75cm" svg:height="31.25cm" svg:x="108.5cm" svg:y="60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3" draw:layer="layout" svg:width="24.75cm" svg:height="1cm" svg:x="108.5cm" svg:y="60.25cm">
            <text:p text:style-name="P2"><text:span text:style-name="T1">Mode_épeler() </text:span><text:span text:style-name="T28">( ???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9" draw:text-style-name="P33" xml:id="id79" draw:id="id79" draw:layer="layout" svg:width="5.75cm" svg:height="2.75cm" svg:x="112.95cm" svg:y="62.5cm">
          <text:p text:style-name="P32"><text:span text:style-name="T4">Reçoit</text:span></text:p>
          <text:p text:style-name="P32"><text:span text:style-name="T5">tabCh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9" draw:layer="layout" draw:type="lines" svg:x1="115.825cm" svg:y1="65.25cm" svg:x2="115.825cm" svg:y2="66.911cm" draw:start-shape="id79" draw:start-glue-point="8" draw:end-shape="id80" draw:end-glue-point="4" svg:d="M115825 65250v542 578 541" svg:viewBox="0 0 1 1662">
          <text:p/>
        </draw:connector>
        <draw:custom-shape draw:style-name="gr51" draw:text-style-name="P15" xml:id="id80" draw:id="id80" draw:layer="layout" svg:width="9.95cm" svg:height="3.55cm" svg:x="110.85cm" svg:y="66.911cm">
          <text:p text:style-name="P20"><text:span text:style-name="T3">Avant dernier caractère</text:span></text:p>
          <text:p text:style-name="P20"><text:span text:style-name="T3">de</text:span><text:span text:style-name="T5"> tabCha</text:span><text:span text:style-name="T3">r = "#"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9" draw:layer="layout" draw:type="lines" svg:x1="120.8cm" svg:y1="68.686cm" svg:x2="124cm" svg:y2="68.725cm" draw:start-shape="id80" draw:start-glue-point="7" draw:end-shape="id81" draw:end-glue-point="5" svg:d="M120800 68686h542l2117 39h541" svg:viewBox="0 0 3201 40">
          <text:p text:style-name="P2"><text:span text:style-name="T13">non</text:span></text:p>
        </draw:connector>
        <draw:connector draw:style-name="gr16" draw:text-style-name="P19" draw:layer="layout" draw:type="lines" svg:x1="115.825cm" svg:y1="70.461cm" svg:x2="115.875cm" svg:y2="73cm" draw:start-shape="id80" draw:start-glue-point="6" draw:end-shape="id82" draw:end-glue-point="4" svg:d="M115825 70461v542l50 1456v541" svg:viewBox="0 0 51 2540">
          <text:p text:style-name="P2"><text:span text:style-name="T13">oui</text:span></text:p>
        </draw:connector>
        <draw:custom-shape draw:style-name="gr84" draw:text-style-name="P37" xml:id="id83" draw:id="id83" draw:layer="layout" svg:width="5.55cm" svg:height="1.9cm" svg:x="125cm" svg:y="73.35cm">
          <text:p text:style-name="P36"><text:span text:style-name="T5">Mode</text:span><text:span text:style-name="T10"> = lecture</text:span></text:p>
          <draw:enhanced-geometry svg:viewBox="0 0 21600 21600" draw:type="rectangle" draw:enhanced-path="M 0 0 L 21600 0 21600 21600 0 21600 0 0 Z N"/>
        </draw:custom-shape>
        <draw:connector draw:style-name="gr16" draw:text-style-name="P19" draw:layer="layout" draw:type="lines" svg:x1="127.875cm" svg:y1="70.5cm" svg:x2="127.775cm" svg:y2="73.35cm" draw:start-shape="id81" draw:start-glue-point="6" draw:end-shape="id83" draw:end-glue-point="0" svg:d="M127875 70500v542l-100 1767v541" svg:viewBox="0 0 101 2851">
          <text:p text:style-name="P2"><text:span text:style-name="T13">oui</text:span></text:p>
        </draw:connector>
        <draw:g draw:style-name="gr1">
          <draw:custom-shape draw:style-name="gr67" draw:text-style-name="P1" draw:layer="layout" svg:width="24.75cm" svg:height="20.75cm" svg:x="75.75cm" svg:y="60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3" draw:layer="layout" svg:width="24.75cm" svg:height="0.923cm" svg:x="75.75cm" svg:y="60.75cm">
            <text:p text:style-name="P2"><text:span text:style-name="T1">Borel_M() </text:span><text:span text:style-name="T28">(va chercher le mp3 qui </text:span><text:span text:style-name="T28">correspond à ‘phrase’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9" draw:text-style-name="P33" xml:id="id84" draw:id="id84" draw:layer="layout" svg:width="5.75cm" svg:height="2.75cm" svg:x="80.2cm" svg:y="63cm">
          <text:p text:style-name="P32"><text:span text:style-name="T4">Reçoit</text:span></text:p>
          <text:p text:style-name="P32"><text:span text:style-name="T5">phr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9" draw:layer="layout" draw:type="lines" svg:x1="83.075cm" svg:y1="65.75cm" svg:x2="83.075cm" svg:y2="67.411cm" draw:start-shape="id84" draw:start-glue-point="8" draw:end-shape="id85" draw:end-glue-point="4" svg:d="M83075 65750v542 578 541" svg:viewBox="0 0 1 1662">
          <text:p/>
        </draw:connector>
        <draw:custom-shape draw:style-name="gr51" draw:text-style-name="P15" xml:id="id85" draw:id="id85" draw:layer="layout" svg:width="9.95cm" svg:height="3.55cm" svg:x="78.1cm" svg:y="67.411cm">
          <text:p text:style-name="P4"><text:span text:style-name="T3">‘</text:span><text:span text:style-name="T5">phrase</text:span><text:span text:style-name="T3">’ est présent dans </text:span><text:span text:style-name="T5">list_B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9" draw:layer="layout" draw:type="lines" svg:x1="88.05cm" svg:y1="69.186cm" svg:x2="92.325cm" svg:y2="69.186cm" draw:start-shape="id85" draw:start-glue-point="7" draw:end-shape="id86" draw:end-glue-point="3" svg:d="M88050 69186h542 3192 541" svg:viewBox="0 0 4276 1">
          <text:p text:style-name="P2"><text:span text:style-name="T13">non</text:span></text:p>
        </draw:connector>
        <draw:connector draw:style-name="gr16" draw:text-style-name="P19" draw:layer="layout" draw:type="lines" svg:x1="83.075cm" svg:y1="70.961cm" svg:x2="83.075cm" svg:y2="73.85cm" draw:start-shape="id85" draw:start-glue-point="6" draw:end-shape="id87" draw:end-glue-point="0" svg:d="M83075 70961v542 1806 541" svg:viewBox="0 0 1 2890">
          <text:p text:style-name="P2"><text:span text:style-name="T13">oui</text:span></text:p>
        </draw:connector>
        <draw:connector draw:style-name="gr20" draw:text-style-name="P19" draw:layer="layout" draw:type="lines" svg:x1="83.075cm" svg:y1="76.35cm" svg:x2="83.075cm" svg:y2="79.1cm" draw:start-shape="id87" draw:start-glue-point="2" draw:end-shape="id88" draw:end-glue-point="0" svg:d="M83075 76350v541 1668 541" svg:viewBox="0 0 1 2751">
          <text:p/>
        </draw:connector>
        <draw:custom-shape draw:style-name="gr85" draw:text-style-name="P37" xml:id="id86" draw:id="id86" draw:layer="layout" svg:width="5.25cm" svg:height="2.5cm" svg:x="92.325cm" svg:y="67.936cm">
          <text:p text:style-name="P36"><text:span text:style-name="T10">Mettre </text:span><text:span text:style-name="T5">Texte_à_parole</text:span><text:span text:style-name="T10"> :</text:span><text:span text:style-name="T10"><text:line-break/></text:span><text:span text:style-name="T5">langue</text:span><text:span text:style-name="T10"> : fr</text:span><text:span text:style-name="T10"><text:line-break/></text:span><text:span text:style-name="T5">Pays</text:span><text:span text:style-name="T10"> : FRA</text:span></text:p>
          <draw:enhanced-geometry svg:viewBox="0 0 21600 21600" draw:type="rectangle" draw:enhanced-path="M 0 0 L 21600 0 21600 21600 0 21600 0 0 Z N"/>
        </draw:custom-shape>
        <draw:custom-shape draw:style-name="gr86" draw:text-style-name="P37" xml:id="id87" draw:id="id87" draw:layer="layout" svg:width="10.25cm" svg:height="2.5cm" svg:x="77.95cm" svg:y="73.85cm">
          <text:p text:style-name="P36"><text:span text:style-name="T27">En</text:span><text:span text:style-name="T27">voy</text:span><text:span text:style-name="T27">er </text:span><text:span text:style-name="T27">le </text:span><text:span text:style-name="T27">no</text:span><text:span text:style-name="T27">m </text:span><text:span text:style-name="T27">du </text:span><text:span text:style-name="T27">fich</text:span><text:span text:style-name="T27">ier </text:span><text:span text:style-name="T27">+ .</text:span><text:span text:style-name="T27">mp</text:span><text:span text:style-name="T27">3 </text:span><text:span text:style-name="T27">cor</text:span><text:span text:style-name="T27">res</text:span><text:span text:style-name="T27">po</text:span><text:span text:style-name="T27">nd</text:span><text:span text:style-name="T27">ant </text:span><text:span text:style-name="T27">da</text:span><text:span text:style-name="T27">ns </text:span><text:span text:style-name="T5">list</text:span><text:span text:style-name="T5">_m</text:span><text:span text:style-name="T5">p3</text:span><text:span text:style-name="T5">_ </text:span><text:span text:style-name="T5">BM</text:span></text:p>
          <text:p text:style-name="P36"><text:span text:style-name="T10"><text:s/></text:span><text:span text:style-name="T10">à </text:span><text:span text:style-name="T5">Taif</text:span><text:span text:style-name="T5">un</text:span><text:span text:style-name="T5">Pla</text:span><text:span text:style-name="T5">yer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87" draw:text-style-name="P37" xml:id="id88" draw:id="id88" draw:layer="layout" svg:width="8.5cm" svg:height="1.5cm" svg:x="78.825cm" svg:y="79.1cm">
          <text:p text:style-name="P36"><text:span text:style-name="T5">TaifunPlayer</text:span><text:span text:style-name="T5">1</text:span><text:span text:style-name="T10">.Commenc</text:span><text:span text:style-name="T10">er</text:span></text:p>
          <draw:enhanced-geometry svg:viewBox="0 0 21600 21600" draw:type="rectangle" draw:enhanced-path="M 0 0 L 21600 0 21600 21600 0 21600 0 0 Z N"/>
        </draw:custom-shape>
        <draw:custom-shape draw:style-name="gr88" draw:text-style-name="P37" xml:id="id89" draw:id="id89" draw:layer="layout" svg:width="7cm" svg:height="2.75cm" svg:x="91.45cm" svg:y="74.35cm">
          <text:p text:style-name="P36"><text:span text:style-name="T5">Texte_à_parole</text:span><text:span text:style-name="T10">.Parler =</text:span></text:p>
          <text:p text:style-name="P36"><text:span text:style-name="T10">« Ce n'est pas un son Borel-</text:span><text:span text:style-name="T10">Maisonny »</text:span></text:p>
          <draw:enhanced-geometry svg:viewBox="0 0 21600 21600" draw:type="rectangle" draw:enhanced-path="M 0 0 L 21600 0 21600 21600 0 21600 0 0 Z N"/>
        </draw:custom-shape>
        <draw:connector draw:style-name="gr20" draw:text-style-name="P19" draw:layer="layout" draw:type="lines" svg:x1="94.95cm" svg:y1="70.436cm" svg:x2="94.95cm" svg:y2="74.35cm" draw:start-shape="id86" draw:start-glue-point="2" draw:end-shape="id89" draw:end-glue-point="0" svg:d="M94950 70436v541 2832 541" svg:viewBox="0 0 1 3915">
          <text:p/>
        </draw:connector>
        <draw:custom-shape draw:style-name="gr89" draw:text-style-name="P21" xml:id="id81" draw:id="id81" draw:layer="layout" svg:width="7.75cm" svg:height="3.55cm" svg:x="124cm" svg:y="66.95cm">
          <text:p text:style-name="P20"><text:span text:style-name="T12">Mode</text:span><text:span text:style-name="T3"> != dicté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0" draw:text-style-name="P21" xml:id="id82" draw:id="id82" draw:layer="layout" svg:width="9.25cm" svg:height="3.55cm" svg:x="111.25cm" svg:y="73cm">
          <text:p text:style-name="P20"><text:span text:style-name="T3">Dernier caractère</text:span></text:p>
          <text:p text:style-name="P20"><text:span text:style-name="T3">de</text:span><text:span text:style-name="T12"> tabCha</text:span><text:span text:style-name="T3">r = "e"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1" draw:text-style-name="P37" xml:id="id90" draw:id="id90" draw:layer="layout" svg:width="5.55cm" svg:height="1.9cm" svg:x="113.25cm" svg:y="78.75cm">
          <text:p text:style-name="P36"><text:span text:style-name="T5">Mode</text:span><text:span text:style-name="T10"> = epeler</text:span></text:p>
          <draw:enhanced-geometry svg:viewBox="0 0 21600 21600" draw:type="rectangle" draw:enhanced-path="M 0 0 L 21600 0 21600 21600 0 21600 0 0 Z N"/>
        </draw:custom-shape>
        <draw:custom-shape draw:style-name="gr92" draw:text-style-name="P37" xml:id="id91" draw:id="id91" draw:layer="layout" svg:width="7.25cm" svg:height="1.75cm" svg:x="112.45cm" svg:y="82.5cm">
          <text:p text:style-name="P36"><text:span text:style-name="T10">Enlever les deux </text:span><text:span text:style-name="T10">derniers chr de </text:span><text:span text:style-name="T5">tabChar</text:span></text:p>
          <draw:enhanced-geometry svg:viewBox="0 0 21600 21600" draw:type="rectangle" draw:enhanced-path="M 0 0 L 21600 0 21600 21600 0 21600 0 0 Z N"/>
        </draw:custom-shape>
        <draw:connector draw:style-name="gr16" draw:text-style-name="P19" draw:layer="layout" draw:type="lines" svg:x1="115.875cm" svg:y1="76.55cm" svg:x2="116.025cm" svg:y2="78.75cm" draw:start-shape="id82" draw:start-glue-point="6" draw:end-shape="id90" draw:end-glue-point="0" svg:d="M115875 76550v542l150 1117v541" svg:viewBox="0 0 151 2201">
          <text:p text:style-name="P2"><text:span text:style-name="T13">oui</text:span></text:p>
        </draw:connector>
        <draw:connector draw:style-name="gr20" draw:text-style-name="P19" draw:layer="layout" draw:type="lines" svg:x1="116.025cm" svg:y1="80.65cm" svg:x2="116.075cm" svg:y2="82.5cm" draw:start-shape="id90" draw:start-glue-point="2" draw:end-shape="id91" draw:end-glue-point="0" svg:d="M116025 80650v541l50 768v541" svg:viewBox="0 0 51 1851">
          <text:p/>
        </draw:connector>
        <draw:connector draw:style-name="gr49" draw:text-style-name="P16" draw:layer="layout" draw:type="curve" svg:x1="108.5cm" svg:y1="75.875cm" svg:x2="115.75cm" svg:y2="39.375cm" draw:start-shape="id92" draw:start-glue-point="3" draw:end-shape="id75" draw:end-glue-point="3" svg:d="M108500 75875c-811 0-4436-36500 7250-36500" svg:viewBox="0 0 8419 36501">
          <text:p/>
        </draw:connector>
        <draw:custom-shape draw:style-name="gr93" draw:text-style-name="P33" xml:id="id93" draw:id="id93" draw:layer="layout" svg:width="9.75cm" svg:height="3.75cm" svg:x="111.25cm" svg:y="86.5cm">
          <text:p text:style-name="P32"><text:span text:style-name="T9">rendListEpelable_fr</text:span></text:p>
          <text:p text:style-name="P32"><text:span text:style-name="T4"/></text:p>
          <text:p text:style-name="P32"><text:span text:style-name="T4">Créer une liste </text:span><text:span text:style-name="T4">contenant, pour </text:span><text:span text:style-name="T4">chaque Chr de </text:span><text:span text:style-name="T4">tabChar un Str de ce </text:span><text:span text:style-name="T4">qu’il faut dire.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0" draw:text-style-name="P19" draw:layer="layout" draw:type="lines" svg:x1="116.075cm" svg:y1="84.25cm" svg:x2="116.125cm" svg:y2="86.5cm" draw:start-shape="id91" draw:start-glue-point="2" draw:end-shape="id93" draw:end-glue-point="0" svg:d="M116075 84250v541l50 1168v541" svg:viewBox="0 0 51 2251">
          <text:p/>
        </draw:connector>
        <draw:g draw:style-name="gr1" xml:id="id96" draw:id="id96">
          <draw:custom-shape draw:style-name="gr94" draw:text-style-name="P1" draw:layer="layout" svg:width="15cm" svg:height="17.75cm" svg:x="108.25cm" svg:y="94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3" draw:layer="layout" svg:width="15cm" svg:height="0.997cm" svg:x="108.25cm" svg:y="94.25cm">
            <text:p text:style-name="P2"><text:span text:style-name="T1">Mode_épeler() </text:span><text:span text:style-name="T28">( Remplacer lettres </text:span><text:span text:style-name="T28">par ce qu’il faut dire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9" draw:text-style-name="P33" xml:id="id94" draw:id="id94" draw:layer="layout" svg:width="5.75cm" svg:height="2.75cm" svg:x="113cm" svg:y="96.5cm">
          <text:p text:style-name="P32"><text:span text:style-name="T10">Appelé par</text:span><text:span text:style-name="T5"> Mode_épe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9" draw:layer="layout" draw:type="lines" svg:x1="115.875cm" svg:y1="99.25cm" svg:x2="115.875cm" svg:y2="101cm" draw:start-shape="id94" draw:start-glue-point="8" draw:end-shape="id95" draw:end-glue-point="0" svg:d="M115875 99250v542 667 541" svg:viewBox="0 0 1 1751">
          <text:p/>
        </draw:connector>
        <draw:custom-shape draw:style-name="gr96" draw:text-style-name="P37" xml:id="id95" draw:id="id95" draw:layer="layout" svg:width="7.25cm" svg:height="1.75cm" svg:x="112.25cm" svg:y="101cm">
          <text:p text:style-name="P36"><text:span text:style-name="T10">Créer une liste </text:span><text:span text:style-name="T10">vide </text:span><text:span text:style-name="T5">ListEpelable</text:span></text:p>
          <draw:enhanced-geometry svg:viewBox="0 0 21600 21600" draw:type="rectangle" draw:enhanced-path="M 0 0 L 21600 0 21600 21600 0 21600 0 0 Z N"/>
        </draw:custom-shape>
        <draw:custom-shape draw:style-name="gr97" draw:text-style-name="P37" xml:id="id97" draw:id="id97" draw:layer="layout" svg:width="11.25cm" svg:height="5.75cm" svg:x="110.25cm" svg:y="104.75cm">
          <text:p text:style-name="P36"><text:span text:style-name="T10">Po</text:span><text:span text:style-name="T10">ur </text:span><text:span text:style-name="T10">ch</text:span><text:span text:style-name="T10">aq</text:span><text:span text:style-name="T10">ue </text:span><text:span text:style-name="T10">élé</text:span><text:span text:style-name="T10">me</text:span><text:span text:style-name="T10">nt </text:span><text:span text:style-name="T39">ite</text:span><text:span text:style-name="T39">m</text:span><text:span text:style-name="T10"> </text:span><text:span text:style-name="T10">de </text:span><text:span text:style-name="T5">tab</text:span><text:span text:style-name="T5">Ch</text:span><text:span text:style-name="T5">ar</text:span></text:p>
          <draw:enhanced-geometry svg:viewBox="0 0 21600 21600" draw:type="rectangle" draw:enhanced-path="M 0 0 L 21600 0 21600 21600 0 21600 0 0 Z N"/>
        </draw:custom-shape>
        <draw:custom-shape draw:style-name="gr98" draw:text-style-name="P37" xml:id="id99" draw:id="id99" draw:layer="layout" svg:width="10.5cm" svg:height="3.25cm" svg:x="110.625cm" svg:y="106.5cm">
          <text:p text:style-name="P36"><text:span text:style-name="T10">Ajo</text:span><text:span text:style-name="T10">ute</text:span><text:span text:style-name="T10">r à </text:span><text:span text:style-name="T5">List</text:span><text:span text:style-name="T5">Ep</text:span><text:span text:style-name="T5">ela</text:span><text:span text:style-name="T5">ble</text:span></text:p>
          <text:p text:style-name="P36"><text:span text:style-name="T10">la </text:span><text:span text:style-name="T10">val</text:span><text:span text:style-name="T10">eur </text:span><text:span text:style-name="T10">cor</text:span><text:span text:style-name="T10">res</text:span><text:span text:style-name="T10">po</text:span><text:span text:style-name="T10">nd</text:span><text:span text:style-name="T10">ant </text:span><text:span text:style-name="T10">à </text:span><text:span text:style-name="T39">ite</text:span><text:span text:style-name="T39">m</text:span></text:p>
          <text:p text:style-name="P36"><text:span text:style-name="T10">da</text:span><text:span text:style-name="T10">ns </text:span><text:span text:style-name="T10">le </text:span><text:span text:style-name="T10">dict</text:span><text:span text:style-name="T10">ion</text:span><text:span text:style-name="T10">nai</text:span><text:span text:style-name="T10">re </text:span><text:span text:style-name="T5">dict</text:span><text:span text:style-name="T5">_fr</text:span><text:span text:style-name="T5">a</text:span></text:p>
          <text:p text:style-name="P36"><text:span text:style-name="T10">{ K </text:span><text:span text:style-name="T10">: </text:span><text:span text:style-name="T10">V }</text:span></text:p>
          <draw:enhanced-geometry svg:viewBox="0 0 21600 21600" draw:type="rectangle" draw:enhanced-path="M 0 0 L 21600 0 21600 21600 0 21600 0 0 Z N"/>
        </draw:custom-shape>
        <draw:connector draw:style-name="gr49" draw:text-style-name="P16" draw:layer="layout" draw:type="curve" draw:line-skew="-3.189cm" svg:x1="111.25cm" svg:y1="88.375cm" svg:x2="108.25cm" svg:y2="103.125cm" draw:start-shape="id93" draw:start-glue-point="3" draw:end-shape="id96" draw:end-glue-point="3" svg:d="M111250 88375c-10095 0-8595 14750-3000 14750" svg:viewBox="0 0 7398 14751">
          <text:p/>
        </draw:connector>
        <draw:connector draw:style-name="gr20" draw:text-style-name="P19" draw:layer="layout" draw:type="lines" svg:x1="115.875cm" svg:y1="102.75cm" svg:x2="115.875cm" svg:y2="104.75cm" draw:start-shape="id95" draw:start-glue-point="2" draw:end-shape="id97" draw:end-glue-point="0" svg:d="M115875 102750v541 918 541" svg:viewBox="0 0 1 2001">
          <text:p/>
        </draw:connector>
        <draw:custom-shape draw:style-name="gr99" draw:text-style-name="P21" xml:id="id98" draw:id="id98" draw:layer="layout" svg:width="8.5cm" svg:height="7.75cm" svg:x="127.75cm" svg:y="97.75cm">
          <text:p text:style-name="P20"><text:span text:style-name="T5">dict_fra <text:s text:c="10"/></text:span></text:p>
          <text:p text:style-name="P20"><text:span text:style-name="T5"/></text:p>
          <text:p text:style-name="P20"><text:span text:style-name="T10">chr : ‘texte à dire’ <text:s text:c="9"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00" draw:text-style-name="P16" draw:layer="layout" draw:type="curve" svg:x1="127.75cm" svg:y1="101.625cm" svg:x2="121.125cm" svg:y2="108.125cm" draw:start-shape="id98" draw:start-glue-point="5" draw:end-shape="id99" draw:end-glue-point="1" svg:d="M127750 101625c-4968 0-1656 6500-6625 6500" svg:viewBox="0 0 6626 6501">
          <text:p/>
        </draw:connector>
        <draw:custom-shape draw:style-name="gr101" draw:text-style-name="P21" xml:id="id100" draw:id="id100" draw:layer="layout" svg:width="8.5cm" svg:height="7.75cm" svg:x="60.75cm" svg:y="99cm">
          <text:p text:style-name="P20"><text:span text:style-name="T5">quit_acc <text:s text:c="10"/></text:span></text:p>
          <text:p text:style-name="P20"><text:span text:style-name="T5"/></text:p>
          <text:p text:style-name="P20"><text:span text:style-name="T10">‘</text:span><text:span text:style-name="T10">à’ : ‘a’ <text:s text:c="9"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00" draw:text-style-name="P16" draw:layer="layout" draw:type="curve" svg:x1="79.075cm" svg:y1="96.375cm" svg:x2="65cm" svg:y2="99cm" draw:start-shape="id53" draw:start-glue-point="3" draw:end-shape="id100" draw:end-glue-point="4" svg:d="M79075 96375c-9384 0-14075 875-14075 2625" svg:viewBox="0 0 14076 2626">
          <text:p/>
        </draw:connector>
        <draw:frame draw:style-name="gr102" draw:text-style-name="P24" xml:id="id102" draw:id="id102" draw:layer="layout" svg:width="7.25cm" svg:height="2.958cm" svg:x="62cm" svg:y="89.542cm">
          <draw:text-box>
            <text:p text:style-name="P23"><text:span text:style-name="T16">Accommodation aux limites de MIT App </text:span><text:span text:style-name="T16">Inventor</text:span></text:p>
            <text:p text:style-name="P23"><text:span text:style-name="T16">→ </text:span><text:span text:style-name="T16">Il n’accepte pas les noms de fichiers avec </text:span><text:span text:style-name="T16">accents...</text:span></text:p>
          </draw:text-box>
        </draw:frame>
        <draw:connector draw:style-name="gr31" draw:text-style-name="P16" draw:layer="layout" draw:type="curve" svg:x1="58.25cm" svg:y1="68.145cm" svg:x2="60.25cm" svg:y2="71.6cm" draw:start-shape="id101" draw:start-glue-point="2" svg:d="M58250 68145c0 2967 2000 1240 2000 3455" svg:viewBox="0 0 2001 3456">
          <text:p/>
        </draw:connector>
        <draw:connector draw:style-name="gr31" draw:text-style-name="P16" draw:layer="layout" draw:type="curve" svg:x1="69.25cm" svg:y1="91.021cm" svg:x2="79.075cm" svg:y2="96.375cm" draw:start-shape="id102" draw:start-glue-point="1" draw:end-shape="id53" draw:end-glue-point="3" svg:d="M69250 91021c7338 0 2426 5354 9825 5354" svg:viewBox="0 0 9826 5355">
          <text:p/>
        </draw:connector>
        <draw:custom-shape draw:style-name="gr103" draw:text-style-name="P21" xml:id="id104" draw:id="id104" draw:layer="layout" svg:width="10.75cm" svg:height="7.75cm" svg:x="70.75cm" svg:y="46.75cm">
          <text:p text:style-name="P20"><text:span text:style-name="T5"/></text:p>
          <text:p text:style-name="P20"><text:span text:style-name="T5">list_BM <text:s text:c="10"/></text:span></text:p>
          <text:p text:style-name="P20"><text:span text:style-name="T5"/></text:p>
          <text:p text:style-name="P20"><text:span text:style-name="T10">‘</text:span><text:span text:style-name="T10">a’, ‘i’, ‘o’, ‘é’, ‘u’, ‘e’, ‘f’, ‘s’… <text:s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04" draw:text-style-name="P21" xml:id="id103" draw:id="id103" draw:layer="layout" svg:width="10.75cm" svg:height="7.75cm" svg:x="70.5cm" svg:y="50.5cm">
          <text:p text:style-name="P20"><text:span text:style-name="T5"/></text:p>
          <text:p text:style-name="P20"><text:span text:style-name="T5">list_mp3_ BM <text:s text:c="10"/></text:span></text:p>
          <text:p text:style-name="P20"><text:span text:style-name="T5"/></text:p>
          <text:p text:style-name="P20"><text:span text:style-name="T10">*fr*A, *fr*I, *fr*O, -bm-Eac,</text:span></text:p>
          <text:p text:style-name="P20"><text:span text:style-name="T10">*fr*U, *fr*E, -bm-F, -bm-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00" draw:text-style-name="P16" draw:layer="layout" draw:type="curve" svg:x1="77.95cm" svg:y1="75.1cm" svg:x2="70.5cm" svg:y2="54.375cm" draw:start-shape="id87" draw:start-glue-point="3" draw:end-shape="id103" draw:end-glue-point="5" svg:d="M77950 75100c-11986 0-8261-20725-7450-20725" svg:viewBox="0 0 8635 20726">
          <text:p/>
        </draw:connector>
        <draw:connector draw:style-name="gr100" draw:text-style-name="P16" draw:layer="layout" draw:type="curve" svg:x1="78.1cm" svg:y1="69.186cm" svg:x2="70.75cm" svg:y2="50.625cm" draw:start-shape="id85" draw:start-glue-point="5" draw:end-shape="id104" draw:end-glue-point="5" svg:d="M78100 69186c-11836 0-8161-18561-7350-18561" svg:viewBox="0 0 8527 18562">
          <text:p/>
        </draw:connector>
        <draw:frame draw:style-name="gr105" draw:text-style-name="P24" xml:id="id105" draw:id="id105" draw:layer="layout" svg:width="7.75cm" svg:height="2.003cm" svg:x="67.25cm" svg:y="70.997cm">
          <draw:text-box>
            <text:p text:style-name="P23"><text:span text:style-name="T16">SwichCase de MIT App Inventor</text:span></text:p>
            <text:p text:style-name="P23"><text:span text:style-name="T16">ne gère que des sous-string avec </text:span><text:span text:style-name="T16">séparateurs (,)</text:span></text:p>
          </draw:text-box>
        </draw:frame>
        <draw:connector draw:style-name="gr31" draw:text-style-name="P16" draw:layer="layout" draw:type="curve" svg:x1="75cm" svg:y1="71.998cm" svg:x2="78.1cm" svg:y2="69.186cm" draw:start-shape="id105" draw:start-glue-point="1" draw:end-shape="id85" svg:d="M75000 71998c2295 0 745-2812 3100-2812" svg:viewBox="0 0 3101 2813">
          <text:p/>
        </draw:connector>
        <draw:connector draw:style-name="gr31" draw:text-style-name="P16" draw:layer="layout" draw:type="curve" svg:x1="75cm" svg:y1="71.998cm" svg:x2="77.95cm" svg:y2="75.1cm" draw:start-shape="id105" draw:start-glue-point="1" draw:end-shape="id87" draw:end-glue-point="3" svg:d="M75000 71998c2182 0 708 3102 2950 3102" svg:viewBox="0 0 2951 3103">
          <text:p/>
        </draw:connector>
        <draw:frame draw:style-name="gr106" draw:text-style-name="P38" draw:layer="layout" svg:width="21.326cm" svg:height="4.036cm" svg:x="38.5cm" svg:y="121.25cm">
          <draw:text-box>
            <text:p><text:span text:style-name="T40">À</text:span><text:span text:style-name="T40"> </text:span><text:span text:style-name="T40">T</text:span><text:span text:style-name="T40">E</text:span><text:span text:style-name="T40">R</text:span><text:span text:style-name="T40">M</text:span><text:span text:style-name="T40">I</text:span><text:span text:style-name="T40">N</text:span><text:span text:style-name="T40">E</text:span><text:span text:style-name="T40">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0cm" fo:page-height="1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0:43:48.066212448</meta:creation-date>
    <dc:date>2024-09-29T07:20:59.362308438</dc:date>
    <meta:editing-duration>PT3H31M19S</meta:editing-duration>
    <meta:editing-cycles>144</meta:editing-cycles>
    <meta:generator>LibreOffice/24.8.1.2$Linux_X86_64 LibreOffice_project/480$Build-2</meta:generator>
    <meta:document-statistic meta:object-count="221"/>
  </office:meta>
</office:document-meta>
</file>