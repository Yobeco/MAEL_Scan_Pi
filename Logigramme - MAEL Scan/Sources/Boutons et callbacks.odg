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640EB62C3B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5cm" svg:stroke-color="#666666" draw:marker-start-width="0.252cm" draw:marker-end-width="0.252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86cm" fo:min-width="10.75cm" draw:shadow="hidden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424cm" fo:min-width="1.174cm" fo:wrap-option="wrap" draw:shadow="visible" draw:shadow-offset-x="0.106cm" draw:shadow-offset-y="0.106cm" draw:shadow-color="#000000" draw:shadow-opacity="50%" loext:shadow-blur="0.353cm" loext:decorative="false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.5cm" loext:decorative="false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08cm" fo:min-width="0.50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8.27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13.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2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fo:font-weight="bold"/>
    </style:style>
    <style:style style:name="P4" style:family="paragraph">
      <loext:graphic-properties draw:fill="solid" draw:fill-color="#000000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15pt" fo:letter-spacing="0.106cm" fo:font-weight="bold" style:font-size-asian="13pt" style:font-weight-asian="bold" style:font-size-complex="13pt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fo:color="#2a6099" loext:opacity="100%" fo:font-size="16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color="#ff0000" loext:opacity="100%" fo:font-size="14pt" style:font-size-asian="14pt" style:font-size-complex="14pt"/>
    </style:style>
    <style:style style:name="P10" style:family="paragraph">
      <style:paragraph-properties fo:margin-top="0.42cm" fo:margin-bottom="0.35cm" fo:text-align="right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loext:opacity="100%" fo:font-size="15pt" fo:letter-spacing="0.106cm" fo:font-weight="bold" style:font-size-asian="13pt" style:font-weight-asian="bold" style:font-size-complex="13pt" style:font-weight-complex="bold"/>
    </style:style>
    <style:style style:name="T2" style:family="text">
      <style:text-properties fo:color="#2a6099" loext:opacity="100%" fo:font-size="16pt" fo:font-weight="bold" style:font-size-asian="12pt" style:font-weight-asian="bold" style:font-size-complex="12pt" style:font-weight-complex="bold"/>
    </style:style>
    <style:style style:name="T3" style:family="text">
      <style:text-properties fo:color="#ff0000" loext:opacity="100%" fo:font-size="14pt" style:font-size-asian="14pt" style:font-size-complex="14pt"/>
    </style:style>
    <style:style style:name="T4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672cm" svg:height="25.939cm" svg:x="8.75cm" svg:y="1cm">
          <draw:image xlink:href="Pictures/10000000000002D000000640EB62C3B8.jpg" xlink:type="simple" xlink:show="embed" xlink:actuate="onLoad" draw:mime-type="image/jpeg">
            <text:p/>
          </draw:image>
        </draw:frame>
        <draw:custom-shape draw:style-name="gr2" draw:text-style-name="P2" draw:layer="layout" svg:width="11.25cm" svg:height="2.836cm" svg:x="9cm" svg:y="4.414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2" draw:layer="layout" svg:width="2cm" svg:height="2cm" svg:x="13.55cm" svg:y="4.75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3">
            <draw:custom-shape draw:style-name="gr5" draw:text-style-name="P3" draw:layer="layout" svg:width="1cm" svg:height="0.6cm" draw:transform="rotate (-1.5707963267949) translate (14.5cm 5.2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6" draw:text-style-name="P3" draw:layer="layout" svg:width="1cm" svg:height="0.2cm" draw:transform="rotate (-1.5707963267949) translate (14.78cm 5.2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1cm" svg:height="0.2cm" draw:transform="rotate (-1.5707963267949) translate (15.18cm 5.25cm)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3">
          <draw:custom-shape draw:style-name="gr4" draw:text-style-name="P2" draw:layer="layout" svg:width="2cm" svg:height="2cm" svg:x="9.95cm" svg:y="4.75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" draw:text-style-name="P4" draw:layer="layout" svg:width="1.3cm" svg:height="1.1cm" svg:x="10.25cm" svg:y="5.15cm">
            <text:p/>
            <draw:enhanced-geometry svg:viewBox="0 0 21600 21600" draw:text-areas="?f7 ?f0 21600 ?f2" draw:type="left-arrow" draw:modifiers="9713.52431712192 5317.98561151079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8" draw:text-style-name="P6" draw:layer="layout" svg:width="1.267cm" svg:height="0.839cm" svg:x="10.387cm" svg:y="5.277cm">
            <draw:text-box>
              <text:p text:style-name="P5"><text:span text:style-name="T1">5s</text:span></text:p>
            </draw:text-box>
          </draw:frame>
        </draw:g>
        <draw:g draw:style-name="gr3">
          <draw:custom-shape draw:style-name="gr4" draw:text-style-name="P2" draw:layer="layout" svg:width="2cm" svg:height="2cm" svg:x="17.15cm" svg:y="4.75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" draw:text-style-name="P4" draw:layer="layout" svg:width="1.3cm" svg:height="1.1cm" draw:transform="rotate (-3.14159265358979) translate (18.85cm 6.25cm)">
            <text:p/>
            <draw:enhanced-geometry svg:viewBox="0 0 21600 21600" draw:text-areas="?f7 ?f0 21600 ?f2" draw:type="left-arrow" draw:modifiers="9713.52431712192 5317.98561151079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9" draw:text-style-name="P6" draw:layer="layout" svg:width="1.267cm" svg:height="0.839cm" svg:x="17.587cm" svg:y="5.277cm">
            <draw:text-box>
              <text:p text:style-name="P5"><text:span text:style-name="T1">5s</text:span></text:p>
            </draw:text-box>
          </draw:frame>
        </draw:g>
        <draw:line draw:style-name="gr10" draw:text-style-name="P1" draw:layer="controls" svg:x1="8.501cm" svg:y1="11.751cm" svg:x2="12.501cm" svg:y2="10.001cm">
          <text:p/>
        </draw:line>
        <draw:frame draw:style-name="gr11" draw:text-style-name="P8" draw:layer="controls" svg:width="5.518cm" svg:height="0.962cm" svg:x="3.032cm" svg:y="11.251cm">
          <draw:text-box>
            <text:p text:style-name="P7"><text:span text:style-name="T2">class ScanButton</text:span></text:p>
          </draw:text-box>
        </draw:frame>
        <draw:line draw:style-name="gr10" draw:text-style-name="P1" draw:layer="controls" svg:x1="8.501cm" svg:y1="15.501cm" svg:x2="12.251cm" svg:y2="14.501cm">
          <text:p/>
        </draw:line>
        <draw:frame draw:style-name="gr12" draw:text-style-name="P8" draw:layer="controls" svg:width="5.799cm" svg:height="0.878cm" svg:x="2.551cm" svg:y="19.526cm">
          <draw:text-box>
            <text:p text:style-name="P7"><text:span text:style-name="T2">class SoundStretch</text:span></text:p>
          </draw:text-box>
        </draw:frame>
        <draw:line draw:style-name="gr10" draw:text-style-name="P1" draw:layer="controls" svg:x1="8.501cm" svg:y1="19.902cm" svg:x2="12.251cm" svg:y2="18.902cm">
          <text:p/>
        </draw:line>
        <draw:frame draw:style-name="gr13" draw:text-style-name="P9" draw:layer="controls" svg:width="13.8cm" svg:height="4.691cm" draw:transform="rotate (0.201585528605345) translate (2.318cm 22.23cm)">
          <draw:text-box>
            <text:p><text:span text:style-name="T3">+ Classes spéciales pour la version Python !</text:span></text:p>
            <text:p><text:span text:style-name="T3">(fonctions gérées par le téléphone pour la version Kotlin MP)</text:span><text:span text:style-name="T3"><text:line-break/></text:span><text:span text:style-name="T4">class Volume.up</text:span></text:p>
            <text:p><text:span text:style-name="T4">class Volume.down</text:span></text:p>
            <text:p><text:span text:style-name="T4">class ConfigWifi</text:span></text:p>
            <text:p><text:span text:style-name="T4">class Batery</text:span></text:p>
            <text:p><text:span text:style-name="T4">class Date</text:span></text:p>
            <text:p><text:span text:style-name="T4">class ShutDown</text:span></text:p>
          </draw:text-box>
        </draw:frame>
        <draw:line draw:style-name="gr10" draw:text-style-name="P1" draw:layer="controls" svg:x1="8.251cm" svg:y1="4.751cm" svg:x2="9.751cm" svg:y2="5.751cm">
          <text:p/>
        </draw:line>
        <draw:polyline draw:style-name="gr10" draw:text-style-name="P1" draw:layer="controls" svg:width="4.918cm" svg:height="2.012cm" draw:transform="rotate (0.463733982254893) translate (8.251cm 7.251cm)" svg:viewBox="0 0 4919 2013" draw:points="0,0 4025,2013 4919,1901">
          <text:p/>
        </draw:polyline>
        <draw:polyline draw:style-name="gr10" draw:text-style-name="P1" draw:layer="controls" svg:width="8.974cm" svg:height="2.905cm" draw:transform="rotate (0.41242130224626) translate (8.251cm 8.001cm)" svg:viewBox="0 0 8975 2906" draw:points="0,0 6642,2906 8975,2562">
          <text:p/>
        </draw:polyline>
        <draw:frame draw:style-name="gr12" draw:text-style-name="P8" draw:layer="controls" svg:width="5.846cm" svg:height="0.878cm" svg:x="2.404cm" svg:y="7.526cm">
          <draw:text-box>
            <text:p text:style-name="P7"><text:span text:style-name="T2">class Player.foward</text:span></text:p>
          </draw:text-box>
        </draw:frame>
        <draw:frame draw:style-name="gr14" draw:text-style-name="P8" draw:layer="controls" svg:width="7.523cm" svg:height="0.878cm" svg:x="0.727cm" svg:y="4.276cm">
          <draw:text-box>
            <text:p text:style-name="P10"><text:span text:style-name="T2">class Player.backward</text:span></text:p>
          </draw:text-box>
        </draw:frame>
        <draw:frame draw:style-name="gr12" draw:text-style-name="P8" draw:layer="controls" svg:width="5.601cm" svg:height="0.878cm" svg:x="2.55cm" svg:y="6.751cm">
          <draw:text-box>
            <text:p text:style-name="P7"><text:span text:style-name="T2">class Player.toggle</text:span></text:p>
          </draw:text-box>
        </draw:frame>
        <draw:frame draw:style-name="gr15" draw:text-style-name="P11" draw:layer="controls" svg:width="7.49cm" svg:height="0.962cm" svg:x="1.001cm" svg:y="1.039cm">
          <draw:text-box>
            <text:p>Version cellulaire (Kotlin)</text:p>
          </draw:text-box>
        </draw:frame>
        <draw:frame draw:style-name="gr12" draw:text-style-name="P8" draw:layer="controls" svg:width="5.047cm" svg:height="0.878cm" svg:x="3.204cm" svg:y="15.026cm">
          <draw:text-box>
            <text:p text:style-name="P7"><text:span text:style-name="T2">class Player.pla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protected="true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5T18:07:13.849055205</dc:date>
    <meta:editing-duration>PT4H40M54S</meta:editing-duration>
    <meta:editing-cycles>43</meta:editing-cycles>
    <meta:generator>LibreOffice/26.2.3.2$Linux_X86_64 LibreOffice_project/70e089b17412e4cb7773e41413306b17a2328c34</meta:generator>
    <meta:print-date>2026-05-15T17:50:09.475960580</meta:print-date>
    <meta:printed-by>Fichiers PDF</meta:printed-by>
    <meta:document-statistic meta:object-count="30"/>
  </office:meta>
</office:document-meta>
</file>