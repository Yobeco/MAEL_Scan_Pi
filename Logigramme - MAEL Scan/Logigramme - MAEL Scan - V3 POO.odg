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94000000870FE7A350.png" manifest:media-type="image/png"/>
  <manifest:file-entry manifest:full-path="Pictures/100004BA000052C9000052C925C069A8.svg" manifest:media-type="image/svg+xml"/>
  <manifest:file-entry manifest:full-path="Pictures/1000000100000215000001F2F8D3F60E.png" manifest:media-type="image/png"/>
  <manifest:file-entry manifest:full-path="Pictures/100008220000371F0000336B6A08EB3B.svg" manifest:media-type="image/svg+xml"/>
  <manifest:file-entry manifest:full-path="Pictures/10000001000002C3000002C393573DCE.png" manifest:media-type="image/png"/>
  <manifest:file-entry manifest:full-path="Pictures/10000638000052C9000052C96C1D549D.svg" manifest:media-type="image/svg+xml"/>
  <manifest:file-entry manifest:full-path="Pictures/10000001000002C3000002C3DAE16A6C.png" manifest:media-type="image/png"/>
  <manifest:file-entry manifest:full-path="Pictures/1000000000000AD700001800EF26A2F4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Mono" svg:font-family="'Noto Mono'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923cm, 0cm, 12.685cm, 0cm)" draw:image-opacity="100%" style:mirror="none" loext:decorative="false"/>
    </style:style>
    <style:style style:name="gr2" style:family="graphic">
      <style:graphic-properties style:writing-mode="lr-tb" loext:decorative="false"/>
    </style:style>
    <style:style style:name="gr3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473cm" fo:min-width="0.199cm" fo:wrap-option="wrap" draw:shadow="visible" draw:shadow-offset-x="0.035cm" draw:shadow-offset-y="0.035cm" draw:shadow-color="#000000" draw:shadow-opacity="50%" loext:shadow-blur="0.106cm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469cm" fo:min-width="0.227cm" fo:wrap-option="wrap" draw:shadow="visible" draw:shadow-offset-x="0.035cm" draw:shadow-offset-y="0.035cm" draw:shadow-color="#000000" draw:shadow-opacity="50%" loext:shadow-blur="0.106cm" loext:decorative="false"/>
    </style:style>
    <style:style style:name="gr6" style:family="graphic">
      <style:graphic-properties loext:decorative="false"/>
    </style:style>
    <style:style style:name="gr7" style:family="graphic" style:parent-style-name="standard">
      <style:graphic-properties draw:stroke="none" svg:stroke-color="#000000" svg:stroke-opacity="100%" draw:fill="solid" draw:fill-color="#808080" loext:fill-use-slide-background="false" draw:opacity="59%" draw:textarea-horizontal-align="center" draw:textarea-vertical-align="middle" draw:auto-grow-height="true" draw:auto-grow-width="false" fo:min-height="0.712cm" draw:shadow="hidden" loext:glow-radius="0cm" loext:decorative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1.286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92cm" loext:decorative="false"/>
      <style:paragraph-properties style:writing-mode="lr-tb"/>
    </style:style>
    <style:style style:name="gr10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0.986cm" fo:min-width="3.56cm" fo:padding-top="0.142cm" fo:padding-bottom="0.142cm" fo:padding-left="0.267cm" fo:padding-right="0.267cm" loext:decorative="false"/>
      <style:paragraph-properties style:writing-mode="lr-tb"/>
    </style:style>
    <style:style style:name="gr1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396cm" fo:min-width="3.1cm" fo:padding-top="0.142cm" fo:padding-bottom="0.142cm" fo:padding-left="0.267cm" fo:padding-right="0.267cm" loext:decorative="false"/>
      <style:paragraph-properties style:writing-mode="lr-tb"/>
    </style:style>
    <style:style style:name="gr1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16cm" fo:min-width="2.466cm" fo:padding-top="0.142cm" fo:padding-bottom="0.142cm" fo:padding-left="0.267cm" fo:padding-right="0.267cm" loext:decorative="false"/>
      <style:paragraph-properties style:writing-mode="lr-tb"/>
    </style:style>
    <style:style style:name="gr13" style:family="graphic" style:parent-style-name="objectwithoutfill">
      <style:graphic-properties svg:stroke-width="0.035cm" svg:stroke-color="#000000" draw:marker-start-width="0.252cm" draw:marker-end="Extrémités_20_de_20_flèche_20_1" draw:marker-end-width="0.25cm" draw:fill="none" draw:textarea-vertical-align="middle" fo:padding-top="0.142cm" fo:padding-bottom="0.142cm" fo:padding-left="0.267cm" fo:padding-right="0.267cm" loext:decorative="false"/>
    </style:style>
    <style:style style:name="gr14" style:family="graphic" style:parent-style-name="objectwithoutfill">
      <style:graphic-properties svg:stroke-width="0.035cm" svg:stroke-color="#000000" draw:marker-start-width="0.252cm" draw:marker-end="Extrémités_20_de_20_flèche_20_1" draw:marker-end-width="0.25cm" draw:fill="none" draw:textarea-vertical-align="middle" fo:padding-top="0.142cm" fo:padding-bottom="0.142cm" fo:padding-left="0.267cm" fo:padding-right="0.267cm" loext:decorative="false"/>
      <style:paragraph-properties style:writing-mode="lr-tb"/>
    </style:style>
    <style:style style:name="gr15" style:family="graphic" style:parent-style-name="objectwithoutfill">
      <style:graphic-properties svg:stroke-width="0.035cm" svg:stroke-color="#000000" draw:marker-start-width="0.252cm" draw:marker-end="Extrémités_20_de_20_flèche_20_1" draw:marker-end-width="0.25cm" draw:fill="none" draw:textarea-horizontal-align="center" draw:textarea-vertical-align="middle" fo:padding-top="0.142cm" fo:padding-bottom="0.142cm" fo:padding-left="0.267cm" fo:padding-right="0.267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solid" draw:fill-color="#808080" draw:opacity="59%"/>
      <style:paragraph-properties fo:text-align="center"/>
      <style:text-properties fo:color="#808080" loext:opacity="100%" fo:font-weight="bold" style:font-weight-asian="bold" style:font-weight-complex="bold"/>
    </style:style>
    <style:style style:name="P4" style:family="paragraph">
      <loext:graphic-properties draw:fill="none" draw:fill-color="#ffffff"/>
      <style:text-properties fo:font-size="13pt" style:font-size-asian="13pt" style:font-size-complex="13pt"/>
    </style:style>
    <style:style style:name="P5" style:family="paragraph">
      <loext:graphic-properties draw:fill="none" draw:fill-color="#ffffff"/>
    </style:style>
    <style:style style:name="P6" style:family="paragraph">
      <style:paragraph-properties fo:margin-left="0cm" fo:margin-right="0cm" fo:margin-top="0cm" fo:margin-bottom="0cm" fo:line-height="100%" fo:text-align="center" fo:text-indent="0cm"/>
    </style:style>
    <style:style style:name="P7" style:family="paragraph">
      <style:paragraph-properties fo:text-align="center"/>
      <style:text-properties fo:font-size="12pt"/>
    </style:style>
    <style:style style:name="P8" style:family="paragraph">
      <loext:graphic-properties draw:fill-color="#ffffff"/>
      <style:paragraph-properties fo:text-align="center"/>
      <style:text-properties fo:font-size="12pt"/>
    </style:style>
    <style:style style:name="P9" style:family="paragraph">
      <style:paragraph-properties fo:text-align="center"/>
      <style:text-properties fo:font-size="10pt" style:font-size-asian="10pt" style:font-size-complex="10pt"/>
    </style:style>
    <style:style style:name="P10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11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style:font-name="Noto Mono"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Noto Mono" fo:font-size="16pt" style:font-size-asian="16pt" style:font-size-complex="16pt"/>
    </style:style>
    <style:style style:name="T4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5.246cm" svg:height="7.907cm" svg:x="1.254cm" svg:y="1.231cm">
          <draw:image xlink:href="Pictures/1000000000000AD700001800EF26A2F4.jpg" xlink:type="simple" xlink:show="embed" xlink:actuate="onLoad" draw:mime-type="image/jpeg">
            <text:p/>
          </draw:image>
        </draw:frame>
        <draw:g draw:style-name="gr2">
          <draw:custom-shape draw:style-name="gr3" draw:text-style-name="P2" draw:layer="layout" svg:width="0.833cm" svg:height="0.857cm" svg:x="4.621cm" svg:y="9.338cm">
            <text:p/>
            <draw:enhanced-geometry svg:viewBox="0 0 21600 21600" draw:path-stretchpoint-x="10800" draw:path-stretchpoint-y="10800" draw:text-areas="?f3 ?f4 ?f5 ?f6" draw:type="round-rectangle" draw:modifiers="6012.5937031484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frame draw:style-name="gr4" draw:text-style-name="P1" draw:layer="layout" svg:width="0.573cm" svg:height="0.573cm" svg:x="4.756cm" svg:y="9.473cm">
            <draw:image xlink:href="Pictures/10000638000052C9000052C96C1D549D.svg" xlink:type="simple" xlink:show="embed" xlink:actuate="onLoad" draw:mime-type="image/svg+xml">
              <text:p/>
            </draw:image>
            <draw:image xlink:href="Pictures/10000001000002C3000002C393573DCE.png" xlink:type="simple" xlink:show="embed" xlink:actuate="onLoad" draw:mime-type="image/png"/>
          </draw:frame>
        </draw:g>
        <draw:g draw:style-name="gr2">
          <draw:custom-shape draw:style-name="gr5" draw:text-style-name="P2" draw:layer="layout" svg:width="0.865cm" svg:height="0.857cm" svg:x="2.121cm" svg:y="9.338cm">
            <text:p/>
            <draw:enhanced-geometry svg:viewBox="0 0 21600 21600" draw:path-stretchpoint-x="10800" draw:path-stretchpoint-y="10800" draw:text-areas="?f3 ?f4 ?f5 ?f6" draw:type="round-rectangle" draw:modifiers="6012.5937031484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frame draw:style-name="gr4" draw:text-style-name="P1" draw:layer="layout" svg:width="0.374cm" svg:height="0.349cm" svg:x="2.361cm" svg:y="9.586cm">
            <draw:image xlink:href="Pictures/100008220000371F0000336B6A08EB3B.svg" xlink:type="simple" xlink:show="embed" xlink:actuate="onLoad" draw:mime-type="image/svg+xml">
              <text:p/>
            </draw:image>
            <draw:image xlink:href="Pictures/1000000100000215000001F2F8D3F60E.png" xlink:type="simple" xlink:show="embed" xlink:actuate="onLoad" draw:mime-type="image/png"/>
          </draw:frame>
        </draw:g>
        <draw:g draw:style-name="gr2">
          <draw:custom-shape draw:style-name="gr5" draw:text-style-name="P2" draw:layer="layout" svg:width="0.865cm" svg:height="0.857cm" svg:x="3.387cm" svg:y="9.339cm">
            <text:p/>
            <draw:enhanced-geometry svg:viewBox="0 0 21600 21600" draw:path-stretchpoint-x="10800" draw:path-stretchpoint-y="10800" draw:text-areas="?f3 ?f4 ?f5 ?f6" draw:type="round-rectangle" draw:modifiers="6012.5937031484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frame draw:style-name="gr4" draw:text-style-name="P1" draw:layer="layout" svg:width="0.491cm" svg:height="0.491cm" svg:x="3.561cm" svg:y="9.528cm">
            <draw:image xlink:href="Pictures/100004BA000052C9000052C925C069A8.svg" xlink:type="simple" xlink:show="embed" xlink:actuate="onLoad" draw:mime-type="image/svg+xml">
              <text:p/>
            </draw:image>
            <draw:image xlink:href="Pictures/10000001000002C3000002C3DAE16A6C.png" xlink:type="simple" xlink:show="embed" xlink:actuate="onLoad" draw:mime-type="image/png"/>
          </draw:frame>
        </draw:g>
        <draw:g draw:style-name="gr6">
          <draw:path draw:style-name="gr7" draw:text-style-name="P3" draw:layer="layout" svg:width="0.391cm" svg:height="0.487cm" svg:x="2.73cm" svg:y="9.762cm" svg:viewBox="0 0 392 488" svg:d="M384 95c9 27 10 53 5 77-6 25-18 47-37 66s-44 33-76 43l-103 33 46 147-87 27-132-416 187-60c50-15 92-16 126-2 34 15 58 43 71 85zM297 124c-14-43-47-57-98-41l-90 29 43 135 92-30c24-7 41-19 50-35s10-35 3-58z">
            <text:p/>
          </draw:path>
          <draw:path draw:style-name="gr7" draw:text-style-name="P3" draw:layer="layout" svg:width="0.328cm" svg:height="0.537cm" svg:x="3.128cm" svg:y="9.71cm" svg:viewBox="0 0 329 538" svg:d="M220 525c-20 6-37 10-53 13l-19-60c11-1 21-4 29-6 12-4 21-9 28-15s12-15 15-26c4-10 6-27 7-50l-227-277 88-28 98 134c14 19 35 49 61 90l-2-31-3-75v-166l87-28-20 377c-4 46-12 80-26 102-13 21-34 37-63 46z">
            <text:p/>
          </draw:path>
          <draw:path draw:style-name="gr7" draw:text-style-name="P3" draw:layer="layout" svg:width="0.286cm" svg:height="0.406cm" svg:x="3.468cm" svg:y="9.593cm" svg:viewBox="0 0 287 407" svg:d="M220 402c-25 8-45 7-63-2-17-9-30-27-39-54l-60-188-40 12-18-56 45-14 2-83 52-17 24 75 60-19 18 56-61 20 53 165c5 16 12 27 20 32 8 6 19 6 31 2 6-2 15-6 26-13l17 52c-19 13-41 24-67 32z">
            <text:p/>
          </draw:path>
          <draw:path draw:style-name="gr7" draw:text-style-name="P3" draw:layer="layout" svg:width="0.428cm" svg:height="0.464cm" svg:x="3.666cm" svg:y="9.485cm" svg:viewBox="0 0 429 465" svg:d="M140 183c3-28 12-50 25-67 14-16 32-28 56-35 33-11 63-9 88 6 24 15 43 43 56 83l64 203-83 27-56-180c-18-56-46-78-84-66-20 6-34 20-41 41-6 22-6 46 3 73l54 171-83 26-139-439 83-26 38 120c7 21 13 43 18 64z">
            <text:p/>
          </draw:path>
          <draw:path draw:style-name="gr7" draw:text-style-name="P3" draw:layer="layout" svg:width="0.344cm" svg:height="0.353cm" svg:x="4.094cm" svg:y="9.451cm" svg:viewBox="0 0 345 354" svg:d="M334 126c16 52 15 97-5 136-19 38-54 65-105 82-50 15-94 13-131-7-38-21-65-57-82-109-16-51-15-96 4-135 19-38 54-65 105-82 53-16 97-15 134 5 36 20 63 56 80 110zM247 153c-12-38-27-63-45-76-18-14-39-16-62-9-51 16-64 60-42 133 12 35 27 60 45 75s39 18 62 11c51-16 65-61 42-134z">
            <text:p/>
          </draw:path>
          <draw:path draw:style-name="gr7" draw:text-style-name="P3" draw:layer="layout" svg:width="0.393cm" svg:height="0.391cm" svg:x="4.441cm" svg:y="9.325cm" svg:viewBox="0 0 394 392" svg:d="M311 326l-57-180c-18-56-46-78-84-66-20 6-33 20-40 41-7 22-6 46 3 73l54 171-83 27-79-249c-5-17-10-31-14-42-4-10-8-20-11-29l79-25c2 4 6 14 12 30 6 15 10 26 12 33l1-1c4-28 12-50 26-67 13-16 32-28 55-35 34-11 63-9 88 6s44 43 56 83l65 204z">
            <text:p/>
          </draw:path>
        </draw:g>
        <draw:frame draw:style-name="gr4" draw:text-style-name="P1" draw:layer="layout" svg:width="2.545cm" svg:height="2.321cm" svg:x="11.603cm" svg:y="4.05cm">
          <draw:image xlink:href="Pictures/1000000000000094000000870FE7A350.png" xlink:type="simple" xlink:show="embed" xlink:actuate="onLoad" draw:mime-type="image/png">
            <text:p/>
          </draw:image>
        </draw:frame>
        <draw:frame draw:style-name="gr8" draw:text-style-name="P4" draw:layer="layout" svg:width="11.786cm" svg:height="0.763cm" svg:x="7.25cm" svg:y="2.737cm">
          <draw:text-box>
            <text:p><text:span text:style-name="T1">Surveillance des interruptions générées par les boutons</text:span></text:p>
          </draw:text-box>
        </draw:frame>
        <draw:frame draw:style-name="gr9" draw:text-style-name="P5" draw:layer="layout" svg:width="8.42cm" svg:height="0.962cm" svg:x="9cm" svg:y="1.5cm">
          <draw:text-box>
            <text:p>Logigramme de MAEL Scan</text:p>
          </draw:text-box>
        </draw:frame>
        <draw:custom-shape draw:style-name="gr10" draw:text-style-name="P2" xml:id="id1" draw:id="id1" draw:layer="layout" svg:width="4.5cm" svg:height="1.75cm" svg:x="10.625cm" svg:y="6.571cm">
          <text:p text:style-name="P6"><text:span text:style-name="T2">scan_bt</text:span></text:p>
          <text:p text:style-name="P6"><text:span text:style-name="T3">activé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1" draw:text-style-name="P8" xml:id="id2" draw:id="id2" draw:layer="layout" svg:width="4.75cm" svg:height="1.679cm" svg:x="10.5cm" svg:y="9.121cm">
          <text:p text:style-name="P7">Scanner un code QR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2" draw:text-style-name="P8" xml:id="id3" draw:id="id3" draw:layer="layout" svg:width="6cm" svg:height="2cm" svg:x="9.75cm" svg:y="12cm">
          <text:p text:style-name="P7">Commence par « WIFI: »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3" draw:text-style-name="P1" draw:layer="layout" draw:type="line" svg:x1="12.875cm" svg:y1="8.321cm" svg:x2="12.875cm" svg:y2="9.121cm" draw:start-shape="id1" draw:start-glue-point="6" draw:end-shape="id2" draw:end-glue-point="0" svg:d="M12875 8321v800" svg:viewBox="0 0 1 801">
          <text:p/>
        </draw:connector>
        <draw:connector draw:style-name="gr13" draw:text-style-name="P1" draw:layer="layout" draw:type="line" svg:x1="12.875cm" svg:y1="10.8cm" svg:x2="12.75cm" svg:y2="12cm" draw:start-shape="id2" draw:start-glue-point="2" draw:end-shape="id3" draw:end-glue-point="4" svg:d="M12875 10800l-125 1200" svg:viewBox="0 0 126 1201">
          <text:p/>
        </draw:connector>
        <draw:connector draw:style-name="gr14" draw:text-style-name="P10" draw:layer="layout" draw:type="lines" svg:x1="9.75cm" svg:y1="13cm" svg:x2="6.641cm" svg:y2="13.52cm" draw:start-shape="id3" draw:start-glue-point="5" svg:d="M9750 13000h-518l-2591 520" svg:viewBox="0 0 3110 521">
          <text:p text:style-name="P9"><text:span text:style-name="T4"/></text:p>
        </draw:connector>
        <draw:connector draw:style-name="gr15" draw:text-style-name="P10" draw:layer="layout" draw:type="line" svg:x1="12.75cm" svg:y1="14cm" svg:x2="12.797cm" svg:y2="15.485cm" draw:start-shape="id3" draw:start-glue-point="6" svg:d="M12750 14000l47 1485" svg:viewBox="0 0 48 1486">
          <text:p text:style-name="P9"><text:span text:style-name="T4"/></text:p>
        </draw:connector>
        <draw:frame draw:style-name="gr16" draw:text-style-name="P11" draw:layer="layout" svg:width="1.088cm" svg:height="0.645cm" svg:x="12.75cm" svg:y="14.355cm">
          <draw:text-box>
            <text:p><text:span text:style-name="T4">non</text:span></text:p>
          </draw:text-box>
        </draw:frame>
        <draw:frame draw:style-name="gr16" draw:text-style-name="P11" draw:layer="layout" svg:width="0.971cm" svg:height="0.645cm" svg:x="8.662cm" svg:y="12.25cm">
          <draw:text-box>
            <text:p><text:span text:style-name="T4">oui</text:span></text:p>
          </draw:text-box>
        </draw:frame>
        <draw:custom-shape draw:style-name="gr11" draw:text-style-name="P8" draw:layer="layout" svg:width="4.75cm" svg:height="1.679cm" svg:x="3.75cm" svg:y="15.25cm">
          <text:p text:style-name="P7">Parser le 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Mono" svg:font-family="'Noto Mono'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29T11:50:15.100636630</meta:creation-date>
    <dc:date>2026-05-16T10:31:22.274634696</dc:date>
    <meta:editing-duration>PT1H3M19S</meta:editing-duration>
    <meta:editing-cycles>27</meta:editing-cycles>
    <meta:generator>LibreOffice/26.2.3.2$Linux_X86_64 LibreOffice_project/70e089b17412e4cb7773e41413306b17a2328c34</meta:generator>
    <meta:document-statistic meta:object-count="30"/>
  </office:meta>
</office:document-meta>
</file>