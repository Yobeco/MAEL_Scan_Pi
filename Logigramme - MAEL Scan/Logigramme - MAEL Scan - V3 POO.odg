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4000000870FE7A350.png" manifest:media-type="image/png"/>
  <manifest:file-entry manifest:full-path="Pictures/100004BA000052C9000052C925C069A8.svg" manifest:media-type="image/svg+xml"/>
  <manifest:file-entry manifest:full-path="Pictures/1000000100000215000001F2F8D3F60E.png" manifest:media-type="image/png"/>
  <manifest:file-entry manifest:full-path="Pictures/100008220000371F0000336B6A08EB3B.svg" manifest:media-type="image/svg+xml"/>
  <manifest:file-entry manifest:full-path="Pictures/10000001000002C3000002C393573DCE.png" manifest:media-type="image/png"/>
  <manifest:file-entry manifest:full-path="Pictures/10000638000052C9000052C96C1D549D.svg" manifest:media-type="image/svg+xml"/>
  <manifest:file-entry manifest:full-path="Pictures/10000001000002C3000002C3DAE16A6C.png" manifest:media-type="image/png"/>
  <manifest:file-entry manifest:full-path="Pictures/1000000000000AD700001800EF26A2F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3cm, 0cm, 12.685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73cm" fo:min-width="0.199cm" fo:wrap-option="wrap" draw:shadow="visible" draw:shadow-offset-x="0.035cm" draw:shadow-offset-y="0.035cm" draw:shadow-color="#000000" draw:shadow-opacity="50%" loext:shadow-blur="0.106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9cm" fo:min-width="0.227cm" fo:wrap-option="wrap" draw:shadow="visible" draw:shadow-offset-x="0.035cm" draw:shadow-offset-y="0.035cm" draw:shadow-color="#000000" draw:shadow-opacity="50%" loext:shadow-blur="0.106cm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svg:stroke-color="#000000" svg:stroke-opacity="100%" draw:fill="solid" draw:fill-color="#808080" loext:fill-use-slide-background="false" draw:opacity="59%" draw:textarea-horizontal-align="center" draw:textarea-vertical-align="middle" draw:auto-grow-height="true" draw:auto-grow-width="false" fo:min-height="0.712cm" draw:shadow="hidden" loext:glow-radius="0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2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8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86cm" fo:min-width="3.56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1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1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08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247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592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75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899cm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74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808080" draw:opacity="59%"/>
      <style:paragraph-properties fo:text-align="center"/>
      <style:text-properties fo:color="#808080" loext:opacity="100%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/>
      <style:text-properties style:font-name="FreeMono" fo:font-size="7pt" fo:font-weight="bold" style:font-size-asian="7pt" style:font-weight-asian="bold" style:font-size-complex="7pt" style:font-weight-complex="bold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/>
      <style:text-properties style:font-name="FreeMono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margin-left="0cm" fo:margin-right="0cm" fo:text-align="center" fo:text-indent="0cm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16" style:family="paragraph">
      <loext:graphic-properties draw:fill="none" draw:fill-color="#ffffff"/>
      <style:text-properties style:font-name="FreeMono" fo:font-size="10pt" style:font-size-asian="10pt" style:font-size-complex="10pt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eeMono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" fo:font-size="16pt" style:font-size-asian="16pt" style:font-size-complex="16pt"/>
    </style:style>
    <style:style style:name="T5" style:family="text">
      <style:text-properties fo:font-size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FreeMono" fo:font-size="12pt"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7pt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eeMono" fo:font-size="7pt" fo:font-weight="bold" style:font-size-asian="7pt" style:font-weight-asian="bold" style:font-size-complex="7pt" style:font-weight-complex="bold"/>
    </style:style>
    <style:style style:name="T10" style:family="text">
      <style:text-properties style:font-name="Free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Free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246cm" svg:height="7.907cm" svg:x="1.254cm" svg:y="1.231cm">
          <draw:image xlink:href="Pictures/1000000000000AD700001800EF26A2F4.jpg" xlink:type="simple" xlink:show="embed" xlink:actuate="onLoad" draw:mime-type="image/jpeg">
            <text:p/>
          </draw:image>
        </draw:frame>
        <draw:g draw:style-name="gr2">
          <draw:custom-shape draw:style-name="gr3" draw:text-style-name="P2" draw:layer="layout" svg:width="0.833cm" svg:height="0.857cm" svg:x="4.6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4" draw:text-style-name="P1" draw:layer="layout" svg:width="0.573cm" svg:height="0.573cm" svg:x="4.756cm" svg:y="9.473cm">
            <draw:image xlink:href="Pictures/10000638000052C9000052C96C1D549D.svg" xlink:type="simple" xlink:show="embed" xlink:actuate="onLoad" draw:mime-type="image/svg+xml">
              <text:p/>
            </draw:image>
            <draw:image xlink:href="Pictures/10000001000002C3000002C393573DCE.png" xlink:type="simple" xlink:show="embed" xlink:actuate="onLoad" draw:mime-type="image/png"/>
          </draw:frame>
        </draw:g>
        <draw:g draw:style-name="gr2">
          <draw:custom-shape draw:style-name="gr5" draw:text-style-name="P2" draw:layer="layout" svg:width="0.865cm" svg:height="0.857cm" svg:x="2.1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4" draw:text-style-name="P1" draw:layer="layout" svg:width="0.374cm" svg:height="0.349cm" svg:x="2.361cm" svg:y="9.586cm">
            <draw:image xlink:href="Pictures/100008220000371F0000336B6A08EB3B.svg" xlink:type="simple" xlink:show="embed" xlink:actuate="onLoad" draw:mime-type="image/svg+xml">
              <text:p/>
            </draw:image>
            <draw:image xlink:href="Pictures/1000000100000215000001F2F8D3F60E.png" xlink:type="simple" xlink:show="embed" xlink:actuate="onLoad" draw:mime-type="image/png"/>
          </draw:frame>
        </draw:g>
        <draw:g draw:style-name="gr2">
          <draw:custom-shape draw:style-name="gr5" draw:text-style-name="P2" draw:layer="layout" svg:width="0.865cm" svg:height="0.857cm" svg:x="3.387cm" svg:y="9.339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4" draw:text-style-name="P1" draw:layer="layout" svg:width="0.491cm" svg:height="0.491cm" svg:x="3.561cm" svg:y="9.528cm">
            <draw:image xlink:href="Pictures/100004BA000052C9000052C925C069A8.svg" xlink:type="simple" xlink:show="embed" xlink:actuate="onLoad" draw:mime-type="image/svg+xml">
              <text:p/>
            </draw:image>
            <draw:image xlink:href="Pictures/10000001000002C3000002C3DAE16A6C.png" xlink:type="simple" xlink:show="embed" xlink:actuate="onLoad" draw:mime-type="image/png"/>
          </draw:frame>
        </draw:g>
        <draw:g draw:style-name="gr6">
          <draw:path draw:style-name="gr7" draw:text-style-name="P3" draw:layer="layout" svg:width="0.391cm" svg:height="0.487cm" svg:x="2.73cm" svg:y="9.762cm" svg:viewBox="0 0 392 488" svg:d="M384 95c9 27 10 53 5 77-6 25-18 47-37 66s-44 33-76 43l-103 33 46 147-87 27-132-416 187-60c50-15 92-16 126-2 34 15 58 43 71 85zM297 124c-14-43-47-57-98-41l-90 29 43 135 92-30c24-7 41-19 50-35s10-35 3-58z">
            <text:p/>
          </draw:path>
          <draw:path draw:style-name="gr7" draw:text-style-name="P3" draw:layer="layout" svg:width="0.328cm" svg:height="0.537cm" svg:x="3.128cm" svg:y="9.71cm" svg:viewBox="0 0 329 538" svg:d="M220 525c-20 6-37 10-53 13l-19-60c11-1 21-4 29-6 12-4 21-9 28-15s12-15 15-26c4-10 6-27 7-50l-227-277 88-28 98 134c14 19 35 49 61 90l-2-31-3-75v-166l87-28-20 377c-4 46-12 80-26 102-13 21-34 37-63 46z">
            <text:p/>
          </draw:path>
          <draw:path draw:style-name="gr7" draw:text-style-name="P3" draw:layer="layout" svg:width="0.286cm" svg:height="0.406cm" svg:x="3.468cm" svg:y="9.593cm" svg:viewBox="0 0 287 407" svg:d="M220 402c-25 8-45 7-63-2-17-9-30-27-39-54l-60-188-40 12-18-56 45-14 2-83 52-17 24 75 60-19 18 56-61 20 53 165c5 16 12 27 20 32 8 6 19 6 31 2 6-2 15-6 26-13l17 52c-19 13-41 24-67 32z">
            <text:p/>
          </draw:path>
          <draw:path draw:style-name="gr7" draw:text-style-name="P3" draw:layer="layout" svg:width="0.428cm" svg:height="0.464cm" svg:x="3.666cm" svg:y="9.485cm" svg:viewBox="0 0 429 465" svg:d="M140 183c3-28 12-50 25-67 14-16 32-28 56-35 33-11 63-9 88 6 24 15 43 43 56 83l64 203-83 27-56-180c-18-56-46-78-84-66-20 6-34 20-41 41-6 22-6 46 3 73l54 171-83 26-139-439 83-26 38 120c7 21 13 43 18 64z">
            <text:p/>
          </draw:path>
          <draw:path draw:style-name="gr7" draw:text-style-name="P3" draw:layer="layout" svg:width="0.344cm" svg:height="0.353cm" svg:x="4.094cm" svg:y="9.451cm" svg:viewBox="0 0 345 354" svg:d="M334 126c16 52 15 97-5 136-19 38-54 65-105 82-50 15-94 13-131-7-38-21-65-57-82-109-16-51-15-96 4-135 19-38 54-65 105-82 53-16 97-15 134 5 36 20 63 56 80 110zM247 153c-12-38-27-63-45-76-18-14-39-16-62-9-51 16-64 60-42 133 12 35 27 60 45 75s39 18 62 11c51-16 65-61 42-134z">
            <text:p/>
          </draw:path>
          <draw:path draw:style-name="gr7" draw:text-style-name="P3" draw:layer="layout" svg:width="0.393cm" svg:height="0.391cm" svg:x="4.441cm" svg:y="9.325cm" svg:viewBox="0 0 394 392" svg:d="M311 326l-57-180c-18-56-46-78-84-66-20 6-33 20-40 41-7 22-6 46 3 73l54 171-83 27-79-249c-5-17-10-31-14-42-4-10-8-20-11-29l79-25c2 4 6 14 12 30 6 15 10 26 12 33l1-1c4-28 12-50 26-67 13-16 32-28 55-35 34-11 63-9 88 6s44 43 56 83l65 204z">
            <text:p/>
          </draw:path>
        </draw:g>
        <draw:frame draw:style-name="gr4" draw:text-style-name="P1" draw:layer="layout" svg:width="2.545cm" svg:height="2.321cm" svg:x="11.903cm" svg:y="3.95cm">
          <draw:image xlink:href="Pictures/1000000000000094000000870FE7A350.png" xlink:type="simple" xlink:show="embed" xlink:actuate="onLoad" draw:mime-type="image/png">
            <text:p/>
          </draw:image>
        </draw:frame>
        <draw:frame draw:style-name="gr8" draw:text-style-name="P4" draw:layer="layout" svg:width="11.786cm" svg:height="0.763cm" svg:x="7.25cm" svg:y="2.737cm">
          <draw:text-box>
            <text:p><text:span text:style-name="T1">Surveillance des interruptions générées par les boutons</text:span></text:p>
          </draw:text-box>
        </draw:frame>
        <draw:frame draw:style-name="gr9" draw:text-style-name="P5" draw:layer="layout" svg:width="8.888cm" svg:height="0.962cm" svg:x="8.5cm" svg:y="1.5cm">
          <draw:text-box>
            <text:p><text:span text:style-name="T2">Logigramme de MAEL Scan</text:span></text:p>
          </draw:text-box>
        </draw:frame>
        <draw:custom-shape draw:style-name="gr10" draw:text-style-name="P7" xml:id="id1" draw:id="id1" draw:layer="layout" svg:width="4.5cm" svg:height="1.75cm" svg:x="10.875cm" svg:y="6.571cm">
          <text:p text:style-name="P6"><text:span text:style-name="T3">scan_bt</text:span></text:p>
          <text:p text:style-name="P6"><text:span text:style-name="T4">activé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9" xml:id="id2" draw:id="id2" draw:layer="layout" svg:width="4.75cm" svg:height="1.679cm" svg:x="10.75cm" svg:y="9.121cm">
          <text:p text:style-name="P8"><text:span text:style-name="T5">Scanner un code Q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9" xml:id="id3" draw:id="id3" draw:layer="layout" svg:width="6cm" svg:height="2cm" svg:x="10.125cm" svg:y="12cm">
          <text:p text:style-name="P8"><text:span text:style-name="T5">Commence par « WIFI: »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1" draw:layer="layout" draw:type="line" svg:x1="13.125cm" svg:y1="8.321cm" svg:x2="13.125cm" svg:y2="9.121cm" draw:start-shape="id1" draw:start-glue-point="6" draw:end-shape="id2" draw:end-glue-point="0" svg:d="M13125 8321v800" svg:viewBox="0 0 1 801">
          <text:p/>
        </draw:connector>
        <draw:connector draw:style-name="gr13" draw:text-style-name="P1" draw:layer="layout" draw:type="line" svg:x1="13.125cm" svg:y1="10.8cm" svg:x2="13.125cm" svg:y2="12cm" draw:start-shape="id2" draw:start-glue-point="2" draw:end-shape="id3" draw:end-glue-point="4" svg:d="M13125 10800v1200" svg:viewBox="0 0 1 1201">
          <text:p/>
        </draw:connector>
        <draw:connector draw:style-name="gr13" draw:text-style-name="P10" draw:layer="layout" draw:type="lines" draw:line-skew="-2.732cm" svg:x1="10.125cm" svg:y1="13cm" svg:x2="5.475cm" svg:y2="14.25cm" draw:start-shape="id3" draw:start-glue-point="5" draw:end-shape="id4" draw:end-glue-point="0" svg:d="M10125 13000h-3250l-1400 731v519" svg:viewBox="0 0 4651 1251">
          <text:p/>
        </draw:connector>
        <draw:connector draw:style-name="gr14" draw:text-style-name="P10" draw:layer="layout" draw:type="line" svg:x1="13.125cm" svg:y1="14cm" svg:x2="13.125cm" svg:y2="15.271cm" draw:end-shape="id5" draw:end-glue-point="0" svg:d="M13125 14000v1271" svg:viewBox="0 0 1 1272">
          <text:p/>
        </draw:connector>
        <draw:frame draw:style-name="gr15" draw:text-style-name="P11" draw:layer="layout" svg:width="1.088cm" svg:height="0.645cm" svg:x="11.881cm" svg:y="14.155cm">
          <draw:text-box>
            <text:p><text:span text:style-name="T6">non</text:span></text:p>
          </draw:text-box>
        </draw:frame>
        <draw:frame draw:style-name="gr16" draw:text-style-name="P11" draw:layer="layout" svg:width="0.971cm" svg:height="0.645cm" svg:x="9.5cm" svg:y="12.25cm">
          <draw:text-box>
            <text:p><text:span text:style-name="T6">oui</text:span></text:p>
          </draw:text-box>
        </draw:frame>
        <draw:custom-shape draw:style-name="gr11" draw:text-style-name="P9" xml:id="id4" draw:id="id4" draw:layer="layout" svg:width="4.75cm" svg:height="1.679cm" svg:x="3.1cm" svg:y="14.25cm">
          <text:p text:style-name="P8"><text:span text:style-name="T5">Analyser</text:span></text:p>
          <text:p text:style-name="P8"><text:span text:style-name="T7">MECARD-lik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9" xml:id="id6" draw:id="id6" draw:layer="layout" svg:width="4.75cm" svg:height="1.679cm" svg:x="3.1cm" svg:y="17.921cm">
          <text:p text:style-name="P8"><text:span text:style-name="T5">Configurer</text:span></text:p>
          <text:p text:style-name="P8"><text:span text:style-name="T5">le Wif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10" draw:layer="layout" draw:type="line" svg:x1="5.475cm" svg:y1="15.929cm" svg:x2="5.475cm" svg:y2="17.921cm" draw:start-shape="id4" draw:start-glue-point="2" draw:end-shape="id6" draw:end-glue-point="0" svg:d="M5475 15929v1992" svg:viewBox="0 0 1 1993">
          <text:p/>
        </draw:connector>
        <draw:frame draw:style-name="gr17" draw:text-style-name="P12" draw:layer="layout" svg:width="4.5cm" svg:height="1.335cm" svg:x="1cm" svg:y="16.265cm">
          <draw:text-box>
            <text:p><text:span text:style-name="T8">('&lt;Cryptage&gt;</text:span><text:span text:style-name="T9"> : str', </text:span></text:p>
            <text:p><text:span text:style-name="T8"><text:s/>'&lt;SSID&gt;</text:span><text:span text:style-name="T9"> : str', </text:span></text:p>
            <text:p><text:span text:style-name="T8"><text:s/>'&lt;mot_de_passe&gt;</text:span><text:span text:style-name="T9"> : str', </text:span></text:p>
            <text:p><text:span text:style-name="T8"><text:s/>'&lt;Réseau_masqué&gt; : bool</text:span><text:span text:style-name="T9">')</text:span></text:p>
          </draw:text-box>
        </draw:frame>
        <draw:custom-shape draw:style-name="gr11" draw:text-style-name="P9" xml:id="id5" draw:id="id5" draw:layer="layout" svg:width="4.75cm" svg:height="1.679cm" svg:x="10.75cm" svg:y="15.271cm">
          <text:p text:style-name="P8"><text:span text:style-name="T5">Analyser la structure de donné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2" draw:layer="layout" svg:width="3.35cm" svg:height="0.497cm" svg:x="11.45cm" svg:y="11.065cm">
          <draw:text-box>
            <text:p><text:span text:style-name="T9">qr_content : str</text:span></text:p>
          </draw:text-box>
        </draw:frame>
        <draw:frame draw:style-name="gr19" draw:text-style-name="P14" draw:layer="layout" svg:width="4.1cm" svg:height="0.602cm" svg:x="13.4cm" svg:y="14.253cm">
          <draw:text-box>
            <text:p text:style-name="P13"><text:span text:style-name="T10">qr_content : str</text:span></text:p>
          </draw:text-box>
        </draw:frame>
        <draw:custom-shape draw:style-name="gr20" draw:text-style-name="P9" xml:id="id7" draw:id="id7" draw:layer="layout" svg:width="6.25cm" svg:height="2cm" svg:x="10cm" svg:y="17.75cm">
          <text:p text:style-name="P8"><text:span text:style-name="T5">C’est un</text:span></text:p>
          <text:p text:style-name="P8"><text:span text:style-name="T7">ID opaq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9" xml:id="id9" draw:id="id9" draw:layer="layout" svg:width="5.45cm" svg:height="1.679cm" svg:x="19.3cm" svg:y="17.9cm">
          <text:p text:style-name="P15">Reconstructeur de liens extern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" draw:text-style-name="P9" xml:id="id8" draw:id="id8" draw:layer="layout" svg:width="6.25cm" svg:height="2cm" svg:x="10cm" svg:y="20.65cm">
          <text:p text:style-name="P8"><text:span text:style-name="T5">C’est un</text:span></text:p>
          <text:p text:style-name="P8"><text:span text:style-name="T7">mp3 inclu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2" draw:text-style-name="P16" draw:layer="layout" svg:width="2.821cm" svg:height="0.602cm" svg:x="8.851cm" svg:y="17.55cm">
          <draw:text-box>
            <text:p><text:span text:style-name="T11">match /case</text:span></text:p>
          </draw:text-box>
        </draw:frame>
        <draw:connector draw:style-name="gr14" draw:text-style-name="P10" draw:layer="layout" draw:type="line" svg:x1="13.125cm" svg:y1="16.95cm" svg:x2="13.125cm" svg:y2="17.75cm" draw:start-shape="id5" draw:start-glue-point="2" draw:end-shape="id7" draw:end-glue-point="4" svg:d="M13125 16950v800" svg:viewBox="0 0 1 801">
          <text:p/>
        </draw:connector>
        <draw:connector draw:style-name="gr14" draw:text-style-name="P10" draw:layer="layout" draw:type="line" svg:x1="13.125cm" svg:y1="19.75cm" svg:x2="13.125cm" svg:y2="20.65cm" draw:start-shape="id7" draw:start-glue-point="6" draw:end-shape="id8" draw:end-glue-point="4" svg:d="M13125 19750v900" svg:viewBox="0 0 1 901">
          <text:p/>
        </draw:connector>
        <draw:connector draw:style-name="gr14" draw:text-style-name="P10" draw:layer="layout" draw:type="line" svg:x1="16.25cm" svg:y1="18.75cm" svg:x2="19.3cm" svg:y2="18.739cm" draw:start-shape="id7" draw:end-shape="id9" draw:end-glue-point="3" svg:d="M16250 18750l3050-11" svg:viewBox="0 0 3051 12">
          <text:p/>
        </draw:connector>
        <draw:custom-shape draw:style-name="gr23" draw:text-style-name="P9" xml:id="id10" draw:id="id10" draw:layer="layout" svg:width="5.5cm" svg:height="1.679cm" svg:x="19.25cm" svg:y="20.8cm">
          <text:p text:style-name="P8"><text:span text:style-name="T5">Reconstructeur de liens internes immuabl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10" draw:layer="layout" draw:type="line" svg:x1="16.25cm" svg:y1="21.65cm" svg:x2="19.25cm" svg:y2="21.639cm" draw:start-shape="id8" draw:start-glue-point="7" draw:end-shape="id10" draw:end-glue-point="3" svg:d="M16250 21650l3000-11" svg:viewBox="0 0 3001 12">
          <text:p/>
        </draw:connector>
        <draw:frame draw:style-name="gr18" draw:text-style-name="P14" draw:layer="layout" svg:width="3.35cm" svg:height="1.304cm" svg:x="16.2cm" svg:y="17.303cm">
          <draw:text-box>
            <text:p text:style-name="P13"><text:span text:style-name="T10">id_Idopaque,</text:span></text:p>
            <text:p text:style-name="P13"><text:span text:style-name="T10">drive_name,</text:span></text:p>
            <text:p text:style-name="P13"><text:span text:style-name="T10">file_id</text:span></text:p>
          </draw:text-box>
        </draw:frame>
        <draw:frame draw:style-name="gr18" draw:text-style-name="P14" draw:layer="layout" svg:width="3.35cm" svg:height="1.304cm" svg:x="16.15cm" svg:y="20.2cm">
          <draw:text-box>
            <text:p text:style-name="P17"><text:span text:style-name="T10">id_assets, language, wor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1:50:15.100636630</meta:creation-date>
    <dc:date>2026-05-16T12:43:58.070091490</dc:date>
    <meta:editing-duration>PT1H52M45S</meta:editing-duration>
    <meta:editing-cycles>76</meta:editing-cycles>
    <meta:generator>LibreOffice/26.2.3.2$Linux_X86_64 LibreOffice_project/70e089b17412e4cb7773e41413306b17a2328c34</meta:generator>
    <meta:document-statistic meta:object-count="47"/>
  </office:meta>
</office:document-meta>
</file>