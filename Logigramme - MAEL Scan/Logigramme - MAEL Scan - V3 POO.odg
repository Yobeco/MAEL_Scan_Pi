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94000000870FE7A350.png" manifest:media-type="image/png"/>
  <manifest:file-entry manifest:full-path="Pictures/100004BA000052C9000052C925C069A8.svg" manifest:media-type="image/svg+xml"/>
  <manifest:file-entry manifest:full-path="Pictures/1000000100000215000001F2F8D3F60E.png" manifest:media-type="image/png"/>
  <manifest:file-entry manifest:full-path="Pictures/100008220000371F0000336B6A08EB3B.svg" manifest:media-type="image/svg+xml"/>
  <manifest:file-entry manifest:full-path="Pictures/10000001000002C3000002C393573DCE.png" manifest:media-type="image/png"/>
  <manifest:file-entry manifest:full-path="Pictures/10000638000052C9000052C96C1D549D.svg" manifest:media-type="image/svg+xml"/>
  <manifest:file-entry manifest:full-path="Pictures/10000001000002C3000002C3DAE16A6C.png" manifest:media-type="image/png"/>
  <manifest:file-entry manifest:full-path="Pictures/1000000000000AD700001800EF26A2F4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ong_20_Dash" svg:stroke-width="0.028cm" svg:stroke-color="#3465a4" draw:marker-start-width="0.242cm" draw:marker-end-width="0.242cm" svg:stroke-linecap="butt" draw:fill="solid" draw:fill-color="#dee6ef" draw:textarea-horizontal-align="justify" draw:textarea-vertical-align="middle" draw:auto-grow-height="false" fo:min-height="20.972cm" fo:min-width="5.722cm" fo:padding-top="0.139cm" fo:padding-bottom="0.139cm" fo:padding-left="0.264cm" fo:padding-right="0.264cm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23cm, 0cm, 12.685cm, 0cm)" draw:image-opacity="100%" style:mirror="none" loext:decorative="false"/>
    </style:style>
    <style:style style:name="gr3" style:family="graphic">
      <style:graphic-properties style:writing-mode="lr-tb" loext:decorative="false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473cm" fo:min-width="0.199cm" fo:wrap-option="wrap" draw:shadow="visible" draw:shadow-offset-x="0.035cm" draw:shadow-offset-y="0.035cm" draw:shadow-color="#000000" draw:shadow-opacity="50%" loext:shadow-blur="0.106cm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469cm" fo:min-width="0.227cm" fo:wrap-option="wrap" draw:shadow="visible" draw:shadow-offset-x="0.035cm" draw:shadow-offset-y="0.035cm" draw:shadow-color="#000000" draw:shadow-opacity="50%" loext:shadow-blur="0.106cm" loext:decorative="false"/>
    </style:style>
    <style:style style:name="gr7" style:family="graphic">
      <style:graphic-properties loext:decorative="false"/>
    </style:style>
    <style:style style:name="gr8" style:family="graphic" style:parent-style-name="standard">
      <style:graphic-properties draw:stroke="none" svg:stroke-color="#000000" svg:stroke-opacity="100%" draw:fill="solid" draw:fill-color="#808080" loext:fill-use-slide-background="false" draw:opacity="59%" draw:textarea-horizontal-align="center" draw:textarea-vertical-align="middle" draw:auto-grow-height="true" draw:auto-grow-width="false" fo:min-height="0.712cm" draw:shadow="hidden" loext:glow-radius="0cm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1.286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88cm" loext:decorative="false"/>
      <style:paragraph-properties style:writing-mode="lr-tb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986cm" fo:min-width="3.56cm" fo:padding-top="0.142cm" fo:padding-bottom="0.142cm" fo:padding-left="0.267cm" fo:padding-right="0.267cm" style:writing-mode="lr-tb" loext:decorative="false"/>
      <style:paragraph-properties style:writing-mode="lr-tb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96cm" fo:min-width="3.1cm" fo:padding-top="0.142cm" fo:padding-bottom="0.142cm" fo:padding-left="0.267cm" fo:padding-right="0.267cm" style:writing-mode="lr-tb" loext:decorative="false"/>
      <style:paragraph-properties style:writing-mode="lr-tb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2.466cm" fo:padding-top="0.142cm" fo:padding-bottom="0.142cm" fo:padding-left="0.267cm" fo:padding-right="0.267cm" style:writing-mode="lr-tb" loext:decorative="false"/>
      <style:paragraph-properties style:writing-mode="lr-tb"/>
    </style:style>
    <style:style style:name="gr14" style:family="graphic" style:parent-style-name="objectwithoutfill">
      <style:graphic-properties svg:stroke-width="0.035cm" svg:stroke-color="#000000" draw:marker-start-width="0.252cm" draw:marker-end="Extrémités_20_de_20_flèche_20_1" draw:marker-end-width="0.25cm" draw:fill="none" draw:textarea-vertical-align="middle" fo:padding-top="0.142cm" fo:padding-bottom="0.142cm" fo:padding-left="0.267cm" fo:padding-right="0.267cm" loext:decorative="false"/>
    </style:style>
    <style:style style:name="gr15" style:family="graphic" style:parent-style-name="objectwithoutfill">
      <style:graphic-properties svg:stroke-width="0.035cm" svg:stroke-color="#000000" draw:marker-start-width="0.252cm" draw:marker-end="Extrémités_20_de_20_flèche_20_1" draw:marker-end-width="0.25cm" draw:fill="none" draw:textarea-horizontal-align="center" draw:textarea-vertical-align="middle" fo:padding-top="0.142cm" fo:padding-bottom="0.142cm" fo:padding-left="0.267cm" fo:padding-right="0.267cm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88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71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1.085cm" loext:decorative="false"/>
      <style:paragraph-properties style:writing-mode="lr-tb"/>
    </style:style>
    <style:style style:name="gr19" style:family="graphic" style:parent-style-name="standard">
      <style:graphic-properties draw:stroke="none" draw:fill="none" fo:min-height="0.247cm" loext:decorative="false"/>
      <style:paragraph-properties style:writing-mode="lr-tb"/>
    </style:style>
    <style:style style:name="gr2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2.592cm" fo:padding-top="0.142cm" fo:padding-bottom="0.142cm" fo:padding-left="0.267cm" fo:padding-right="0.267cm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96cm" fo:min-width="3.252cm" fo:padding-top="0.142cm" fo:padding-bottom="0.142cm" fo:padding-left="0.267cm" fo:padding-right="0.267cm" style:writing-mode="lr-tb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1.899cm" loext:decorative="false"/>
      <style:paragraph-properties style:writing-mode="lr-tb"/>
    </style:style>
    <style:style style:name="gr2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96cm" fo:min-width="3.674cm" fo:padding-top="0.142cm" fo:padding-bottom="0.142cm" fo:padding-left="0.267cm" fo:padding-right="0.267cm" style:writing-mode="lr-tb" loext:decorative="false"/>
      <style:paragraph-properties style:writing-mode="lr-tb"/>
    </style:style>
    <style:style style:name="gr24" style:family="graphic" style:parent-style-name="standard">
      <style:graphic-properties draw:stroke="none" draw:fill="none" fo:min-height="1.405cm" loext:decorative="false"/>
      <style:paragraph-properties style:writing-mode="lr-tb"/>
    </style:style>
    <style:style style:name="gr25" style:family="graphic" style:parent-style-name="standard">
      <style:graphic-properties draw:stroke="none" draw:fill="none" fo:min-height="1.25cm" loext:decorative="false"/>
      <style:paragraph-properties style:writing-mode="lr-tb"/>
    </style:style>
    <style:style style:name="gr26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117cm" fo:min-width="4.974cm" fo:padding-top="0.142cm" fo:padding-bottom="0.142cm" fo:padding-left="0.267cm" fo:padding-right="0.267cm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96cm" fo:min-width="3.636cm" fo:padding-top="0.142cm" fo:padding-bottom="0.142cm" fo:padding-left="0.267cm" fo:padding-right="0.267cm" style:writing-mode="lr-tb" loext:decorative="false"/>
      <style:paragraph-properties style:writing-mode="lr-tb"/>
    </style:style>
    <style:style style:name="gr2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929cm" fo:min-width="4.292cm" fo:padding-top="0.142cm" fo:padding-bottom="0.142cm" fo:padding-left="0.267cm" fo:padding-right="0.267cm" loext:decorative="false"/>
      <style:paragraph-properties style:writing-mode="lr-tb"/>
    </style:style>
    <style:style style:name="gr2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26cm" fo:min-width="2.081cm" fo:padding-top="0.142cm" fo:padding-bottom="0.142cm" fo:padding-left="0.267cm" fo:padding-right="0.267cm" loext:decorative="false"/>
      <style:paragraph-properties style:writing-mode="lr-tb"/>
    </style:style>
    <style:style style:name="gr3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532cm" fo:min-width="6.303cm" fo:padding-top="0.142cm" fo:padding-bottom="0.142cm" fo:padding-left="0.267cm" fo:padding-right="0.267cm" loext:decorative="false"/>
      <style:paragraph-properties style:writing-mode="lr-tb"/>
    </style:style>
    <style:style style:name="gr31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17cm" fo:min-width="3.648cm" fo:padding-top="0.142cm" fo:padding-bottom="0.142cm" fo:padding-left="0.267cm" fo:padding-right="0.267cm" loext:decorative="false"/>
      <style:paragraph-properties style:writing-mode="lr-tb"/>
    </style:style>
    <style:style style:name="gr3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811cm" fo:min-width="3.674cm" fo:padding-top="0.142cm" fo:padding-bottom="0.142cm" fo:padding-left="0.267cm" fo:padding-right="0.267cm" style:writing-mode="lr-tb" loext:decorative="false"/>
      <style:paragraph-properties style:writing-mode="lr-tb"/>
    </style:style>
    <style:style style:name="gr33" style:family="graphic" style:parent-style-name="standard">
      <style:graphic-properties draw:stroke="none" draw:fill="none" fo:min-height="0.352cm" loext:decorative="false"/>
      <style:paragraph-properties style:writing-mode="lr-tb"/>
    </style:style>
    <style:style style:name="gr34" style:family="graphic" style:parent-style-name="standard">
      <style:graphic-properties draw:stroke="none" draw:fill="none" fo:min-height="0.102cm" loext:decorative="false"/>
      <style:paragraph-properties style:writing-mode="lr-tb"/>
    </style:style>
    <style:style style:name="gr3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26cm" fo:min-width="2.78cm" fo:padding-top="0.142cm" fo:padding-bottom="0.142cm" fo:padding-left="0.267cm" fo:padding-right="0.267cm" loext:decorative="false"/>
      <style:paragraph-properties style:writing-mode="lr-tb"/>
    </style:style>
    <style:style style:name="gr3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66cm" fo:min-width="2.592cm" fo:padding-top="0.142cm" fo:padding-bottom="0.142cm" fo:padding-left="0.267cm" fo:padding-right="0.267cm" style:writing-mode="lr-tb" loext:decorative="false"/>
      <style:paragraph-properties style:writing-mode="lr-tb"/>
    </style:style>
    <style:style style:name="gr37" style:family="graphic" style:parent-style-name="standard">
      <style:graphic-properties draw:stroke="none" draw:fill="none" fo:min-height="0cm" loext:decorative="false"/>
      <style:paragraph-properties style:writing-mode="lr-tb"/>
    </style:style>
    <style:style style:name="gr3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96cm" fo:min-width="3.636cm" fo:padding-top="0.142cm" fo:padding-bottom="0.142cm" fo:padding-left="0.267cm" fo:padding-right="0.267cm" loext:decorative="false"/>
      <style:paragraph-properties style:writing-mode="lr-tb"/>
    </style:style>
    <style:style style:name="gr39" style:family="graphic" style:parent-style-name="standard">
      <style:graphic-properties draw:stroke="none" draw:fill="none" fo:min-height="0.5cm" loext:decorative="false"/>
      <style:paragraph-properties style:writing-mode="lr-tb"/>
    </style:style>
    <style:style style:name="gr40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2.966cm" fo:padding-top="0.142cm" fo:padding-bottom="0.142cm" fo:padding-left="0.267cm" fo:padding-right="0.267cm" style:writing-mode="lr-tb" loext:decorative="false"/>
      <style:paragraph-properties style:writing-mode="lr-tb"/>
    </style:style>
    <style:style style:name="gr41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2.966cm" fo:padding-top="0.142cm" fo:padding-bottom="0.142cm" fo:padding-left="0.267cm" fo:padding-right="0.267cm" style:writing-mode="lr-tb" loext:decorative="false"/>
      <style:paragraph-properties style:writing-mode="lr-tb"/>
    </style:style>
    <style:style style:name="gr42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2.966cm" fo:padding-top="0.142cm" fo:padding-bottom="0.142cm" fo:padding-left="0.267cm" fo:padding-right="0.267cm" style:writing-mode="lr-tb" loext:decorative="false"/>
      <style:paragraph-properties style:writing-mode="lr-tb"/>
    </style:style>
    <style:style style:name="gr43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2.966cm" fo:padding-top="0.142cm" fo:padding-bottom="0.142cm" fo:padding-left="0.267cm" fo:padding-right="0.267cm" style:writing-mode="lr-tb" loext:decorative="false"/>
      <style:paragraph-properties style:writing-mode="lr-tb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solid" draw:fill-color="#808080" draw:opacity="59%"/>
      <style:paragraph-properties fo:text-align="center"/>
      <style:text-properties fo:color="#808080" loext:opacity="100%"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size="13pt" style:font-size-asian="13pt" style:font-size-complex="13pt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solid" draw:fill-color="#ffffff"/>
      <style:paragraph-properties fo:text-align="center" style:writing-mode="lr-tb"/>
    </style:style>
    <style:style style:name="P9" style:family="paragraph">
      <style:paragraph-properties fo:text-align="center"/>
      <style:text-properties fo:font-size="12pt"/>
    </style:style>
    <style:style style:name="P10" style:family="paragraph">
      <loext:graphic-properties draw:fill-color="#ffffff"/>
      <style:paragraph-properties fo:text-align="center" style:writing-mode="lr-tb"/>
      <style:text-properties fo:font-size="12pt"/>
    </style:style>
    <style:style style:name="P11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text-properties fo:font-size="10pt" style:font-size-asian="10pt" style:font-size-complex="10pt"/>
    </style:style>
    <style:style style:name="P13" style:family="paragraph">
      <loext:graphic-properties draw:fill="none"/>
      <style:text-properties style:font-name="FreeMono" fo:font-size="7pt" fo:font-weight="bold" style:font-size-asian="7pt" style:font-weight-asian="bold" style:font-size-complex="7pt" style:font-weight-complex="bold"/>
    </style:style>
    <style:style style:name="P14" style:family="paragraph">
      <style:text-properties fo:font-size="10pt" style:font-size-asian="10pt" style:font-size-complex="10pt"/>
    </style:style>
    <style:style style:name="P15" style:family="paragraph">
      <loext:graphic-properties draw:fill="none"/>
      <style:text-properties style:font-name="FreeMono" fo:font-size="10pt" fo:font-weight="bold" style:font-size-asian="10pt" style:font-weight-asian="bold" style:font-size-complex="10pt" style:font-weight-complex="bold"/>
    </style:style>
    <style:style style:name="P16" style:family="paragraph">
      <style:paragraph-properties fo:margin-left="0cm" fo:margin-right="0cm" fo:text-align="center" fo:text-indent="0cm"/>
      <style:text-properties style:font-name="Liberation Sans1" fo:font-size="12pt" style:letter-kerning="true" style:font-name-asian="Noto Sans CJK SC" style:font-size-asian="18pt" style:font-name-complex="Noto Sans Devanagari" style:font-size-complex="18pt"/>
    </style:style>
    <style:style style:name="P17" style:family="paragraph">
      <loext:graphic-properties draw:fill-color="#ffffff"/>
      <style:paragraph-properties fo:margin-left="0cm" fo:margin-right="0cm" fo:text-align="center" fo:text-indent="0cm" style:writing-mode="lr-tb"/>
      <style:text-properties style:font-name="Liberation Sans1" fo:font-size="12pt" style:letter-kerning="true" style:font-name-asian="Noto Sans CJK SC" style:font-size-asian="18pt" style:font-name-complex="Noto Sans Devanagari" style:font-size-complex="18pt"/>
    </style:style>
    <style:style style:name="P18" style:family="paragraph">
      <loext:graphic-properties draw:fill="none" draw:fill-color="#ffffff"/>
      <style:text-properties style:font-name="FreeMono" fo:font-size="10pt" style:font-size-asian="10pt" style:font-size-complex="10pt"/>
    </style:style>
    <style:style style:name="P19" style:family="paragraph">
      <style:paragraph-properties fo:margin-top="0.42cm" fo:margin-bottom="0.35cm"/>
      <style:text-properties fo:font-size="10pt" style:font-size-asian="10pt" style:font-size-complex="10pt"/>
    </style:style>
    <style:style style:name="P20" style:family="paragraph">
      <loext:graphic-properties draw:fill="none"/>
      <style:paragraph-properties fo:margin-top="0.42cm" fo:margin-bottom="0.35cm"/>
      <style:text-properties style:font-name="FreeMono" fo:font-size="10pt" fo:font-weight="bold" style:font-size-asian="10pt" style:font-weight-asian="bold" style:font-size-complex="10pt" style:font-weight-complex="bold"/>
    </style:style>
    <style:style style:name="P21" style:family="paragraph">
      <style:paragraph-properties fo:margin-top="0cm" fo:margin-bottom="0cm"/>
      <style:text-properties fo:font-size="10pt" style:font-size-asian="10pt" style:font-size-complex="10pt"/>
    </style:style>
    <style:style style:name="P22" style:family="paragraph">
      <loext:graphic-properties draw:fill="none"/>
      <style:paragraph-properties fo:margin-top="0cm" fo:margin-bottom="0cm"/>
      <style:text-properties style:font-name="FreeMono" fo:font-size="10pt" fo:font-weight="bold" style:font-size-asian="10pt" style:font-weight-asian="bold" style:font-size-complex="10pt" style:font-weight-complex="bold"/>
    </style:style>
    <style:style style:name="P23" style:family="paragraph">
      <style:paragraph-properties fo:margin-left="0cm" fo:margin-right="0cm" fo:margin-top="0cm" fo:margin-bottom="0cm" fo:line-height="100%" fo:text-align="center" fo:text-indent="0cm"/>
      <style:text-properties fo:font-size="12pt"/>
    </style:style>
    <style:style style:name="P24" style:family="paragraph">
      <loext:graphic-properties draw:fill-color="#ffffff"/>
      <style:paragraph-properties fo:text-align="center"/>
      <style:text-properties fo:font-size="12pt"/>
    </style:style>
    <style:style style:name="P25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  <style:text-properties fo:font-size="12pt"/>
    </style:style>
    <style:style style:name="P26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27" style:family="paragraph">
      <loext:graphic-properties draw:fill="none"/>
      <style:text-properties style:font-name="FreeMono" fo:font-size="10pt" fo:font-weight="normal" style:font-size-asian="10pt" style:font-weight-asian="normal" style:font-size-complex="10pt" style:font-weight-complex="normal"/>
    </style:style>
    <style:style style:name="P28" style:family="paragraph">
      <style:paragraph-properties fo:margin-left="0cm" fo:margin-right="0cm" fo:margin-top="0cm" fo:margin-bottom="0cm" fo:line-height="100%" fo:text-align="center" fo:text-indent="0cm"/>
      <style:text-properties style:font-name="Liberation Sans1" fo:font-size="12pt" style:letter-kerning="true" style:font-name-asian="Noto Sans CJK SC" style:font-size-asian="18pt" style:font-name-complex="Noto Sans Devanagari" style:font-size-complex="18pt"/>
    </style:style>
    <style:style style:name="P29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Liberation Sans1" fo:font-size="12pt" style:letter-kerning="true" style:font-name-asian="Noto Sans CJK SC" style:font-size-asian="18pt" style:font-name-complex="Noto Sans Devanagari" style:font-size-complex="18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FreeMono" fo:font-size="16pt" fo:font-weight="bold" style:font-size-asian="16pt" style:font-weight-asian="bold" style:font-size-complex="16pt" style:font-weight-complex="bold"/>
    </style:style>
    <style:style style:name="T4" style:family="text">
      <style:text-properties style:font-name="Liberation Sans" fo:font-size="16pt" style:font-size-asian="16pt" style:font-size-complex="16pt"/>
    </style:style>
    <style:style style:name="T5" style:family="text">
      <style:text-properties fo:font-size="12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font-name="FreeMono" fo:font-size="12pt" fo:font-weight="bold" style:font-weight-asian="bold" style:font-weight-complex="bold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FreeMono" fo:font-size="7pt" fo:font-style="normal" fo:text-shadow="none" style:text-underline-style="none" fo:font-weight="bold" style:letter-kerning="true" style:font-name-asian="Noto Sans CJK SC" style:font-size-asian="7pt" style:font-style-asian="normal" style:font-weight-asian="bold" style:font-name-complex="Noto Sans Devanagari" style:font-size-complex="7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font-name="FreeMono" fo:font-size="7pt" fo:font-weight="bold" style:font-size-asian="7pt" style:font-weight-asian="bold" style:font-size-complex="7pt" style:font-weight-complex="bold"/>
    </style:style>
    <style:style style:name="T10" style:family="text">
      <style:text-properties style:font-name="FreeMono" fo:font-size="10pt" fo:font-weight="bold" style:font-size-asian="10pt" style:font-weight-asian="bold" style:font-size-complex="10pt" style:font-weight-complex="bold"/>
    </style:style>
    <style:style style:name="T11" style:family="text">
      <style:text-properties style:font-name="FreeMono" fo:font-size="10pt" style:font-size-asian="10pt" style:font-size-complex="10pt"/>
    </style:style>
    <style:style style:name="T12" style:family="text">
      <style:text-properties style:font-name="FreeMono" fo:font-size="12pt" style:font-size-asian="12pt" style:font-size-complex="12pt"/>
    </style:style>
    <style:style style:name="T13" style:family="text">
      <style:text-properties fo:font-size="12pt" style:text-underline-style="none" fo:font-weight="bold" style:font-weight-asian="bold" style:font-weight-complex="bold"/>
    </style:style>
    <style:style style:name="T14" style:family="text">
      <style:text-properties style:font-name="Liberation Sans" fo:font-size="12pt" fo:font-weight="normal" style:font-weight-asian="normal" style:font-weight-complex="normal"/>
    </style:style>
    <style:style style:name="T15" style:family="text">
      <style:text-properties style:font-name="Liberation Sans" fo:font-size="12pt" fo:font-weight="bold" style:font-weight-asian="bold" style:font-weight-complex="bold"/>
    </style:style>
    <style:style style:name="T16" style:family="text">
      <style:text-properties style:font-name="FreeMono" fo:font-weight="bold" style:font-weight-asian="bold" style:font-weight-complex="bold"/>
    </style:style>
    <style:style style:name="T17" style:family="text">
      <style:text-properties style:font-name="Liberation sans" fo:font-size="12pt" fo:font-weight="normal" style:font-weight-asian="normal" style:font-weight-complex="normal"/>
    </style:style>
    <style:style style:name="T18" style:family="text">
      <style:text-properties style:font-name="FreeMono" fo:font-size="10pt" fo:font-weight="normal" style:font-size-asian="10pt" style:font-weight-asian="normal" style:font-size-complex="10pt" style:font-weight-complex="normal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FreeMono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25cm" svg:height="21.25cm" svg:x="10cm" svg:y="22.2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246cm" svg:height="7.907cm" svg:x="1.254cm" svg:y="1.231cm">
          <draw:image xlink:href="Pictures/1000000000000AD700001800EF26A2F4.jpg" xlink:type="simple" xlink:show="embed" xlink:actuate="onLoad" draw:mime-type="image/jpeg">
            <text:p/>
          </draw:image>
        </draw:frame>
        <draw:g draw:style-name="gr3">
          <draw:custom-shape draw:style-name="gr4" draw:text-style-name="P3" draw:layer="layout" svg:width="0.833cm" svg:height="0.857cm" svg:x="4.621cm" svg:y="9.338cm">
            <text:p/>
            <draw:enhanced-geometry svg:viewBox="0 0 21600 21600" draw:path-stretchpoint-x="10800" draw:path-stretchpoint-y="10800" draw:text-areas="?f3 ?f4 ?f5 ?f6" draw:type="round-rectangle" draw:modifiers="6012.5937031484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frame draw:style-name="gr5" draw:text-style-name="P2" draw:layer="layout" svg:width="0.573cm" svg:height="0.573cm" svg:x="4.756cm" svg:y="9.473cm">
            <draw:image xlink:href="Pictures/10000638000052C9000052C96C1D549D.svg" xlink:type="simple" xlink:show="embed" xlink:actuate="onLoad" draw:mime-type="image/svg+xml">
              <text:p/>
            </draw:image>
            <draw:image xlink:href="Pictures/10000001000002C3000002C393573DCE.png" xlink:type="simple" xlink:show="embed" xlink:actuate="onLoad" draw:mime-type="image/png"/>
          </draw:frame>
        </draw:g>
        <draw:g draw:style-name="gr3">
          <draw:custom-shape draw:style-name="gr6" draw:text-style-name="P3" draw:layer="layout" svg:width="0.865cm" svg:height="0.857cm" svg:x="2.121cm" svg:y="9.338cm">
            <text:p/>
            <draw:enhanced-geometry svg:viewBox="0 0 21600 21600" draw:path-stretchpoint-x="10800" draw:path-stretchpoint-y="10800" draw:text-areas="?f3 ?f4 ?f5 ?f6" draw:type="round-rectangle" draw:modifiers="6012.5937031484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frame draw:style-name="gr5" draw:text-style-name="P2" draw:layer="layout" svg:width="0.374cm" svg:height="0.349cm" svg:x="2.361cm" svg:y="9.586cm">
            <draw:image xlink:href="Pictures/100008220000371F0000336B6A08EB3B.svg" xlink:type="simple" xlink:show="embed" xlink:actuate="onLoad" draw:mime-type="image/svg+xml">
              <text:p/>
            </draw:image>
            <draw:image xlink:href="Pictures/1000000100000215000001F2F8D3F60E.png" xlink:type="simple" xlink:show="embed" xlink:actuate="onLoad" draw:mime-type="image/png"/>
          </draw:frame>
        </draw:g>
        <draw:g draw:style-name="gr3">
          <draw:custom-shape draw:style-name="gr6" draw:text-style-name="P3" draw:layer="layout" svg:width="0.865cm" svg:height="0.857cm" svg:x="3.387cm" svg:y="9.339cm">
            <text:p/>
            <draw:enhanced-geometry svg:viewBox="0 0 21600 21600" draw:path-stretchpoint-x="10800" draw:path-stretchpoint-y="10800" draw:text-areas="?f3 ?f4 ?f5 ?f6" draw:type="round-rectangle" draw:modifiers="6012.5937031484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frame draw:style-name="gr5" draw:text-style-name="P2" draw:layer="layout" svg:width="0.491cm" svg:height="0.491cm" svg:x="3.561cm" svg:y="9.528cm">
            <draw:image xlink:href="Pictures/100004BA000052C9000052C925C069A8.svg" xlink:type="simple" xlink:show="embed" xlink:actuate="onLoad" draw:mime-type="image/svg+xml">
              <text:p/>
            </draw:image>
            <draw:image xlink:href="Pictures/10000001000002C3000002C3DAE16A6C.png" xlink:type="simple" xlink:show="embed" xlink:actuate="onLoad" draw:mime-type="image/png"/>
          </draw:frame>
        </draw:g>
        <draw:g draw:style-name="gr7">
          <draw:path draw:style-name="gr8" draw:text-style-name="P4" draw:layer="layout" svg:width="0.391cm" svg:height="0.487cm" svg:x="2.73cm" svg:y="9.762cm" svg:viewBox="0 0 392 488" svg:d="M384 95c9 27 10 53 5 77-6 25-18 47-37 66s-44 33-76 43l-103 33 46 147-87 27-132-416 187-60c50-15 92-16 126-2 34 15 58 43 71 85zM297 124c-14-43-47-57-98-41l-90 29 43 135 92-30c24-7 41-19 50-35s10-35 3-58z">
            <text:p/>
          </draw:path>
          <draw:path draw:style-name="gr8" draw:text-style-name="P4" draw:layer="layout" svg:width="0.328cm" svg:height="0.537cm" svg:x="3.128cm" svg:y="9.71cm" svg:viewBox="0 0 329 538" svg:d="M220 525c-20 6-37 10-53 13l-19-60c11-1 21-4 29-6 12-4 21-9 28-15s12-15 15-26c4-10 6-27 7-50l-227-277 88-28 98 134c14 19 35 49 61 90l-2-31-3-75v-166l87-28-20 377c-4 46-12 80-26 102-13 21-34 37-63 46z">
            <text:p/>
          </draw:path>
          <draw:path draw:style-name="gr8" draw:text-style-name="P4" draw:layer="layout" svg:width="0.286cm" svg:height="0.406cm" svg:x="3.468cm" svg:y="9.593cm" svg:viewBox="0 0 287 407" svg:d="M220 402c-25 8-45 7-63-2-17-9-30-27-39-54l-60-188-40 12-18-56 45-14 2-83 52-17 24 75 60-19 18 56-61 20 53 165c5 16 12 27 20 32 8 6 19 6 31 2 6-2 15-6 26-13l17 52c-19 13-41 24-67 32z">
            <text:p/>
          </draw:path>
          <draw:path draw:style-name="gr8" draw:text-style-name="P4" draw:layer="layout" svg:width="0.428cm" svg:height="0.464cm" svg:x="3.666cm" svg:y="9.485cm" svg:viewBox="0 0 429 465" svg:d="M140 183c3-28 12-50 25-67 14-16 32-28 56-35 33-11 63-9 88 6 24 15 43 43 56 83l64 203-83 27-56-180c-18-56-46-78-84-66-20 6-34 20-41 41-6 22-6 46 3 73l54 171-83 26-139-439 83-26 38 120c7 21 13 43 18 64z">
            <text:p/>
          </draw:path>
          <draw:path draw:style-name="gr8" draw:text-style-name="P4" draw:layer="layout" svg:width="0.344cm" svg:height="0.353cm" svg:x="4.094cm" svg:y="9.451cm" svg:viewBox="0 0 345 354" svg:d="M334 126c16 52 15 97-5 136-19 38-54 65-105 82-50 15-94 13-131-7-38-21-65-57-82-109-16-51-15-96 4-135 19-38 54-65 105-82 53-16 97-15 134 5 36 20 63 56 80 110zM247 153c-12-38-27-63-45-76-18-14-39-16-62-9-51 16-64 60-42 133 12 35 27 60 45 75s39 18 62 11c51-16 65-61 42-134z">
            <text:p/>
          </draw:path>
          <draw:path draw:style-name="gr8" draw:text-style-name="P4" draw:layer="layout" svg:width="0.393cm" svg:height="0.391cm" svg:x="4.441cm" svg:y="9.325cm" svg:viewBox="0 0 394 392" svg:d="M311 326l-57-180c-18-56-46-78-84-66-20 6-33 20-40 41-7 22-6 46 3 73l54 171-83 27-79-249c-5-17-10-31-14-42-4-10-8-20-11-29l79-25c2 4 6 14 12 30 6 15 10 26 12 33l1-1c4-28 12-50 26-67 13-16 32-28 55-35 34-11 63-9 88 6s44 43 56 83l65 204z">
            <text:p/>
          </draw:path>
        </draw:g>
        <draw:frame draw:style-name="gr5" draw:text-style-name="P2" draw:layer="layout" svg:width="2.545cm" svg:height="2.321cm" svg:x="11.903cm" svg:y="3.95cm">
          <draw:image xlink:href="Pictures/1000000000000094000000870FE7A350.png" xlink:type="simple" xlink:show="embed" xlink:actuate="onLoad" draw:mime-type="image/png">
            <text:p/>
          </draw:image>
        </draw:frame>
        <draw:frame draw:style-name="gr9" draw:text-style-name="P5" draw:layer="layout" svg:width="11.786cm" svg:height="0.763cm" svg:x="7.25cm" svg:y="2.737cm">
          <draw:text-box>
            <text:p><text:span text:style-name="T1">Surveillance des interruptions générées par les boutons</text:span></text:p>
          </draw:text-box>
        </draw:frame>
        <draw:frame draw:style-name="gr10" draw:text-style-name="P6" draw:layer="layout" svg:width="8.888cm" svg:height="0.962cm" svg:x="8.5cm" svg:y="1.5cm">
          <draw:text-box>
            <text:p><text:span text:style-name="T2">Logigramme de MAEL Scan</text:span></text:p>
          </draw:text-box>
        </draw:frame>
        <draw:custom-shape draw:style-name="gr11" draw:text-style-name="P8" xml:id="id1" draw:id="id1" draw:layer="layout" svg:width="4.5cm" svg:height="1.75cm" svg:x="10.875cm" svg:y="6.571cm">
          <text:p text:style-name="P7"><text:span text:style-name="T3">scan_bt</text:span></text:p>
          <text:p text:style-name="P7"><text:span text:style-name="T4">activé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2" draw:text-style-name="P10" xml:id="id2" draw:id="id2" draw:layer="layout" svg:width="4.75cm" svg:height="1.679cm" svg:x="10.75cm" svg:y="9.121cm">
          <text:p text:style-name="P9"><text:span text:style-name="T5">Scanner un code Q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3" draw:text-style-name="P10" xml:id="id3" draw:id="id3" draw:layer="layout" svg:width="6cm" svg:height="2cm" svg:x="10.125cm" svg:y="12.1cm">
          <text:p text:style-name="P9"><text:span text:style-name="T5">Commence par « WIFI: »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4" draw:text-style-name="P2" draw:layer="layout" draw:type="line" svg:x1="13.125cm" svg:y1="8.321cm" svg:x2="13.125cm" svg:y2="9.121cm" draw:start-shape="id1" draw:start-glue-point="6" draw:end-shape="id2" draw:end-glue-point="0" svg:d="M13125 8321v800" svg:viewBox="0 0 1 801">
          <text:p/>
        </draw:connector>
        <draw:connector draw:style-name="gr14" draw:text-style-name="P2" draw:layer="layout" draw:type="line" svg:x1="13.125cm" svg:y1="10.8cm" svg:x2="13.125cm" svg:y2="12.1cm" draw:start-shape="id2" draw:start-glue-point="2" draw:end-shape="id3" draw:end-glue-point="4" svg:d="M13125 10800v1300" svg:viewBox="0 0 1 1301">
          <text:p/>
        </draw:connector>
        <draw:connector draw:style-name="gr14" draw:text-style-name="P11" draw:layer="layout" draw:type="lines" draw:line-skew="-2.732cm" svg:x1="10.125cm" svg:y1="13.1cm" svg:x2="5.475cm" svg:y2="19.35cm" draw:start-shape="id3" draw:start-glue-point="5" draw:end-shape="id4" draw:end-glue-point="0" svg:d="M10125 13100h-3250l-1400 5731v519" svg:viewBox="0 0 4651 6251">
          <text:p/>
        </draw:connector>
        <draw:connector draw:style-name="gr15" draw:text-style-name="P11" draw:layer="layout" draw:type="line" svg:x1="13.125cm" svg:y1="17.55cm" svg:x2="13.125cm" svg:y2="19.471cm" draw:start-shape="id5" draw:start-glue-point="2" draw:end-shape="id6" draw:end-glue-point="0" svg:d="M13125 17550v1921" svg:viewBox="0 0 1 1922">
          <text:p/>
        </draw:connector>
        <draw:frame draw:style-name="gr16" draw:text-style-name="P12" draw:layer="layout" svg:width="1.088cm" svg:height="0.645cm" svg:x="11.75cm" svg:y="14.105cm">
          <draw:text-box>
            <text:p><text:span text:style-name="T6">non</text:span></text:p>
          </draw:text-box>
        </draw:frame>
        <draw:frame draw:style-name="gr17" draw:text-style-name="P12" draw:layer="layout" svg:width="0.971cm" svg:height="0.645cm" svg:x="9.25cm" svg:y="12.355cm">
          <draw:text-box>
            <text:p><text:span text:style-name="T6">oui</text:span></text:p>
          </draw:text-box>
        </draw:frame>
        <draw:custom-shape draw:style-name="gr12" draw:text-style-name="P10" xml:id="id4" draw:id="id4" draw:layer="layout" svg:width="4.75cm" svg:height="1.679cm" svg:x="3.1cm" svg:y="19.35cm">
          <text:p text:style-name="P9"><text:span text:style-name="T5">Analyser</text:span></text:p>
          <text:p text:style-name="P9"><text:span text:style-name="T7">MECARD-lik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2" draw:text-style-name="P10" xml:id="id7" draw:id="id7" draw:layer="layout" svg:width="4.75cm" svg:height="1.679cm" svg:x="3.1cm" svg:y="23.021cm">
          <text:p text:style-name="P9"><text:span text:style-name="T5">Configurer</text:span></text:p>
          <text:p text:style-name="P9"><text:span text:style-name="T5">le Wifi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5" draw:text-style-name="P11" draw:layer="layout" draw:type="line" svg:x1="5.475cm" svg:y1="21.029cm" svg:x2="5.475cm" svg:y2="23.021cm" draw:start-shape="id4" draw:start-glue-point="2" draw:end-shape="id7" draw:end-glue-point="0" svg:d="M5475 21029v1992" svg:viewBox="0 0 1 1993">
          <text:p/>
        </draw:connector>
        <draw:frame draw:style-name="gr18" draw:text-style-name="P13" draw:layer="layout" svg:width="4.5cm" svg:height="1.335cm" svg:x="1cm" svg:y="21.365cm">
          <draw:text-box>
            <text:p><text:span text:style-name="T8">('&lt;Cryptage&gt;</text:span><text:span text:style-name="T9"> : str', </text:span></text:p>
            <text:p><text:span text:style-name="T8"><text:s/>'&lt;SSID&gt;</text:span><text:span text:style-name="T9"> : str', </text:span></text:p>
            <text:p><text:span text:style-name="T8"><text:s/>'&lt;mot_de_passe&gt;</text:span><text:span text:style-name="T9"> : str', </text:span></text:p>
            <text:p><text:span text:style-name="T8"><text:s/>'&lt;Réseau_masqué&gt; : bool</text:span><text:span text:style-name="T9">')</text:span></text:p>
          </draw:text-box>
        </draw:frame>
        <draw:custom-shape draw:style-name="gr12" draw:text-style-name="P10" xml:id="id6" draw:id="id6" draw:layer="layout" svg:width="4.75cm" svg:height="1.679cm" svg:x="10.75cm" svg:y="19.471cm">
          <text:p text:style-name="P9"><text:span text:style-name="T5">Analyser la structure de donnée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9" draw:text-style-name="P15" draw:layer="layout" svg:width="5.6cm" svg:height="0.602cm" svg:x="13.4cm" svg:y="11.148cm">
          <draw:text-box>
            <text:p text:style-name="P14"><text:span text:style-name="T10">crypt_qr_content : str</text:span></text:p>
          </draw:text-box>
        </draw:frame>
        <draw:custom-shape draw:style-name="gr20" draw:text-style-name="P10" xml:id="id8" draw:id="id8" draw:layer="layout" svg:width="6.25cm" svg:height="2cm" svg:x="10cm" svg:y="22.85cm">
          <text:p text:style-name="P9"><text:span text:style-name="T5">C’est un</text:span></text:p>
          <text:p text:style-name="P9"><text:span text:style-name="T7">ID opaqu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1" draw:text-style-name="P17" xml:id="id13" draw:id="id13" draw:layer="layout" svg:width="4.95cm" svg:height="1.679cm" svg:x="27.256cm" svg:y="22.95cm">
          <text:p text:style-name="P16">Re-constructeur de liens externes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0" draw:text-style-name="P10" xml:id="id9" draw:id="id9" draw:layer="layout" svg:width="6.25cm" svg:height="2cm" svg:x="10cm" svg:y="31.65cm">
          <text:p text:style-name="P9"><text:span text:style-name="T5">C’est un</text:span></text:p>
          <text:p text:style-name="P9"><text:span text:style-name="T7">mp3 inclu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2" draw:text-style-name="P18" draw:layer="layout" svg:width="3.453cm" svg:height="0.602cm" svg:x="33.047cm" svg:y="52.85cm">
          <draw:text-box>
            <text:p><text:span text:style-name="T11">Pour plus tard</text:span></text:p>
          </draw:text-box>
        </draw:frame>
        <draw:connector draw:style-name="gr15" draw:text-style-name="P11" draw:layer="layout" draw:type="line" svg:x1="13.125cm" svg:y1="21.15cm" svg:x2="13.125cm" svg:y2="22.85cm" draw:start-shape="id6" draw:start-glue-point="2" draw:end-shape="id8" draw:end-glue-point="4" svg:d="M13125 21150v1700" svg:viewBox="0 0 1 1701">
          <text:p/>
        </draw:connector>
        <draw:connector draw:style-name="gr15" draw:text-style-name="P11" draw:layer="layout" draw:type="line" svg:x1="13.125cm" svg:y1="24.85cm" svg:x2="13.125cm" svg:y2="31.65cm" draw:start-shape="id8" draw:start-glue-point="6" draw:end-shape="id9" draw:end-glue-point="4" svg:d="M13125 24850v6800" svg:viewBox="0 0 1 6801">
          <text:p/>
        </draw:connector>
        <draw:connector draw:style-name="gr15" draw:text-style-name="P11" draw:layer="layout" draw:type="line" svg:x1="16.25cm" svg:y1="23.85cm" svg:x2="18.25cm" svg:y2="23.85cm" draw:start-shape="id8" draw:end-shape="id10" svg:d="M16250 23850h2000" svg:viewBox="0 0 2001 1">
          <text:p/>
        </draw:connector>
        <draw:custom-shape draw:style-name="gr23" draw:text-style-name="P10" xml:id="id11" draw:id="id11" draw:layer="layout" svg:width="5.5cm" svg:height="1.679cm" svg:x="19.25cm" svg:y="31.8cm">
          <text:p text:style-name="P9"><text:span text:style-name="T5">Re-constructeur de liens internes immuable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5" draw:text-style-name="P11" draw:layer="layout" draw:type="line" svg:x1="16.25cm" svg:y1="32.65cm" svg:x2="19.25cm" svg:y2="32.639cm" draw:start-shape="id9" draw:start-glue-point="7" draw:end-shape="id11" draw:end-glue-point="3" svg:d="M16250 32650l3000-11" svg:viewBox="0 0 3001 12">
          <text:p/>
        </draw:connector>
        <draw:frame draw:style-name="gr19" draw:text-style-name="P15" draw:layer="layout" svg:width="3.35cm" svg:height="1.304cm" svg:x="16.2cm" svg:y="22.403cm">
          <draw:text-box>
            <text:p text:style-name="P14"><text:span text:style-name="T10">id_IDopaque,</text:span></text:p>
            <text:p text:style-name="P14"><text:span text:style-name="T10">drive_name,</text:span></text:p>
            <text:p text:style-name="P14"><text:span text:style-name="T10">file_id</text:span></text:p>
          </draw:text-box>
        </draw:frame>
        <draw:frame draw:style-name="gr24" draw:text-style-name="P20" draw:layer="layout" svg:width="2.85cm" svg:height="1.655cm" svg:x="16.25cm" svg:y="31.2cm">
          <draw:text-box>
            <text:p text:style-name="P19"><text:span text:style-name="T10">id_assets, language, word</text:span></text:p>
          </draw:text-box>
        </draw:frame>
        <draw:custom-shape draw:style-name="gr20" draw:text-style-name="P10" xml:id="id12" draw:id="id12" draw:layer="layout" svg:width="6.25cm" svg:height="2cm" svg:x="10cm" svg:y="40.85cm">
          <text:p text:style-name="P9"><text:span text:style-name="T5">C’est un</text:span></text:p>
          <text:p text:style-name="P9"><text:span text:style-name="T7">M3SQ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5" draw:text-style-name="P22" draw:layer="layout" svg:width="3.35cm" svg:height="1.655cm" svg:x="16.25cm" svg:y="39.9cm">
          <draw:text-box>
            <text:p text:style-name="P21"><text:span text:style-name="T10">id_m3sq,</text:span></text:p>
            <text:p text:style-name="P21"><text:span text:style-name="T10">prefixe,</text:span></text:p>
            <text:p text:style-name="P21"><text:span text:style-name="T10">payload,</text:span></text:p>
            <text:p text:style-name="P21"><text:span text:style-name="T10">suffixe</text:span></text:p>
          </draw:text-box>
        </draw:frame>
        <draw:connector draw:style-name="gr15" draw:text-style-name="P11" draw:layer="layout" draw:type="line" svg:x1="13.125cm" svg:y1="33.65cm" svg:x2="13.125cm" svg:y2="40.85cm" draw:start-shape="id9" draw:start-glue-point="6" draw:end-shape="id12" draw:end-glue-point="4" svg:d="M13125 33650v7200" svg:viewBox="0 0 1 7201">
          <text:p/>
        </draw:connector>
        <draw:frame draw:style-name="gr22" draw:text-style-name="P18" draw:layer="layout" svg:width="2.821cm" svg:height="2.006cm" svg:x="9.929cm" svg:y="39cm">
          <draw:text-box>
            <text:p><text:span text:style-name="T10">M</text:span><text:span text:style-name="T11">AEL </text:span></text:p>
            <text:p><text:span text:style-name="T10">S</text:span><text:span text:style-name="T11">yntax for </text:span></text:p>
            <text:p><text:span text:style-name="T10">S</text:span><text:span text:style-name="T11">ynthetic </text:span></text:p>
            <text:p><text:span text:style-name="T10">S</text:span><text:span text:style-name="T11">peech in </text:span></text:p>
            <text:p><text:span text:style-name="T10">Q</text:span><text:span text:style-name="T11">Rcodes</text:span></text:p>
          </draw:text-box>
        </draw:frame>
        <draw:custom-shape draw:style-name="gr26" draw:text-style-name="P17" xml:id="id14" draw:id="id14" draw:layer="layout" svg:width="7.2cm" svg:height="2.4cm" svg:x="26.15cm" svg:y="19.1cm">
          <text:p text:style-name="P16">DL .mp3</text:p>
          <text:p text:style-name="P16">Actualiser la DB des Idopaques</text:p>
          <text:p text:style-name="P16"><text:span text:style-name="T12">#, IDopaque, titr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7" draw:text-style-name="P17" xml:id="id19" draw:id="id19" draw:layer="layout" svg:width="5.45cm" svg:height="1.679cm" svg:x="38.3cm" svg:y="31.621cm">
          <text:p text:style-name="P16">Jouer le son</text:p>
          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
        </draw:custom-shape>
        <draw:connector draw:style-name="gr15" draw:text-style-name="P11" draw:layer="layout" draw:type="line" svg:x1="29.731cm" svg:y1="22.95cm" svg:x2="29.75cm" svg:y2="21.5cm" draw:start-shape="id13" draw:start-glue-point="0" draw:end-shape="id14" draw:end-glue-point="2" svg:d="M29731 22950l19-1450" svg:viewBox="0 0 20 1451">
          <text:p/>
        </draw:connector>
        <draw:custom-shape draw:style-name="gr28" draw:text-style-name="P24" xml:id="id15" draw:id="id15" draw:layer="layout" svg:width="6cm" svg:height="2.75cm" svg:x="25.026cm" svg:y="49.944cm">
          <text:p text:style-name="P9"><text:span text:style-name="T2">GTTS</text:span></text:p>
          <text:p text:style-name="P23"><text:span text:style-name="T5">Correspondances :</text:span></text:p>
          <text:p text:style-name="P23"><text:span text:style-name="T5">préfixes → langues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9" draw:text-style-name="P24" xml:id="id23" draw:id="id23" draw:layer="layout" svg:width="3.25cm" svg:height="2cm" svg:x="28.1cm" svg:y="25.8cm">
          <text:p text:style-name="P9">Adresses des Drives</text:p>
          <draw:enhanced-geometry svg:viewBox="0 0 21600 21600" draw:text-areas="4230 4230 21600 21600" draw:mirror-horizontal="false" draw:mirror-vertical="false" draw:type="flowchart-internal-storage" draw:enhanced-path="M 0 0 L 21600 0 21600 21600 0 21600 Z N M 4230 0 L 4230 21600 N M 0 4230 L 21600 4230 N"/>
        </draw:custom-shape>
        <draw:custom-shape draw:style-name="gr28" draw:text-style-name="P24" xml:id="id17" draw:id="id17" draw:layer="layout" svg:width="6cm" svg:height="2.75cm" svg:x="31.776cm" svg:y="49.944cm">
          <text:p text:style-name="P9"><text:span text:style-name="T2">TTS XXX ?</text:span></text:p>
          <text:p text:style-name="P9">Correspondances :</text:p>
          <text:p text:style-name="P9">préfixes → langues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30" draw:text-style-name="P24" xml:id="id21" draw:id="id21" draw:layer="layout" svg:width="8.5cm" svg:height="3.5cm" svg:x="18.31cm" svg:y="45.844cm">
          <text:p text:style-name="P9"><text:span text:style-name="T2">lettres_names</text:span></text:p>
          <text:p text:style-name="P9">Correspondances :</text:p>
          <text:p text:style-name="P9">« é » → « e accent aigü »</text:p>
          <text:p text:style-name="P9">« ? » → « point d’interrogation »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31" draw:text-style-name="P25" xml:id="id16" draw:id="id16" draw:layer="layout" svg:width="7cm" svg:height="1.5cm" svg:x="28.076cm" svg:y="44.744cm">
          <text:p text:style-name="P23"><text:span text:style-name="T5">Configuration de la voix de synthèse selon </text:span><text:span text:style-name="T13">préfix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32" draw:text-style-name="P10" xml:id="id20" draw:id="id20" draw:layer="layout" svg:width="5.5cm" svg:height="3.094cm" svg:x="19.8cm" svg:y="39.6cm">
          <text:p text:style-name="P9"><text:span text:style-name="T5">Construction de</text:span></text:p>
          <text:p text:style-name="P9"><text:span text:style-name="T7">to_say</text:span></text:p>
          <text:p text:style-name="P9"><text:span text:style-name="T7">to_show</text:span></text:p>
          <text:p text:style-name="P9"><text:span text:style-name="T14">Selon </text:span><text:span text:style-name="T15">suffixe </text:span><text:span text:style-name="T14">et</text:span><text:span text:style-name="T15"> payload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5" draw:text-style-name="P11" draw:layer="layout" draw:type="lines" svg:x1="28.026cm" svg:y1="49.944cm" svg:x2="31.576cm" svg:y2="46.244cm" draw:start-shape="id15" draw:start-glue-point="0" draw:end-shape="id16" draw:end-glue-point="6" svg:d="M28026 49944v-518l3550-2663v-519" svg:viewBox="0 0 3551 3701">
          <text:p/>
        </draw:connector>
        <draw:connector draw:style-name="gr15" draw:text-style-name="P11" draw:layer="layout" draw:type="lines" svg:x1="34.776cm" svg:y1="49.944cm" svg:x2="31.576cm" svg:y2="46.244cm" draw:start-shape="id17" draw:start-glue-point="0" draw:end-shape="id16" draw:end-glue-point="6" svg:d="M34776 49944v-518l-3200-2663v-519" svg:viewBox="0 0 3201 3701">
          <text:p/>
        </draw:connector>
        <draw:custom-shape draw:style-name="gr23" draw:text-style-name="P10" xml:id="id18" draw:id="id18" draw:layer="layout" svg:width="5.5cm" svg:height="1.679cm" svg:x="28.8cm" svg:y="40.344cm">
          <text:p text:style-name="P9"><text:span text:style-name="T14">Appel de la voix de synthès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5" draw:text-style-name="P11" draw:layer="layout" draw:type="lines" draw:line-skew="0cm -0.282cm" svg:x1="34.3cm" svg:y1="41.183cm" svg:x2="38.3cm" svg:y2="32.46cm" draw:start-shape="id18" draw:start-glue-point="1" draw:end-shape="id19" draw:end-glue-point="3" svg:d="M34300 41183h519l2681-8723h800" svg:viewBox="0 0 4001 8724">
          <text:p/>
        </draw:connector>
        <draw:frame draw:style-name="gr33" draw:text-style-name="P20" draw:layer="layout" svg:width="1.5cm" svg:height="0.602cm" svg:x="35cm" svg:y="26.998cm">
          <draw:text-box>
            <text:p text:style-name="P19"><text:span text:style-name="T10">mp3</text:span></text:p>
          </draw:text-box>
        </draw:frame>
        <draw:connector draw:style-name="gr15" draw:text-style-name="P11" draw:layer="layout" draw:type="line" svg:x1="25.3cm" svg:y1="41.147cm" svg:x2="28.8cm" svg:y2="41.183cm" draw:start-shape="id20" draw:start-glue-point="1" draw:end-shape="id18" draw:end-glue-point="3" svg:d="M25300 41147l3500 36" svg:viewBox="0 0 3501 37">
          <text:p/>
        </draw:connector>
        <draw:frame draw:style-name="gr34" draw:text-style-name="P20" draw:layer="layout" svg:width="2cm" svg:height="0.602cm" svg:x="26cm" svg:y="41.339cm">
          <draw:text-box>
            <text:p text:style-name="P19"><text:span text:style-name="T10">to_say</text:span></text:p>
          </draw:text-box>
        </draw:frame>
        <draw:connector draw:style-name="gr15" draw:text-style-name="P11" draw:layer="layout" draw:type="lines" svg:x1="22.56cm" svg:y1="45.844cm" svg:x2="22.55cm" svg:y2="42.694cm" draw:start-shape="id21" draw:start-glue-point="0" draw:end-shape="id20" draw:end-glue-point="2" svg:d="M22560 45844v-518l-10-2113v-519" svg:viewBox="0 0 11 3151">
          <text:p/>
        </draw:connector>
        <draw:connector draw:style-name="gr15" draw:text-style-name="P11" draw:layer="layout" draw:type="line" svg:x1="16.25cm" svg:y1="41.85cm" svg:x2="19.8cm" svg:y2="41.147cm" draw:start-shape="id12" draw:start-glue-point="7" draw:end-shape="id20" draw:end-glue-point="3" svg:d="M16250 41850l3550-703" svg:viewBox="0 0 3551 704">
          <text:p/>
        </draw:connector>
        <draw:connector draw:style-name="gr15" draw:text-style-name="P11" draw:layer="layout" draw:type="lines" svg:x1="16.25cm" svg:y1="41.85cm" svg:x2="28.076cm" svg:y2="45.494cm" draw:start-shape="id12" draw:start-glue-point="7" draw:end-shape="id16" draw:end-glue-point="5" svg:d="M16250 41850h518l10790 3644h518" svg:viewBox="0 0 11827 3645">
          <text:p/>
        </draw:connector>
        <draw:connector draw:style-name="gr15" draw:text-style-name="P11" draw:layer="layout" draw:type="line" svg:x1="31.576cm" svg:y1="44.744cm" svg:x2="31.55cm" svg:y2="42.023cm" draw:start-shape="id16" draw:start-glue-point="4" draw:end-shape="id18" draw:end-glue-point="2" svg:d="M31576 44744l-26-2721" svg:viewBox="0 0 27 2722">
          <text:p/>
        </draw:connector>
        <draw:connector draw:style-name="gr15" draw:text-style-name="P11" draw:layer="layout" draw:type="lines" svg:x1="24.75cm" svg:y1="32.639cm" svg:x2="38.3cm" svg:y2="32.46cm" draw:start-shape="id11" draw:start-glue-point="1" draw:end-shape="id19" draw:end-glue-point="3" svg:d="M24750 32639h519l12513-179h518" svg:viewBox="0 0 13551 180">
          <text:p/>
        </draw:connector>
        <draw:frame draw:style-name="gr33" draw:text-style-name="P20" draw:layer="layout" svg:width="1.5cm" svg:height="0.602cm" svg:x="31.5cm" svg:y="31.85cm">
          <draw:text-box>
            <text:p text:style-name="P19"><text:span text:style-name="T10">mp3</text:span></text:p>
          </draw:text-box>
        </draw:frame>
        <draw:custom-shape draw:style-name="gr35" draw:text-style-name="P24" xml:id="id22" draw:id="id22" draw:layer="layout" svg:width="4.12cm" svg:height="2cm" svg:x="19.308cm" svg:y="26.4cm">
          <text:p text:style-name="P9">DB des <text:span text:style-name="T16">IDopaques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36" draw:text-style-name="P10" xml:id="id10" draw:id="id10" draw:layer="layout" svg:width="6.25cm" svg:height="2.5cm" svg:x="18.25cm" svg:y="22.6cm">
          <text:p text:style-name="P9"><text:span text:style-name="T7">ID opaque </text:span><text:span text:style-name="T17">est déjà présente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onnector draw:style-name="gr15" draw:text-style-name="P11" draw:layer="layout" draw:type="lines" svg:x1="21.368cm" svg:y1="26.4cm" svg:x2="21.375cm" svg:y2="25.1cm" draw:start-shape="id22" draw:start-glue-point="0" draw:end-shape="id10" draw:end-glue-point="6" svg:d="M21368 26400v-518l7-263v-519" svg:viewBox="0 0 8 1301">
          <text:p/>
        </draw:connector>
        <draw:connector draw:style-name="gr15" draw:text-style-name="P11" draw:layer="layout" draw:type="line" svg:x1="24.5cm" svg:y1="23.85cm" svg:x2="27.256cm" svg:y2="23.789cm" draw:start-shape="id10" draw:start-glue-point="7" draw:end-shape="id13" draw:end-glue-point="3" svg:d="M24500 23850l2756-61" svg:viewBox="0 0 2757 62">
          <text:p/>
        </draw:connector>
        <draw:frame draw:style-name="gr16" draw:text-style-name="P12" draw:layer="layout" svg:width="1.088cm" svg:height="0.645cm" svg:x="24.412cm" svg:y="23.05cm">
          <draw:text-box>
            <text:p><text:span text:style-name="T6">non</text:span></text:p>
          </draw:text-box>
        </draw:frame>
        <draw:frame draw:style-name="gr17" draw:text-style-name="P12" draw:layer="layout" svg:width="0.971cm" svg:height="0.645cm" svg:x="20.5cm" svg:y="21.85cm">
          <draw:text-box>
            <text:p><text:span text:style-name="T6">oui</text:span></text:p>
          </draw:text-box>
        </draw:frame>
        <draw:connector draw:style-name="gr15" draw:text-style-name="P11" draw:layer="layout" draw:type="lines" svg:x1="29.725cm" svg:y1="25.8cm" svg:x2="29.731cm" svg:y2="24.629cm" draw:start-shape="id23" draw:start-glue-point="0" draw:end-shape="id13" draw:end-glue-point="2" svg:d="M29725 25800v-518l6-135v-518" svg:viewBox="0 0 7 1172">
          <text:p/>
        </draw:connector>
        <draw:connector draw:style-name="gr15" draw:text-style-name="P11" draw:layer="layout" draw:type="lines" draw:line-skew="-4.232cm -0.682cm" svg:x1="21.375cm" svg:y1="22.6cm" svg:x2="29.75cm" svg:y2="19.1cm" draw:start-shape="id10" draw:start-glue-point="4" draw:end-shape="id14" draw:end-glue-point="0" svg:d="M21375 22600v-4750l8375 50v1200" svg:viewBox="0 0 8376 4751">
          <text:p/>
        </draw:connector>
        <draw:frame draw:style-name="gr33" draw:text-style-name="P27" draw:layer="layout" svg:width="2.75cm" svg:height="0.602cm" svg:x="10cm" svg:y="22.3cm">
          <draw:text-box>
            <text:p text:style-name="P26"><text:span text:style-name="T18">match/case</text:span></text:p>
          </draw:text-box>
        </draw:frame>
        <draw:frame draw:style-name="gr37" draw:text-style-name="P27" draw:layer="layout" svg:width="3.25cm" svg:height="0.602cm" svg:x="26.5cm" svg:y="17.1cm">
          <draw:text-box>
            <text:p text:style-name="P26"><text:span text:style-name="T18">Actualiser #</text:span></text:p>
          </draw:text-box>
        </draw:frame>
        <draw:frame draw:style-name="gr37" draw:text-style-name="P27" draw:layer="layout" svg:width="3.25cm" svg:height="0.953cm" svg:x="29.85cm" svg:y="21.647cm">
          <draw:text-box>
            <text:p text:style-name="P26"><text:span text:style-name="T18">Ajouter</text:span></text:p>
            <text:p text:style-name="P26"><text:span text:style-name="T18">IDopaque</text:span></text:p>
          </draw:text-box>
        </draw:frame>
        <draw:frame draw:style-name="gr37" draw:text-style-name="P27" draw:layer="layout" svg:width="3.25cm" svg:height="1.655cm" svg:x="30.25cm" svg:y="16.85cm">
          <draw:text-box>
            <text:p text:style-name="P26"><text:span text:style-name="T18">Pour effacer les fichiers les plus anciens</text:span></text:p>
          </draw:text-box>
        </draw:frame>
        <draw:connector draw:style-name="gr15" draw:text-style-name="P11" draw:layer="layout" draw:type="lines" draw:line-skew="0cm -0.532cm" svg:x1="32.206cm" svg:y1="23.789cm" svg:x2="38.3cm" svg:y2="32.46cm" draw:start-shape="id13" draw:start-glue-point="1" draw:end-shape="id19" draw:end-glue-point="3" svg:d="M32206 23789h519l4525 8671h1050" svg:viewBox="0 0 6095 8672">
          <text:p/>
        </draw:connector>
        <draw:frame draw:style-name="gr33" draw:text-style-name="P20" draw:layer="layout" svg:width="1.5cm" svg:height="0.602cm" svg:x="34.75cm" svg:y="37.748cm">
          <draw:text-box>
            <text:p text:style-name="P19"><text:span text:style-name="T10">mp3</text:span></text:p>
          </draw:text-box>
        </draw:frame>
        <draw:custom-shape draw:style-name="gr38" draw:text-style-name="P24" xml:id="id24" draw:id="id24" draw:layer="layout" svg:width="3.75cm" svg:height="1.75cm" svg:x="46.25cm" svg:y="31.6cm">
          <text:p text:style-name="P9">Afficher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5" draw:text-style-name="P11" draw:layer="layout" draw:type="lines" svg:x1="43.75cm" svg:y1="32.46cm" svg:x2="46.25cm" svg:y2="32.475cm" draw:start-shape="id19" draw:start-glue-point="1" draw:end-shape="id24" draw:end-glue-point="5" svg:d="M43750 32460h519l1463 15h518" svg:viewBox="0 0 2501 16">
          <text:p/>
        </draw:connector>
        <draw:connector draw:style-name="gr15" draw:text-style-name="P11" draw:layer="layout" draw:type="lines" svg:x1="22.55cm" svg:y1="39.6cm" svg:x2="48.125cm" svg:y2="33.35cm" draw:start-shape="id20" draw:start-glue-point="0" draw:end-shape="id24" draw:end-glue-point="6" svg:d="M22550 39600v-518l25575-5213v-519" svg:viewBox="0 0 25576 6251">
          <text:p/>
        </draw:connector>
        <draw:frame draw:style-name="gr34" draw:text-style-name="P20" draw:layer="layout" svg:width="2cm" svg:height="0.602cm" svg:x="27.25cm" svg:y="36.998cm">
          <draw:text-box>
            <text:p text:style-name="P19"><text:span text:style-name="T10">to_show</text:span></text:p>
          </draw:text-box>
        </draw:frame>
        <draw:custom-shape draw:style-name="gr12" draw:text-style-name="P10" xml:id="id5" draw:id="id5" draw:layer="layout" svg:width="4.75cm" svg:height="1.679cm" svg:x="10.75cm" svg:y="15.871cm">
          <text:p text:style-name="P9"><text:span text:style-name="T5">Décrypteu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4" draw:text-style-name="P2" draw:layer="layout" draw:type="line" svg:x1="13.125cm" svg:y1="14.1cm" svg:x2="13.125cm" svg:y2="15.871cm" draw:start-shape="id3" draw:start-glue-point="6" draw:end-shape="id5" draw:end-glue-point="0" svg:d="M13125 14100v1771" svg:viewBox="0 0 1 1772">
          <text:p/>
        </draw:connector>
        <draw:frame draw:style-name="gr39" draw:text-style-name="P15" draw:layer="layout" svg:width="4.6cm" svg:height="0.75cm" svg:x="13.4cm" svg:y="14.55cm">
          <draw:text-box>
            <text:p text:style-name="P14"><text:span text:style-name="T10">crypt_qr_content</text:span></text:p>
          </draw:text-box>
        </draw:frame>
        <draw:frame draw:style-name="gr33" draw:text-style-name="P15" draw:layer="layout" svg:width="3.1cm" svg:height="0.602cm" svg:x="13.4cm" svg:y="18.25cm">
          <draw:text-box>
            <text:p text:style-name="P14"><text:span text:style-name="T10">qr_content</text:span></text:p>
          </draw:text-box>
        </draw:frame>
        <draw:frame draw:style-name="gr19" draw:text-style-name="P15" draw:layer="layout" svg:width="5.6cm" svg:height="0.602cm" draw:transform="rotate (1.33779487165365) translate (5.011cm 17.756cm)">
          <draw:text-box>
            <text:p text:style-name="P14"><text:span text:style-name="T10">crypt_qr_content</text:span></text:p>
          </draw:text-box>
        </draw:frame>
      </draw:page>
      <draw:page draw:name="page2" draw:style-name="dp1" draw:master-page-name="Standard">
        <draw:custom-shape draw:style-name="gr40" draw:text-style-name="P29" xml:id="id25" draw:id="id25" draw:layer="layout" svg:width="7cm" svg:height="2cm" svg:x="5.25cm" svg:y="2.8cm">
          <text:p text:style-name="P28"><text:span text:style-name="T19">Suffixe = </text:span><text:span text:style-name="T20">"l"</text:span></text:p>
          <text:p text:style-name="P28"><text:span text:style-name="T20">lir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1" draw:text-style-name="P29" xml:id="id26" draw:id="id26" draw:layer="layout" svg:width="7cm" svg:height="2cm" svg:x="5.25cm" svg:y="5.6cm">
          <text:p text:style-name="P28"><text:span text:style-name="T19">Suffixe = </text:span><text:span text:style-name="T20">"c"</text:span></text:p>
          <text:p text:style-name="P28"><text:span text:style-name="T20">cacher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5" draw:text-style-name="P11" draw:layer="layout" draw:type="line" svg:x1="8.75cm" svg:y1="4.8cm" svg:x2="8.75cm" svg:y2="5.6cm" draw:start-shape="id25" draw:start-glue-point="6" draw:end-shape="id26" draw:end-glue-point="4" svg:d="M8750 4800v800" svg:viewBox="0 0 1 801">
          <text:p/>
        </draw:connector>
        <draw:custom-shape draw:style-name="gr42" draw:text-style-name="P29" xml:id="id27" draw:id="id27" draw:layer="layout" svg:width="7cm" svg:height="2cm" svg:x="5.25cm" svg:y="8.3cm">
          <text:p text:style-name="P28"><text:span text:style-name="T19">Suffixe = </text:span><text:span text:style-name="T20">"d"</text:span></text:p>
          <text:p text:style-name="P28"><text:span text:style-name="T20">dicter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5" draw:text-style-name="P11" draw:layer="layout" draw:type="line" svg:x1="8.75cm" svg:y1="7.6cm" svg:x2="8.75cm" svg:y2="8.3cm" draw:start-shape="id26" draw:start-glue-point="6" draw:end-shape="id27" draw:end-glue-point="4" svg:d="M8750 7600v700" svg:viewBox="0 0 1 701">
          <text:p/>
        </draw:connector>
        <draw:custom-shape draw:style-name="gr43" draw:text-style-name="P29" xml:id="id28" draw:id="id28" draw:layer="layout" svg:width="7cm" svg:height="2cm" svg:x="5.25cm" svg:y="11cm">
          <text:p text:style-name="P28"><text:span text:style-name="T19">Suffixe = </text:span><text:span text:style-name="T20">"e"</text:span></text:p>
          <text:p text:style-name="P28"><text:span text:style-name="T20">épeler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5" draw:text-style-name="P11" draw:layer="layout" draw:type="line" svg:x1="8.75cm" svg:y1="10.3cm" svg:x2="8.75cm" svg:y2="11cm" draw:end-shape="id28" draw:end-glue-point="4" svg:d="M8750 10300v700" svg:viewBox="0 0 1 7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60cm" fo:page-height="6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9T11:50:15.100636630</meta:creation-date>
    <dc:date>2026-05-16T15:21:57.847611282</dc:date>
    <meta:editing-duration>PT4H29M46S</meta:editing-duration>
    <meta:editing-cycles>189</meta:editing-cycles>
    <meta:generator>LibreOffice/26.2.3.2$Linux_X86_64 LibreOffice_project/70e089b17412e4cb7773e41413306b17a2328c34</meta:generator>
    <meta:document-statistic meta:object-count="103"/>
  </office:meta>
</office:document-meta>
</file>