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29cm" fo:min-width="4.292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32cm" fo:min-width="6.303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2.466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7cm" fo:min-width="2.754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5.966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4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top="0cm" fo:margin-bottom="0cm" fo:text-align="center"/>
      <style:text-properties fo:font-size="12pt"/>
    </style:style>
    <style:style style:name="P29" style:family="paragraph">
      <loext:graphic-properties draw:fill-color="#ffffff"/>
      <style:paragraph-properties fo:margin-top="0cm" fo:margin-bottom="0cm" fo:text-align="center"/>
      <style:text-properties fo:font-size="12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fo:font-size="12pt" style:text-underline-style="none" fo:font-weight="bold" style:font-weight-asian="bold" style:font-weight-complex="bold"/>
    </style:style>
    <style:style style:name="T13" style:family="text">
      <style:text-properties style:font-name="Liberation Sans" fo:font-size="12pt" fo:font-weight="normal" style:font-weight-asian="normal" style:font-weight-complex="normal"/>
    </style:style>
    <style:style style:name="T14" style:family="text">
      <style:text-properties style:font-name="Liberation Sans" fo:font-size="12pt" fo:font-weight="bold" style:font-weight-asian="bold" style:font-weight-complex="bold"/>
    </style:style>
    <style:style style:name="T15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2pt" fo:font-weight="normal" style:font-weight-asian="normal" style:font-weight-complex="normal"/>
    </style:style>
    <style:style style:name="T17" style:family="text">
      <style:text-properties style:font-name="FreeMono" fo:font-size="12pt" fo:font-weight="normal" style:letter-kerning="true" style:font-name-asian="Noto Sans CJK SC" style:font-size-asian="12pt" style:font-weight-asian="normal" style:font-name-complex="Noto Sans Devanagari" style:font-size-complex="1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6" draw:layer="layout" svg:width="3.453cm" svg:height="0.602cm" svg:x="33.047cm" svg:y="52.85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9.5cm" svg:y2="23.84cm" draw:start-shape="id8" draw:end-shape="id10" draw:end-glue-point="5" svg:d="M16250 23850l3250-10" svg:viewBox="0 0 3251 11">
          <text:p/>
        </draw:connector>
        <draw:custom-shape draw:style-name="gr22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3" draw:text-style-name="P18" draw:layer="layout" svg:width="2.85cm" svg:height="1.655cm" svg:x="16.25cm" svg:y="31.2cm">
          <draw:text-box>
            <text:p text:style-name="P17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" draw:text-style-name="P20" draw:layer="layout" svg:width="3.35cm" svg:height="1.655cm" svg:x="16.25cm" svg:y="39.9cm">
          <draw:text-box>
            <text:p text:style-name="P19"><text:span text:style-name="T10">id_m3sq,</text:span></text:p>
            <text:p text:style-name="P19"><text:span text:style-name="T10">prefixe,</text:span></text:p>
            <text:p text:style-name="P19"><text:span text:style-name="T10">payload,</text:span></text:p>
            <text:p text:style-name="P19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1" draw:text-style-name="P16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5" draw:text-style-name="P22" xml:id="id17" draw:id="id17" draw:layer="layout" svg:width="5.45cm" svg:height="1.679cm" svg:x="52.7cm" svg:y="31.621cm">
          <text:p text:style-name="P21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6" draw:text-style-name="P24" xml:id="id13" draw:id="id13" draw:layer="layout" svg:width="6cm" svg:height="2.75cm" svg:x="25.026cm" svg:y="49.944cm">
          <text:p text:style-name="P9"><text:span text:style-name="T2">GTTS</text:span></text:p>
          <text:p text:style-name="P23"><text:span text:style-name="T5">Correspondances :</text:span></text:p>
          <text:p text:style-name="P23"><text:span text:style-name="T5">préfixes → langu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6" draw:text-style-name="P24" xml:id="id15" draw:id="id15" draw:layer="layout" svg:width="6cm" svg:height="2.75cm" svg:x="31.776cm" svg:y="49.944cm">
          <text:p text:style-name="P9"><text:span text:style-name="T2">TTS XXX ?</text:span></text:p>
          <text:p text:style-name="P9">Correspondances :</text:p>
          <text:p text:style-name="P9">préfixes → lang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24" xml:id="id19" draw:id="id19" draw:layer="layout" svg:width="8.5cm" svg:height="3.5cm" svg:x="18.31cm" svg:y="45.844cm">
          <text:p text:style-name="P9"><text:span text:style-name="T2">lettres_names</text:span></text:p>
          <text:p text:style-name="P9">Correspondances :</text:p>
          <text:p text:style-name="P9">« é » → « e accent aigü »</text:p>
          <text:p text:style-name="P9">« ? » → « point d’interrogation »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25" xml:id="id14" draw:id="id14" draw:layer="layout" svg:width="7cm" svg:height="1.5cm" svg:x="28.076cm" svg:y="44.744cm">
          <text:p text:style-name="P23"><text:span text:style-name="T5">Configuration de la voix de synthèse selon </text:span><text:span text:style-name="T12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9" draw:text-style-name="P10" xml:id="id18" draw:id="id18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3">Selon </text:span><text:span text:style-name="T14">suffixe </text:span><text:span text:style-name="T13">et</text:span><text:span text:style-name="T14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026cm" svg:y1="49.944cm" svg:x2="31.576cm" svg:y2="46.244cm" draw:start-shape="id13" draw:start-glue-point="0" draw:end-shape="id14" draw:end-glue-point="6" svg:d="M28026 49944v-518l3550-2663v-519" svg:viewBox="0 0 3551 3701">
          <text:p/>
        </draw:connector>
        <draw:connector draw:style-name="gr15" draw:text-style-name="P11" draw:layer="layout" draw:type="lines" svg:x1="34.776cm" svg:y1="49.944cm" svg:x2="31.576cm" svg:y2="46.244cm" draw:start-shape="id15" draw:start-glue-point="0" draw:end-shape="id14" draw:end-glue-point="6" svg:d="M34776 49944v-518l-3200-2663v-519" svg:viewBox="0 0 3201 3701">
          <text:p/>
        </draw:connector>
        <draw:custom-shape draw:style-name="gr22" draw:text-style-name="P10" xml:id="id16" draw:id="id16" draw:layer="layout" svg:width="5.5cm" svg:height="1.679cm" svg:x="28.8cm" svg:y="40.344cm">
          <text:p text:style-name="P9"><text:span text:style-name="T13">Appel de la voix de synthè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52.7cm" svg:y2="32.46cm" draw:start-shape="id16" draw:start-glue-point="1" draw:end-shape="id17" draw:end-glue-point="3" svg:d="M34300 41183h519l17081-8723h800" svg:viewBox="0 0 18401 8724">
          <text:p/>
        </draw:connector>
        <draw:connector draw:style-name="gr15" draw:text-style-name="P11" draw:layer="layout" draw:type="line" svg:x1="25.3cm" svg:y1="41.147cm" svg:x2="28.8cm" svg:y2="41.183cm" draw:start-shape="id18" draw:start-glue-point="1" draw:end-shape="id16" draw:end-glue-point="3" svg:d="M25300 41147l3500 36" svg:viewBox="0 0 3501 37">
          <text:p/>
        </draw:connector>
        <draw:frame draw:style-name="gr30" draw:text-style-name="P18" draw:layer="layout" svg:width="2cm" svg:height="0.602cm" svg:x="26cm" svg:y="41.339cm">
          <draw:text-box>
            <text:p text:style-name="P17"><text:span text:style-name="T10">to_say</text:span></text:p>
          </draw:text-box>
        </draw:frame>
        <draw:connector draw:style-name="gr15" draw:text-style-name="P11" draw:layer="layout" draw:type="lines" svg:x1="22.56cm" svg:y1="45.844cm" svg:x2="22.55cm" svg:y2="42.694cm" draw:start-shape="id19" draw:start-glue-point="0" draw:end-shape="id18" draw:end-glue-point="2" svg:d="M22560 45844v-518l-10-2113v-519" svg:viewBox="0 0 11 3151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18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4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4" draw:start-glue-point="4" draw:end-shape="id16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52.7cm" svg:y2="32.46cm" draw:start-shape="id11" draw:start-glue-point="1" draw:end-shape="id17" draw:end-glue-point="3" svg:d="M24750 32639h519l26913-179h518" svg:viewBox="0 0 27951 180">
          <text:p/>
        </draw:connector>
        <draw:frame draw:style-name="gr31" draw:text-style-name="P18" draw:layer="layout" svg:width="1.5cm" svg:height="0.602cm" svg:x="31.5cm" svg:y="31.85cm">
          <draw:text-box>
            <text:p text:style-name="P17"><text:span text:style-name="T10">mp3</text:span></text:p>
          </draw:text-box>
        </draw:frame>
        <draw:connector draw:style-name="gr15" draw:text-style-name="P11" draw:layer="layout" draw:type="lines" svg:x1="30.471cm" svg:y1="20.879cm" svg:x2="30.475cm" svg:y2="22.05cm" draw:start-shape="id20" draw:start-glue-point="6" draw:end-shape="id21" draw:end-glue-point="0" svg:d="M30471 20879v519l4 133v519" svg:viewBox="0 0 5 1172">
          <text:p/>
        </draw:connector>
        <draw:connector draw:style-name="gr15" draw:text-style-name="P11" draw:layer="layout" draw:type="lines" svg:x1="38.875cm" svg:y1="22.5cm" svg:x2="41.375cm" svg:y2="17.5cm" draw:start-shape="id22" draw:start-glue-point="4" draw:end-shape="id23" draw:end-glue-point="6" svg:d="M38875 22500v-518l2500-3963v-519" svg:viewBox="0 0 2501 5001">
          <text:p/>
        </draw:connector>
        <draw:frame draw:style-name="gr31" draw:text-style-name="P27" draw:layer="layout" svg:width="2.75cm" svg:height="0.602cm" svg:x="10cm" svg:y="22.3cm">
          <draw:text-box>
            <text:p text:style-name="P26"><text:span text:style-name="T15">match/case</text:span></text:p>
          </draw:text-box>
        </draw:frame>
        <draw:frame draw:style-name="gr32" draw:text-style-name="P27" draw:layer="layout" svg:width="3.5cm" svg:height="1cm" svg:x="37.25cm" svg:y="18.5cm">
          <draw:text-box>
            <text:p text:style-name="P26"><text:span text:style-name="T15">Ajouter</text:span></text:p>
            <text:p text:style-name="P26"><text:span text:style-name="T15">IDopaque.mp3</text:span></text:p>
          </draw:text-box>
        </draw:frame>
        <draw:frame draw:style-name="gr31" draw:text-style-name="P18" draw:layer="layout" svg:width="1.5cm" svg:height="0.602cm" svg:x="34.75cm" svg:y="37.748cm">
          <draw:text-box>
            <text:p text:style-name="P17"><text:span text:style-name="T10">mp3</text:span></text:p>
          </draw:text-box>
        </draw:frame>
        <draw:custom-shape draw:style-name="gr33" draw:text-style-name="P29" xml:id="id24" draw:id="id24" draw:layer="layout" svg:width="3.75cm" svg:height="1.75cm" svg:x="60.65cm" svg:y="31.6cm">
          <text:p text:style-name="P28">Afficher</text:p>
          <text:p text:style-name="P23"><text:span text:style-name="T10">to_sho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58.15cm" svg:y1="32.46cm" svg:x2="60.65cm" svg:y2="32.475cm" draw:start-shape="id17" draw:start-glue-point="1" draw:end-shape="id24" draw:end-glue-point="5" svg:d="M58150 32460h519l1463 15h518" svg:viewBox="0 0 2501 16">
          <text:p/>
        </draw:connector>
        <draw:connector draw:style-name="gr15" draw:text-style-name="P11" draw:layer="layout" draw:type="lines" draw:line-skew="0cm -0.832cm" svg:x1="22.55cm" svg:y1="39.6cm" svg:x2="52.7cm" svg:y2="32.46cm" draw:start-shape="id18" draw:start-glue-point="0" draw:end-shape="id17" draw:end-glue-point="3" svg:d="M22550 39600v-518l28800-6622h1350" svg:viewBox="0 0 30151 7141">
          <text:p/>
        </draw:connector>
        <draw:frame draw:style-name="gr30" draw:text-style-name="P18" draw:layer="layout" svg:width="2cm" svg:height="0.602cm" svg:x="27.25cm" svg:y="36.998cm">
          <draw:text-box>
            <text:p text:style-name="P17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4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31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  <draw:custom-shape draw:style-name="gr35" draw:text-style-name="P25" xml:id="id20" draw:id="id20" draw:layer="layout" svg:width="4.5cm" svg:height="2.25cm" svg:x="28.221cm" svg:y="18.629cm">
          <text:p text:style-name="P23"><text:span text:style-name="T13">Adresses des Driv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6" draw:text-style-name="P10" xml:id="id26" draw:id="id26" draw:layer="layout" svg:width="6.25cm" svg:height="2.5cm" svg:x="19.5cm" svg:y="26.2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7" draw:text-style-name="P31" xml:id="id25" draw:id="id25" draw:layer="layout" svg:width="5.95cm" svg:height="1.679cm" svg:x="19.65cm" svg:y="19.303cm">
          <text:p text:style-name="P30"><text:span text:style-name="T5">Vérificateur de connexion à int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2.625cm" svg:y1="20.982cm" svg:x2="22.625cm" svg:y2="22.59cm" draw:start-shape="id25" draw:start-glue-point="2" draw:end-shape="id10" svg:d="M22625 20982v1608" svg:viewBox="0 0 1 1609">
          <text:p/>
        </draw:connector>
        <draw:frame draw:style-name="gr17" draw:text-style-name="P12" draw:layer="layout" svg:width="2.143cm" svg:height="0.645cm" svg:x="20.357cm" svg:y="21.355cm">
          <draw:text-box>
            <text:p><text:span text:style-name="T6">true / false</text:span></text:p>
          </draw:text-box>
        </draw:frame>
        <draw:connector draw:style-name="gr15" draw:text-style-name="P11" draw:layer="layout" draw:type="line" svg:x1="22.625cm" svg:y1="25.09cm" svg:x2="22.625cm" svg:y2="26.25cm" draw:start-shape="id10" draw:start-glue-point="6" draw:end-shape="id26" draw:end-glue-point="4" svg:d="M22625 25090v1160" svg:viewBox="0 0 1 1161">
          <text:p/>
        </draw:connector>
        <draw:frame draw:style-name="gr16" draw:text-style-name="P12" draw:layer="layout" svg:width="1.088cm" svg:height="0.645cm" svg:x="21.412cm" svg:y="25.2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1.25cm" svg:y="28.7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5.55cm" svg:y="26.8cm">
          <draw:text-box>
            <text:p><text:span text:style-name="T6">oui</text:span></text:p>
          </draw:text-box>
        </draw:frame>
        <draw:custom-shape draw:style-name="gr38" draw:text-style-name="P29" xml:id="id27" draw:id="id27" draw:layer="layout" svg:width="5cm" svg:height="1.75cm" svg:x="23.75cm" svg:y="29.25cm">
          <text:p text:style-name="P28">Afficher</text:p>
          <text:p text:style-name="P23"><text:span text:style-name="T10">« pas de connexion à internet »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22.625cm" svg:y1="28.75cm" svg:x2="23.75cm" svg:y2="30.125cm" draw:start-shape="id26" draw:start-glue-point="6" draw:end-shape="id27" draw:end-glue-point="5" svg:d="M22625 28750v519l607 856h518" svg:viewBox="0 0 1126 1376">
          <text:p/>
        </draw:connector>
        <draw:connector draw:style-name="gr15" draw:text-style-name="P11" draw:layer="layout" draw:type="lines" draw:line-skew="0cm -0.532cm" svg:x1="25.75cm" svg:y1="27.5cm" svg:x2="52.7cm" svg:y2="32.46cm" draw:start-shape="id26" draw:start-glue-point="7" draw:end-shape="id17" draw:end-glue-point="3" svg:d="M25750 27500h518l25382 4960h1050" svg:viewBox="0 0 26951 4961">
          <text:p/>
        </draw:connector>
        <draw:frame draw:style-name="gr31" draw:text-style-name="P18" draw:layer="layout" svg:width="1.5cm" svg:height="0.602cm" svg:x="31cm" svg:y="28.898cm">
          <draw:text-box>
            <text:p text:style-name="P17"><text:span text:style-name="T10">mp3</text:span></text:p>
          </draw:text-box>
        </draw:frame>
        <draw:frame draw:style-name="gr16" draw:text-style-name="P12" draw:layer="layout" svg:width="1.088cm" svg:height="0.645cm" svg:x="25.534cm" svg:y="23.2cm">
          <draw:text-box>
            <text:p><text:span text:style-name="T6">oui</text:span></text:p>
          </draw:text-box>
        </draw:frame>
        <draw:connector draw:style-name="gr15" draw:text-style-name="P11" draw:layer="layout" draw:type="line" svg:x1="25.75cm" svg:y1="23.84cm" svg:x2="35.75cm" svg:y2="23.75cm" draw:start-shape="id10" draw:start-glue-point="7" draw:end-shape="id22" draw:end-glue-point="5" svg:d="M25750 23840l10000-90" svg:viewBox="0 0 10001 91">
          <text:p/>
        </draw:connector>
        <draw:custom-shape draw:style-name="gr36" draw:text-style-name="P10" xml:id="id22" draw:id="id22" draw:layer="layout" svg:width="6.25cm" svg:height="2.5cm" svg:x="35.75cm" svg:y="22.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9" draw:text-style-name="P25" xml:id="id23" draw:id="id23" draw:layer="layout" svg:width="9.75cm" svg:height="2.25cm" svg:x="36.5cm" svg:y="15.25cm">
          <text:p text:style-name="P23"><text:span text:style-name="T5">DB des </text:span><text:span text:style-name="T7">IDopaques</text:span></text:p>
          <text:p text:style-name="P23"><text:span text:style-name="T13">déjà rencontrées</text:span></text:p>
          <text:p text:style-name="P23"><text:span text:style-name="T17">#, IDopaque, titre, MD5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15" draw:text-style-name="P11" draw:layer="layout" draw:type="line" svg:x1="42cm" svg:y1="23.75cm" svg:x2="43.75cm" svg:y2="23.782cm" draw:start-shape="id22" draw:start-glue-point="7" draw:end-shape="id28" draw:end-glue-point="3" svg:d="M42000 23750l1750 32" svg:viewBox="0 0 1751 33">
          <text:p/>
        </draw:connector>
        <draw:connector draw:style-name="gr15" draw:text-style-name="P11" draw:layer="layout" draw:type="lines" svg:x1="48cm" svg:y1="23.782cm" svg:x2="52.7cm" svg:y2="32.46cm" draw:start-shape="id28" draw:start-glue-point="1" draw:end-shape="id17" draw:end-glue-point="3" svg:d="M48000 23782h518l3664 8678h518" svg:viewBox="0 0 4701 8679">
          <text:p/>
        </draw:connector>
        <draw:custom-shape draw:style-name="gr40" draw:text-style-name="P31" xml:id="id21" draw:id="id21" draw:layer="layout" svg:width="5.95cm" svg:height="3.429cm" svg:x="27.5cm" svg:y="22.05cm">
          <text:p text:style-name="P30"><text:span text:style-name="T18">Re-constructeur des liens externes</text:span></text:p>
          <text:p text:style-name="P30"><text:span text:style-name="T18"/></text:p>
          <text:p text:style-name="P30"><text:span text:style-name="T18">Télécharger et nommer </text:span><text:span text:style-name="T7">IDopaques.mp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" draw:text-style-name="P12" draw:layer="layout" svg:width="1.088cm" svg:height="0.645cm" svg:x="42cm" svg:y="23cm">
          <draw:text-box>
            <text:p><text:span text:style-name="T6">oui</text:span></text:p>
          </draw:text-box>
        </draw:frame>
        <draw:frame draw:style-name="gr16" draw:text-style-name="P12" draw:layer="layout" svg:width="1.088cm" svg:height="0.645cm" svg:x="39cm" svg:y="21.75cm">
          <draw:text-box>
            <text:p><text:span text:style-name="T6">non</text:span></text:p>
          </draw:text-box>
        </draw:frame>
        <draw:custom-shape draw:style-name="gr36" draw:text-style-name="P10" xml:id="id10" draw:id="id10" draw:layer="layout" svg:width="6.25cm" svg:height="2.5cm" svg:x="19.5cm" svg:y="22.59cm">
          <text:p text:style-name="P9"><text:span text:style-name="T5">Y a-t-il internet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31" draw:text-style-name="P18" draw:layer="layout" svg:width="1.5cm" svg:height="0.602cm" svg:x="51.75cm" svg:y="27.5cm">
          <draw:text-box>
            <text:p text:style-name="P17"><text:span text:style-name="T10">mp3</text:span></text:p>
          </draw:text-box>
        </draw:frame>
        <draw:custom-shape draw:style-name="gr41" draw:text-style-name="P24" xml:id="id28" draw:id="id28" draw:layer="layout" svg:width="4.25cm" svg:height="2.75cm" svg:x="43.75cm" svg:y="22.407cm">
          <text:p text:style-name="P9">Actualiser #<text:line-break/><text:span text:style-name="T19">Pour effacer les fichiers les plus anciens</text:span><text:span text:style-name="T19"><text:line-break/></text:span><text:span text:style-name="T19"><text:line-break/></text:span><text:span text:style-name="T19">Remplacer l’ancien fichier</text:span></text:p>
          <text:p text:style-name="P9"><text:span text:style-name="T19">IDopaque.mp3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draw:type="lines" svg:x1="45.875cm" svg:y1="22.407cm" svg:x2="41.375cm" svg:y2="17.5cm" draw:start-shape="id28" draw:start-glue-point="0" draw:end-shape="id23" draw:end-glue-point="6" svg:d="M45875 22407v-518l-4500-3870v-519" svg:viewBox="0 0 4501 4908">
          <text:p/>
        </draw:connector>
      </draw:page>
      <draw:page draw:name="page2" draw:style-name="dp1" draw:master-page-name="Standard">
        <draw:custom-shape draw:style-name="gr42" draw:text-style-name="P31" xml:id="id29" draw:id="id29" draw:layer="layout" svg:width="7cm" svg:height="2cm" svg:x="5.25cm" svg:y="2.8cm">
          <text:p text:style-name="P30"><text:span text:style-name="T18">Suffixe = </text:span><text:span text:style-name="T20">"l"</text:span></text:p>
          <text:p text:style-name="P30"><text:span text:style-name="T20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31" xml:id="id30" draw:id="id30" draw:layer="layout" svg:width="7cm" svg:height="2cm" svg:x="5.25cm" svg:y="5.6cm">
          <text:p text:style-name="P30"><text:span text:style-name="T18">Suffixe = </text:span><text:span text:style-name="T20">"c"</text:span></text:p>
          <text:p text:style-name="P30"><text:span text:style-name="T20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29" draw:start-glue-point="6" draw:end-shape="id30" draw:end-glue-point="4" svg:d="M8750 4800v800" svg:viewBox="0 0 1 801">
          <text:p/>
        </draw:connector>
        <draw:custom-shape draw:style-name="gr44" draw:text-style-name="P31" xml:id="id31" draw:id="id31" draw:layer="layout" svg:width="7cm" svg:height="2cm" svg:x="5.25cm" svg:y="8.3cm">
          <text:p text:style-name="P30"><text:span text:style-name="T18">Suffixe = </text:span><text:span text:style-name="T20">"d"</text:span></text:p>
          <text:p text:style-name="P30"><text:span text:style-name="T20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30" draw:start-glue-point="6" draw:end-shape="id31" draw:end-glue-point="4" svg:d="M8750 7600v700" svg:viewBox="0 0 1 701">
          <text:p/>
        </draw:connector>
        <draw:custom-shape draw:style-name="gr45" draw:text-style-name="P31" xml:id="id32" draw:id="id32" draw:layer="layout" svg:width="7cm" svg:height="2cm" svg:x="5.25cm" svg:y="11cm">
          <text:p text:style-name="P30"><text:span text:style-name="T18">Suffixe = </text:span><text:span text:style-name="T20">"e"</text:span></text:p>
          <text:p text:style-name="P30"><text:span text:style-name="T20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32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20:27:48.332650850</dc:date>
    <meta:editing-duration>PT9H35M7S</meta:editing-duration>
    <meta:editing-cycles>248</meta:editing-cycles>
    <meta:generator>LibreOffice/26.2.3.2$Linux_X86_64 LibreOffice_project/70e089b17412e4cb7773e41413306b17a2328c34</meta:generator>
    <meta:document-statistic meta:object-count="115"/>
  </office:meta>
</office:document-meta>
</file>