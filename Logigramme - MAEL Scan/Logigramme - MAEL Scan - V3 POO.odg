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4000000870FE7A350.png" manifest:media-type="image/png"/>
  <manifest:file-entry manifest:full-path="Pictures/100004BA000052C9000052C925C069A8.svg" manifest:media-type="image/svg+xml"/>
  <manifest:file-entry manifest:full-path="Pictures/1000000100000215000001F2F8D3F60E.png" manifest:media-type="image/png"/>
  <manifest:file-entry manifest:full-path="Pictures/100008220000371F0000336B6A08EB3B.svg" manifest:media-type="image/svg+xml"/>
  <manifest:file-entry manifest:full-path="Pictures/10000001000002C3000002C393573DCE.png" manifest:media-type="image/png"/>
  <manifest:file-entry manifest:full-path="Pictures/10000638000052C9000052C96C1D549D.svg" manifest:media-type="image/svg+xml"/>
  <manifest:file-entry manifest:full-path="Pictures/10000001000002C3000002C3DAE16A6C.png" manifest:media-type="image/png"/>
  <manifest:file-entry manifest:full-path="Pictures/1000000000000AD700001800EF26A2F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28cm" svg:stroke-color="#3465a4" draw:marker-start-width="0.242cm" draw:marker-end-width="0.242cm" svg:stroke-linecap="butt" draw:fill="solid" draw:fill-color="#dee6ef" draw:textarea-horizontal-align="justify" draw:textarea-vertical-align="middle" draw:auto-grow-height="false" fo:min-height="20.972cm" fo:min-width="5.722cm" fo:padding-top="0.139cm" fo:padding-bottom="0.139cm" fo:padding-left="0.264cm" fo:padding-right="0.264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3cm, 0cm, 12.685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73cm" fo:min-width="0.199cm" fo:wrap-option="wrap" draw:shadow="visible" draw:shadow-offset-x="0.035cm" draw:shadow-offset-y="0.035cm" draw:shadow-color="#000000" draw:shadow-opacity="50%" loext:shadow-blur="0.106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9cm" fo:min-width="0.227cm" fo:wrap-option="wrap" draw:shadow="visible" draw:shadow-offset-x="0.035cm" draw:shadow-offset-y="0.035cm" draw:shadow-color="#000000" draw:shadow-opacity="50%" loext:shadow-blur="0.106cm" loext:decorative="false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svg:stroke-color="#000000" svg:stroke-opacity="100%" draw:fill="solid" draw:fill-color="#808080" loext:fill-use-slide-background="false" draw:opacity="59%" draw:textarea-horizontal-align="center" draw:textarea-vertical-align="middle" draw:auto-grow-height="true" draw:auto-grow-width="false" fo:min-height="0.712cm" draw:shadow="hidden" loext:glow-radius="0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28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8cm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86cm" fo:min-width="3.56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1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1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08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247cm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592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899cm" loext:decorative="false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74cm" fo:padding-top="0.142cm" fo:padding-bottom="0.142cm" fo:padding-left="0.267cm" fo:padding-right="0.267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40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2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17cm" fo:min-width="6.35cm" fo:padding-top="0.142cm" fo:padding-bottom="0.142cm" fo:padding-left="0.267cm" fo:padding-right="0.267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36cm" fo:padding-top="0.142cm" fo:padding-bottom="0.142cm" fo:padding-left="0.267cm" fo:padding-right="0.267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29cm" fo:min-width="4.292cm" fo:padding-top="0.142cm" fo:padding-bottom="0.142cm" fo:padding-left="0.267cm" fo:padding-right="0.267cm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32cm" fo:min-width="6.303cm" fo:padding-top="0.142cm" fo:padding-bottom="0.142cm" fo:padding-left="0.267cm" fo:padding-right="0.267cm" loext:decorative="false"/>
      <style:paragraph-properties style:writing-mode="lr-tb"/>
    </style:style>
    <style:style style:name="gr29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7cm" fo:min-width="3.648cm" fo:padding-top="0.142cm" fo:padding-bottom="0.142cm" fo:padding-left="0.267cm" fo:padding-right="0.267cm" loext:decorative="false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811cm" fo:min-width="3.674cm" fo:padding-top="0.142cm" fo:padding-bottom="0.142cm" fo:padding-left="0.267cm" fo:padding-right="0.267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352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102cm" loext:decorative="false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66cm" fo:min-width="2.592cm" fo:padding-top="0.142cm" fo:padding-bottom="0.142cm" fo:padding-left="0.267cm" fo:padding-right="0.267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cm" loext:decorative="false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36cm" fo:padding-top="0.142cm" fo:padding-bottom="0.142cm" fo:padding-left="0.267cm" fo:padding-right="0.267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0.5cm" loext:decorative="false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67cm" fo:min-width="2.466cm" fo:padding-top="0.142cm" fo:padding-bottom="0.142cm" fo:padding-left="0.267cm" fo:padding-right="0.267cm" loext:decorative="false"/>
      <style:paragraph-properties style:writing-mode="lr-tb"/>
    </style:style>
    <style:style style:name="gr38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4.018cm" fo:padding-top="0.142cm" fo:padding-bottom="0.142cm" fo:padding-left="0.267cm" fo:padding-right="0.267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67cm" fo:min-width="2.754cm" fo:padding-top="0.142cm" fo:padding-bottom="0.142cm" fo:padding-left="0.267cm" fo:padding-right="0.267cm" loext:decorative="false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67cm" fo:min-width="2.466cm" fo:padding-top="0.142cm" fo:padding-bottom="0.142cm" fo:padding-left="0.267cm" fo:padding-right="0.267cm" loext:decorative="false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146cm" fo:min-width="4.018cm" fo:padding-top="0.142cm" fo:padding-bottom="0.142cm" fo:padding-left="0.267cm" fo:padding-right="0.267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808080" draw:opacity="59%"/>
      <style:paragraph-properties fo:text-align="center"/>
      <style:text-properties fo:color="#808080" loext:opacity="100%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-color="#ffffff"/>
      <style:paragraph-properties fo:text-align="center" style:writing-mode="lr-tb"/>
      <style:text-properties fo:font-size="12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/>
      <style:text-properties style:font-name="FreeMono" fo:font-size="7pt" fo:font-weight="bold" style:font-size-asian="7pt" style:font-weight-asian="bold" style:font-size-complex="7pt" style:font-weight-complex="bold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/>
      <style:text-properties style:font-name="FreeMono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text-properties style:font-name="FreeMono" fo:font-size="10pt" style:font-size-asian="10pt" style:font-size-complex="10pt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style:font-name="FreeMono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margin-top="0cm" fo:margin-bottom="0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top="0cm" fo:margin-bottom="0cm"/>
      <style:text-properties style:font-name="FreeMono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margin-left="0cm" fo:margin-right="0cm" fo:text-align="center" fo:text-indent="0cm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22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4" style:family="paragraph">
      <loext:graphic-properties draw:fill-color="#ffffff"/>
      <style:paragraph-properties fo:text-align="center"/>
      <style:text-properties fo:font-size="12pt"/>
    </style:style>
    <style:style style:name="P2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6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>
      <loext:graphic-properties draw:fill="none"/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28" style:family="paragraph">
      <style:paragraph-properties fo:margin-top="0cm" fo:margin-bottom="0cm" fo:text-align="center"/>
      <style:text-properties fo:font-size="12pt"/>
    </style:style>
    <style:style style:name="P29" style:family="paragraph">
      <loext:graphic-properties draw:fill-color="#ffffff"/>
      <style:paragraph-properties fo:margin-top="0cm" fo:margin-bottom="0cm" fo:text-align="center"/>
      <style:text-properties fo:font-size="12pt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3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reeMono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ans" fo:font-size="16pt" style:font-size-asian="16pt" style:font-size-complex="16pt"/>
    </style:style>
    <style:style style:name="T5" style:family="text">
      <style:text-properties fo:font-size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FreeMono" fo:font-size="12pt"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7pt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eeMono" fo:font-size="7pt" fo:font-weight="bold" style:font-size-asian="7pt" style:font-weight-asian="bold" style:font-size-complex="7pt" style:font-weight-complex="bold"/>
    </style:style>
    <style:style style:name="T10" style:family="text">
      <style:text-properties style:font-name="FreeMon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FreeMono" fo:font-size="10pt" style:font-size-asian="10pt" style:font-size-complex="10pt"/>
    </style:style>
    <style:style style:name="T12" style:family="text">
      <style:text-properties style:font-name="FreeMono" fo:font-size="12pt" style:font-size-asian="12pt" style:font-size-complex="12pt"/>
    </style:style>
    <style:style style:name="T13" style:family="text">
      <style:text-properties fo:font-size="12pt" style:text-underline-style="none" fo:font-weight="bold" style:font-weight-asian="bold" style:font-weight-complex="bold"/>
    </style:style>
    <style:style style:name="T14" style:family="text">
      <style:text-properties style:font-name="Liberation Sans" fo:font-size="12pt" fo:font-weight="normal" style:font-weight-asian="normal" style:font-weight-complex="normal"/>
    </style:style>
    <style:style style:name="T15" style:family="text">
      <style:text-properties style:font-name="Liberation Sans" fo:font-size="12pt" fo:font-weight="bold" style:font-weight-asian="bold" style:font-weight-complex="bold"/>
    </style:style>
    <style:style style:name="T16" style:family="text">
      <style:text-properties style:font-name="Liberation sans" fo:font-size="12pt" fo:font-weight="normal" style:font-weight-asian="normal" style:font-weight-complex="normal"/>
    </style:style>
    <style:style style:name="T17" style:family="text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5cm" svg:height="21.25cm" svg:x="10cm" svg:y="22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46cm" svg:height="7.907cm" svg:x="1.254cm" svg:y="1.231cm">
          <draw:image xlink:href="Pictures/1000000000000AD700001800EF26A2F4.jpg" xlink:type="simple" xlink:show="embed" xlink:actuate="onLoad" draw:mime-type="image/jpeg">
            <text:p/>
          </draw:image>
        </draw:frame>
        <draw:g draw:style-name="gr3">
          <draw:custom-shape draw:style-name="gr4" draw:text-style-name="P3" draw:layer="layout" svg:width="0.833cm" svg:height="0.857cm" svg:x="4.6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573cm" svg:height="0.573cm" svg:x="4.756cm" svg:y="9.473cm">
            <draw:image xlink:href="Pictures/10000638000052C9000052C96C1D549D.svg" xlink:type="simple" xlink:show="embed" xlink:actuate="onLoad" draw:mime-type="image/svg+xml">
              <text:p/>
            </draw:image>
            <draw:image xlink:href="Pictures/10000001000002C3000002C393573DCE.png" xlink:type="simple" xlink:show="embed" xlink:actuate="onLoad" draw:mime-type="image/png"/>
          </draw:frame>
        </draw:g>
        <draw:g draw:style-name="gr3">
          <draw:custom-shape draw:style-name="gr6" draw:text-style-name="P3" draw:layer="layout" svg:width="0.865cm" svg:height="0.857cm" svg:x="2.1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374cm" svg:height="0.349cm" svg:x="2.361cm" svg:y="9.586cm">
            <draw:image xlink:href="Pictures/100008220000371F0000336B6A08EB3B.svg" xlink:type="simple" xlink:show="embed" xlink:actuate="onLoad" draw:mime-type="image/svg+xml">
              <text:p/>
            </draw:image>
            <draw:image xlink:href="Pictures/1000000100000215000001F2F8D3F60E.png" xlink:type="simple" xlink:show="embed" xlink:actuate="onLoad" draw:mime-type="image/png"/>
          </draw:frame>
        </draw:g>
        <draw:g draw:style-name="gr3">
          <draw:custom-shape draw:style-name="gr6" draw:text-style-name="P3" draw:layer="layout" svg:width="0.865cm" svg:height="0.857cm" svg:x="3.387cm" svg:y="9.339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491cm" svg:height="0.491cm" svg:x="3.561cm" svg:y="9.528cm">
            <draw:image xlink:href="Pictures/100004BA000052C9000052C925C069A8.svg" xlink:type="simple" xlink:show="embed" xlink:actuate="onLoad" draw:mime-type="image/svg+xml">
              <text:p/>
            </draw:image>
            <draw:image xlink:href="Pictures/10000001000002C3000002C3DAE16A6C.png" xlink:type="simple" xlink:show="embed" xlink:actuate="onLoad" draw:mime-type="image/png"/>
          </draw:frame>
        </draw:g>
        <draw:g draw:style-name="gr7">
          <draw:path draw:style-name="gr8" draw:text-style-name="P4" draw:layer="layout" svg:width="0.391cm" svg:height="0.487cm" svg:x="2.73cm" svg:y="9.762cm" svg:viewBox="0 0 392 488" svg:d="M384 95c9 27 10 53 5 77-6 25-18 47-37 66s-44 33-76 43l-103 33 46 147-87 27-132-416 187-60c50-15 92-16 126-2 34 15 58 43 71 85zM297 124c-14-43-47-57-98-41l-90 29 43 135 92-30c24-7 41-19 50-35s10-35 3-58z">
            <text:p/>
          </draw:path>
          <draw:path draw:style-name="gr8" draw:text-style-name="P4" draw:layer="layout" svg:width="0.328cm" svg:height="0.537cm" svg:x="3.128cm" svg:y="9.71cm" svg:viewBox="0 0 329 538" svg:d="M220 525c-20 6-37 10-53 13l-19-60c11-1 21-4 29-6 12-4 21-9 28-15s12-15 15-26c4-10 6-27 7-50l-227-277 88-28 98 134c14 19 35 49 61 90l-2-31-3-75v-166l87-28-20 377c-4 46-12 80-26 102-13 21-34 37-63 46z">
            <text:p/>
          </draw:path>
          <draw:path draw:style-name="gr8" draw:text-style-name="P4" draw:layer="layout" svg:width="0.286cm" svg:height="0.406cm" svg:x="3.468cm" svg:y="9.593cm" svg:viewBox="0 0 287 407" svg:d="M220 402c-25 8-45 7-63-2-17-9-30-27-39-54l-60-188-40 12-18-56 45-14 2-83 52-17 24 75 60-19 18 56-61 20 53 165c5 16 12 27 20 32 8 6 19 6 31 2 6-2 15-6 26-13l17 52c-19 13-41 24-67 32z">
            <text:p/>
          </draw:path>
          <draw:path draw:style-name="gr8" draw:text-style-name="P4" draw:layer="layout" svg:width="0.428cm" svg:height="0.464cm" svg:x="3.666cm" svg:y="9.485cm" svg:viewBox="0 0 429 465" svg:d="M140 183c3-28 12-50 25-67 14-16 32-28 56-35 33-11 63-9 88 6 24 15 43 43 56 83l64 203-83 27-56-180c-18-56-46-78-84-66-20 6-34 20-41 41-6 22-6 46 3 73l54 171-83 26-139-439 83-26 38 120c7 21 13 43 18 64z">
            <text:p/>
          </draw:path>
          <draw:path draw:style-name="gr8" draw:text-style-name="P4" draw:layer="layout" svg:width="0.344cm" svg:height="0.353cm" svg:x="4.094cm" svg:y="9.451cm" svg:viewBox="0 0 345 354" svg:d="M334 126c16 52 15 97-5 136-19 38-54 65-105 82-50 15-94 13-131-7-38-21-65-57-82-109-16-51-15-96 4-135 19-38 54-65 105-82 53-16 97-15 134 5 36 20 63 56 80 110zM247 153c-12-38-27-63-45-76-18-14-39-16-62-9-51 16-64 60-42 133 12 35 27 60 45 75s39 18 62 11c51-16 65-61 42-134z">
            <text:p/>
          </draw:path>
          <draw:path draw:style-name="gr8" draw:text-style-name="P4" draw:layer="layout" svg:width="0.393cm" svg:height="0.391cm" svg:x="4.441cm" svg:y="9.325cm" svg:viewBox="0 0 394 392" svg:d="M311 326l-57-180c-18-56-46-78-84-66-20 6-33 20-40 41-7 22-6 46 3 73l54 171-83 27-79-249c-5-17-10-31-14-42-4-10-8-20-11-29l79-25c2 4 6 14 12 30 6 15 10 26 12 33l1-1c4-28 12-50 26-67 13-16 32-28 55-35 34-11 63-9 88 6s44 43 56 83l65 204z">
            <text:p/>
          </draw:path>
        </draw:g>
        <draw:frame draw:style-name="gr5" draw:text-style-name="P2" draw:layer="layout" svg:width="2.545cm" svg:height="2.321cm" svg:x="11.903cm" svg:y="3.95cm">
          <draw:image xlink:href="Pictures/1000000000000094000000870FE7A350.png" xlink:type="simple" xlink:show="embed" xlink:actuate="onLoad" draw:mime-type="image/png">
            <text:p/>
          </draw:image>
        </draw:frame>
        <draw:frame draw:style-name="gr9" draw:text-style-name="P5" draw:layer="layout" svg:width="11.786cm" svg:height="0.763cm" svg:x="7.25cm" svg:y="2.737cm">
          <draw:text-box>
            <text:p><text:span text:style-name="T1">Surveillance des interruptions générées par les boutons</text:span></text:p>
          </draw:text-box>
        </draw:frame>
        <draw:frame draw:style-name="gr10" draw:text-style-name="P6" draw:layer="layout" svg:width="8.888cm" svg:height="0.962cm" svg:x="8.5cm" svg:y="1.5cm">
          <draw:text-box>
            <text:p><text:span text:style-name="T2">Logigramme de MAEL Scan</text:span></text:p>
          </draw:text-box>
        </draw:frame>
        <draw:custom-shape draw:style-name="gr11" draw:text-style-name="P8" xml:id="id1" draw:id="id1" draw:layer="layout" svg:width="4.5cm" svg:height="1.75cm" svg:x="10.875cm" svg:y="6.571cm">
          <text:p text:style-name="P7"><text:span text:style-name="T3">scan_bt</text:span></text:p>
          <text:p text:style-name="P7"><text:span text:style-name="T4">activé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0" xml:id="id2" draw:id="id2" draw:layer="layout" svg:width="4.75cm" svg:height="1.679cm" svg:x="10.75cm" svg:y="9.121cm">
          <text:p text:style-name="P9"><text:span text:style-name="T5">Scanner un code Q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" draw:text-style-name="P10" xml:id="id3" draw:id="id3" draw:layer="layout" svg:width="6cm" svg:height="2cm" svg:x="10.125cm" svg:y="12.1cm">
          <text:p text:style-name="P9"><text:span text:style-name="T5">Commence par « WIFI: »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2" draw:layer="layout" draw:type="line" svg:x1="13.125cm" svg:y1="8.321cm" svg:x2="13.125cm" svg:y2="9.121cm" draw:start-shape="id1" draw:start-glue-point="6" draw:end-shape="id2" draw:end-glue-point="0" svg:d="M13125 8321v800" svg:viewBox="0 0 1 801">
          <text:p/>
        </draw:connector>
        <draw:connector draw:style-name="gr14" draw:text-style-name="P2" draw:layer="layout" draw:type="line" svg:x1="13.125cm" svg:y1="10.8cm" svg:x2="13.125cm" svg:y2="12.1cm" draw:start-shape="id2" draw:start-glue-point="2" draw:end-shape="id3" draw:end-glue-point="4" svg:d="M13125 10800v1300" svg:viewBox="0 0 1 1301">
          <text:p/>
        </draw:connector>
        <draw:connector draw:style-name="gr14" draw:text-style-name="P11" draw:layer="layout" draw:type="lines" draw:line-skew="-2.732cm" svg:x1="10.125cm" svg:y1="13.1cm" svg:x2="5.475cm" svg:y2="19.35cm" draw:start-shape="id3" draw:start-glue-point="5" draw:end-shape="id4" draw:end-glue-point="0" svg:d="M10125 13100h-3250l-1400 5731v519" svg:viewBox="0 0 4651 6251">
          <text:p/>
        </draw:connector>
        <draw:connector draw:style-name="gr15" draw:text-style-name="P11" draw:layer="layout" draw:type="line" svg:x1="13.125cm" svg:y1="17.55cm" svg:x2="13.125cm" svg:y2="19.471cm" draw:start-shape="id5" draw:start-glue-point="2" draw:end-shape="id6" draw:end-glue-point="0" svg:d="M13125 17550v1921" svg:viewBox="0 0 1 1922">
          <text:p/>
        </draw:connector>
        <draw:frame draw:style-name="gr16" draw:text-style-name="P12" draw:layer="layout" svg:width="1.088cm" svg:height="0.645cm" svg:x="11.75cm" svg:y="14.105cm">
          <draw:text-box>
            <text:p><text:span text:style-name="T6">non</text:span></text:p>
          </draw:text-box>
        </draw:frame>
        <draw:frame draw:style-name="gr17" draw:text-style-name="P12" draw:layer="layout" svg:width="0.971cm" svg:height="0.645cm" svg:x="9.25cm" svg:y="12.355cm">
          <draw:text-box>
            <text:p><text:span text:style-name="T6">oui</text:span></text:p>
          </draw:text-box>
        </draw:frame>
        <draw:custom-shape draw:style-name="gr12" draw:text-style-name="P10" xml:id="id4" draw:id="id4" draw:layer="layout" svg:width="4.75cm" svg:height="1.679cm" svg:x="3.1cm" svg:y="19.35cm">
          <text:p text:style-name="P9"><text:span text:style-name="T5">Analyser</text:span></text:p>
          <text:p text:style-name="P9"><text:span text:style-name="T7">MECARD-lik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10" xml:id="id7" draw:id="id7" draw:layer="layout" svg:width="4.75cm" svg:height="1.679cm" svg:x="3.1cm" svg:y="23.021cm">
          <text:p text:style-name="P9"><text:span text:style-name="T5">Configurer</text:span></text:p>
          <text:p text:style-name="P9"><text:span text:style-name="T5">le Wif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5.475cm" svg:y1="21.029cm" svg:x2="5.475cm" svg:y2="23.021cm" draw:start-shape="id4" draw:start-glue-point="2" draw:end-shape="id7" draw:end-glue-point="0" svg:d="M5475 21029v1992" svg:viewBox="0 0 1 1993">
          <text:p/>
        </draw:connector>
        <draw:frame draw:style-name="gr18" draw:text-style-name="P13" draw:layer="layout" svg:width="4.5cm" svg:height="1.335cm" svg:x="1cm" svg:y="21.365cm">
          <draw:text-box>
            <text:p><text:span text:style-name="T8">('&lt;Cryptage&gt;</text:span><text:span text:style-name="T9"> : str', </text:span></text:p>
            <text:p><text:span text:style-name="T8"><text:s/>'&lt;SSID&gt;</text:span><text:span text:style-name="T9"> : str', </text:span></text:p>
            <text:p><text:span text:style-name="T8"><text:s/>'&lt;mot_de_passe&gt;</text:span><text:span text:style-name="T9"> : str', </text:span></text:p>
            <text:p><text:span text:style-name="T8"><text:s/>'&lt;Réseau_masqué&gt; : bool</text:span><text:span text:style-name="T9">')</text:span></text:p>
          </draw:text-box>
        </draw:frame>
        <draw:custom-shape draw:style-name="gr12" draw:text-style-name="P10" xml:id="id6" draw:id="id6" draw:layer="layout" svg:width="4.75cm" svg:height="1.679cm" svg:x="10.75cm" svg:y="19.471cm">
          <text:p text:style-name="P9"><text:span text:style-name="T5">Analyser la structure de donné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9" draw:text-style-name="P15" draw:layer="layout" svg:width="5.6cm" svg:height="0.602cm" svg:x="13.4cm" svg:y="11.148cm">
          <draw:text-box>
            <text:p text:style-name="P14"><text:span text:style-name="T10">crypt_qr_content : str</text:span></text:p>
          </draw:text-box>
        </draw:frame>
        <draw:custom-shape draw:style-name="gr20" draw:text-style-name="P10" xml:id="id8" draw:id="id8" draw:layer="layout" svg:width="6.25cm" svg:height="2cm" svg:x="10cm" svg:y="22.85cm">
          <text:p text:style-name="P9"><text:span text:style-name="T5">C’est un</text:span></text:p>
          <text:p text:style-name="P9"><text:span text:style-name="T7">ID opaqu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0" draw:text-style-name="P10" xml:id="id9" draw:id="id9" draw:layer="layout" svg:width="6.25cm" svg:height="2cm" svg:x="10cm" svg:y="31.65cm">
          <text:p text:style-name="P9"><text:span text:style-name="T5">C’est un</text:span></text:p>
          <text:p text:style-name="P9"><text:span text:style-name="T7">mp3 inclu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1" draw:text-style-name="P16" draw:layer="layout" svg:width="3.453cm" svg:height="0.602cm" svg:x="33.047cm" svg:y="52.85cm">
          <draw:text-box>
            <text:p><text:span text:style-name="T11">Pour plus tard</text:span></text:p>
          </draw:text-box>
        </draw:frame>
        <draw:connector draw:style-name="gr15" draw:text-style-name="P11" draw:layer="layout" draw:type="line" svg:x1="13.125cm" svg:y1="21.15cm" svg:x2="13.125cm" svg:y2="22.85cm" draw:start-shape="id6" draw:start-glue-point="2" draw:end-shape="id8" draw:end-glue-point="4" svg:d="M13125 21150v1700" svg:viewBox="0 0 1 1701">
          <text:p/>
        </draw:connector>
        <draw:connector draw:style-name="gr15" draw:text-style-name="P11" draw:layer="layout" draw:type="line" svg:x1="13.125cm" svg:y1="24.85cm" svg:x2="13.125cm" svg:y2="31.65cm" draw:start-shape="id8" draw:start-glue-point="6" draw:end-shape="id9" draw:end-glue-point="4" svg:d="M13125 24850v6800" svg:viewBox="0 0 1 6801">
          <text:p/>
        </draw:connector>
        <draw:connector draw:style-name="gr15" draw:text-style-name="P11" draw:layer="layout" draw:type="line" svg:x1="16.25cm" svg:y1="23.85cm" svg:x2="19.5cm" svg:y2="23.84cm" draw:start-shape="id8" draw:end-shape="id10" draw:end-glue-point="5" svg:d="M16250 23850l3250-10" svg:viewBox="0 0 3251 11">
          <text:p/>
        </draw:connector>
        <draw:custom-shape draw:style-name="gr22" draw:text-style-name="P10" xml:id="id11" draw:id="id11" draw:layer="layout" svg:width="5.5cm" svg:height="1.679cm" svg:x="19.25cm" svg:y="31.8cm">
          <text:p text:style-name="P9"><text:span text:style-name="T5">Re-constructeur de liens internes immuabl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16.25cm" svg:y1="32.65cm" svg:x2="19.25cm" svg:y2="32.639cm" draw:start-shape="id9" draw:start-glue-point="7" draw:end-shape="id11" draw:end-glue-point="3" svg:d="M16250 32650l3000-11" svg:viewBox="0 0 3001 12">
          <text:p/>
        </draw:connector>
        <draw:frame draw:style-name="gr19" draw:text-style-name="P15" draw:layer="layout" svg:width="3.35cm" svg:height="1.304cm" svg:x="16.2cm" svg:y="22.403cm">
          <draw:text-box>
            <text:p text:style-name="P14"><text:span text:style-name="T10">id_IDopaque,</text:span></text:p>
            <text:p text:style-name="P14"><text:span text:style-name="T10">drive_name,</text:span></text:p>
            <text:p text:style-name="P14"><text:span text:style-name="T10">file_id</text:span></text:p>
          </draw:text-box>
        </draw:frame>
        <draw:frame draw:style-name="gr23" draw:text-style-name="P18" draw:layer="layout" svg:width="2.85cm" svg:height="1.655cm" svg:x="16.25cm" svg:y="31.2cm">
          <draw:text-box>
            <text:p text:style-name="P17"><text:span text:style-name="T10">id_assets, language, word</text:span></text:p>
          </draw:text-box>
        </draw:frame>
        <draw:custom-shape draw:style-name="gr20" draw:text-style-name="P10" xml:id="id12" draw:id="id12" draw:layer="layout" svg:width="6.25cm" svg:height="2cm" svg:x="10cm" svg:y="40.85cm">
          <text:p text:style-name="P9"><text:span text:style-name="T5">C’est un</text:span></text:p>
          <text:p text:style-name="P9"><text:span text:style-name="T7">M3SQ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4" draw:text-style-name="P20" draw:layer="layout" svg:width="3.35cm" svg:height="1.655cm" svg:x="16.25cm" svg:y="39.9cm">
          <draw:text-box>
            <text:p text:style-name="P19"><text:span text:style-name="T10">id_m3sq,</text:span></text:p>
            <text:p text:style-name="P19"><text:span text:style-name="T10">prefixe,</text:span></text:p>
            <text:p text:style-name="P19"><text:span text:style-name="T10">payload,</text:span></text:p>
            <text:p text:style-name="P19"><text:span text:style-name="T10">suffixe</text:span></text:p>
          </draw:text-box>
        </draw:frame>
        <draw:connector draw:style-name="gr15" draw:text-style-name="P11" draw:layer="layout" draw:type="line" svg:x1="13.125cm" svg:y1="33.65cm" svg:x2="13.125cm" svg:y2="40.85cm" draw:start-shape="id9" draw:start-glue-point="6" draw:end-shape="id12" draw:end-glue-point="4" svg:d="M13125 33650v7200" svg:viewBox="0 0 1 7201">
          <text:p/>
        </draw:connector>
        <draw:frame draw:style-name="gr21" draw:text-style-name="P16" draw:layer="layout" svg:width="2.821cm" svg:height="2.006cm" svg:x="9.929cm" svg:y="39cm">
          <draw:text-box>
            <text:p><text:span text:style-name="T10">M</text:span><text:span text:style-name="T11">AEL </text:span></text:p>
            <text:p><text:span text:style-name="T10">S</text:span><text:span text:style-name="T11">yntax for </text:span></text:p>
            <text:p><text:span text:style-name="T10">S</text:span><text:span text:style-name="T11">ynthetic </text:span></text:p>
            <text:p><text:span text:style-name="T10">S</text:span><text:span text:style-name="T11">peech in </text:span></text:p>
            <text:p><text:span text:style-name="T10">Q</text:span><text:span text:style-name="T11">Rcodes</text:span></text:p>
          </draw:text-box>
        </draw:frame>
        <draw:custom-shape draw:style-name="gr25" draw:text-style-name="P22" xml:id="id25" draw:id="id25" draw:layer="layout" svg:width="9cm" svg:height="2.4cm" svg:x="40cm" svg:y="15cm">
          <text:p text:style-name="P21">DL .mp3</text:p>
          <text:p text:style-name="P21">Actualiser la DB des Idopaques</text:p>
          <text:p text:style-name="P21"><text:span text:style-name="T12">#, IDopaque, titre, SHA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6" draw:text-style-name="P22" xml:id="id17" draw:id="id17" draw:layer="layout" svg:width="5.45cm" svg:height="1.679cm" svg:x="52.7cm" svg:y="31.621cm">
          <text:p text:style-name="P21">Jouer le son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27" draw:text-style-name="P24" xml:id="id13" draw:id="id13" draw:layer="layout" svg:width="6cm" svg:height="2.75cm" svg:x="25.026cm" svg:y="49.944cm">
          <text:p text:style-name="P9"><text:span text:style-name="T2">GTTS</text:span></text:p>
          <text:p text:style-name="P23"><text:span text:style-name="T5">Correspondances :</text:span></text:p>
          <text:p text:style-name="P23"><text:span text:style-name="T5">préfixes → langu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7" draw:text-style-name="P24" xml:id="id15" draw:id="id15" draw:layer="layout" svg:width="6cm" svg:height="2.75cm" svg:x="31.776cm" svg:y="49.944cm">
          <text:p text:style-name="P9"><text:span text:style-name="T2">TTS XXX ?</text:span></text:p>
          <text:p text:style-name="P9">Correspondances :</text:p>
          <text:p text:style-name="P9">préfixes → lang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8" draw:text-style-name="P24" xml:id="id19" draw:id="id19" draw:layer="layout" svg:width="8.5cm" svg:height="3.5cm" svg:x="18.31cm" svg:y="45.844cm">
          <text:p text:style-name="P9"><text:span text:style-name="T2">lettres_names</text:span></text:p>
          <text:p text:style-name="P9">Correspondances :</text:p>
          <text:p text:style-name="P9">« é » → « e accent aigü »</text:p>
          <text:p text:style-name="P9">« ? » → « point d’interrogation »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9" draw:text-style-name="P25" xml:id="id14" draw:id="id14" draw:layer="layout" svg:width="7cm" svg:height="1.5cm" svg:x="28.076cm" svg:y="44.744cm">
          <text:p text:style-name="P23"><text:span text:style-name="T5">Configuration de la voix de synthèse selon </text:span><text:span text:style-name="T13">préfix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0" draw:text-style-name="P10" xml:id="id18" draw:id="id18" draw:layer="layout" svg:width="5.5cm" svg:height="3.094cm" svg:x="19.8cm" svg:y="39.6cm">
          <text:p text:style-name="P9"><text:span text:style-name="T5">Construction de</text:span></text:p>
          <text:p text:style-name="P9"><text:span text:style-name="T7">to_say</text:span></text:p>
          <text:p text:style-name="P9"><text:span text:style-name="T7">to_show</text:span></text:p>
          <text:p text:style-name="P9"><text:span text:style-name="T14">Selon </text:span><text:span text:style-name="T15">suffixe </text:span><text:span text:style-name="T14">et</text:span><text:span text:style-name="T15"> paylo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s" svg:x1="28.026cm" svg:y1="49.944cm" svg:x2="31.576cm" svg:y2="46.244cm" draw:start-shape="id13" draw:start-glue-point="0" draw:end-shape="id14" draw:end-glue-point="6" svg:d="M28026 49944v-518l3550-2663v-519" svg:viewBox="0 0 3551 3701">
          <text:p/>
        </draw:connector>
        <draw:connector draw:style-name="gr15" draw:text-style-name="P11" draw:layer="layout" draw:type="lines" svg:x1="34.776cm" svg:y1="49.944cm" svg:x2="31.576cm" svg:y2="46.244cm" draw:start-shape="id15" draw:start-glue-point="0" draw:end-shape="id14" draw:end-glue-point="6" svg:d="M34776 49944v-518l-3200-2663v-519" svg:viewBox="0 0 3201 3701">
          <text:p/>
        </draw:connector>
        <draw:custom-shape draw:style-name="gr22" draw:text-style-name="P10" xml:id="id16" draw:id="id16" draw:layer="layout" svg:width="5.5cm" svg:height="1.679cm" svg:x="28.8cm" svg:y="40.344cm">
          <text:p text:style-name="P9"><text:span text:style-name="T14">Appel de la voix de synthès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s" draw:line-skew="0cm -0.282cm" svg:x1="34.3cm" svg:y1="41.183cm" svg:x2="52.7cm" svg:y2="32.46cm" draw:start-shape="id16" draw:start-glue-point="1" draw:end-shape="id17" draw:end-glue-point="3" svg:d="M34300 41183h519l17081-8723h800" svg:viewBox="0 0 18401 8724">
          <text:p/>
        </draw:connector>
        <draw:frame draw:style-name="gr31" draw:text-style-name="P18" draw:layer="layout" svg:width="1.5cm" svg:height="0.602cm" svg:x="51.5cm" svg:y="18.648cm">
          <draw:text-box>
            <text:p text:style-name="P17"><text:span text:style-name="T10">mp3</text:span></text:p>
          </draw:text-box>
        </draw:frame>
        <draw:connector draw:style-name="gr15" draw:text-style-name="P11" draw:layer="layout" draw:type="line" svg:x1="25.3cm" svg:y1="41.147cm" svg:x2="28.8cm" svg:y2="41.183cm" draw:start-shape="id18" draw:start-glue-point="1" draw:end-shape="id16" draw:end-glue-point="3" svg:d="M25300 41147l3500 36" svg:viewBox="0 0 3501 37">
          <text:p/>
        </draw:connector>
        <draw:frame draw:style-name="gr32" draw:text-style-name="P18" draw:layer="layout" svg:width="2cm" svg:height="0.602cm" svg:x="26cm" svg:y="41.339cm">
          <draw:text-box>
            <text:p text:style-name="P17"><text:span text:style-name="T10">to_say</text:span></text:p>
          </draw:text-box>
        </draw:frame>
        <draw:connector draw:style-name="gr15" draw:text-style-name="P11" draw:layer="layout" draw:type="lines" svg:x1="22.56cm" svg:y1="45.844cm" svg:x2="22.55cm" svg:y2="42.694cm" draw:start-shape="id19" draw:start-glue-point="0" draw:end-shape="id18" draw:end-glue-point="2" svg:d="M22560 45844v-518l-10-2113v-519" svg:viewBox="0 0 11 3151">
          <text:p/>
        </draw:connector>
        <draw:connector draw:style-name="gr15" draw:text-style-name="P11" draw:layer="layout" draw:type="line" svg:x1="16.25cm" svg:y1="41.85cm" svg:x2="19.8cm" svg:y2="41.147cm" draw:start-shape="id12" draw:start-glue-point="7" draw:end-shape="id18" draw:end-glue-point="3" svg:d="M16250 41850l3550-703" svg:viewBox="0 0 3551 704">
          <text:p/>
        </draw:connector>
        <draw:connector draw:style-name="gr15" draw:text-style-name="P11" draw:layer="layout" draw:type="lines" svg:x1="16.25cm" svg:y1="41.85cm" svg:x2="28.076cm" svg:y2="45.494cm" draw:start-shape="id12" draw:start-glue-point="7" draw:end-shape="id14" draw:end-glue-point="5" svg:d="M16250 41850h518l10790 3644h518" svg:viewBox="0 0 11827 3645">
          <text:p/>
        </draw:connector>
        <draw:connector draw:style-name="gr15" draw:text-style-name="P11" draw:layer="layout" draw:type="line" svg:x1="31.576cm" svg:y1="44.744cm" svg:x2="31.55cm" svg:y2="42.023cm" draw:start-shape="id14" draw:start-glue-point="4" draw:end-shape="id16" draw:end-glue-point="2" svg:d="M31576 44744l-26-2721" svg:viewBox="0 0 27 2722">
          <text:p/>
        </draw:connector>
        <draw:connector draw:style-name="gr15" draw:text-style-name="P11" draw:layer="layout" draw:type="lines" svg:x1="24.75cm" svg:y1="32.639cm" svg:x2="52.7cm" svg:y2="32.46cm" draw:start-shape="id11" draw:start-glue-point="1" draw:end-shape="id17" draw:end-glue-point="3" svg:d="M24750 32639h519l26913-179h518" svg:viewBox="0 0 27951 180">
          <text:p/>
        </draw:connector>
        <draw:frame draw:style-name="gr31" draw:text-style-name="P18" draw:layer="layout" svg:width="1.5cm" svg:height="0.602cm" svg:x="31.5cm" svg:y="31.85cm">
          <draw:text-box>
            <text:p text:style-name="P17"><text:span text:style-name="T10">mp3</text:span></text:p>
          </draw:text-box>
        </draw:frame>
        <draw:custom-shape draw:style-name="gr33" draw:text-style-name="P10" xml:id="id22" draw:id="id22" draw:layer="layout" svg:width="6.25cm" svg:height="2.5cm" svg:x="39cm" svg:y="9.35cm">
          <text:p text:style-name="P9"><text:span text:style-name="T7">ID opaque </text:span><text:span text:style-name="T16">est déjà présente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15" draw:text-style-name="P11" draw:layer="layout" draw:type="lines" svg:x1="38.883cm" svg:y1="26.75cm" svg:x2="38.875cm" svg:y2="25cm" draw:start-shape="id20" draw:start-glue-point="4" draw:end-shape="id21" draw:end-glue-point="6" svg:d="M38883 26750v-518l-8-713v-519" svg:viewBox="0 0 9 1751">
          <text:p/>
        </draw:connector>
        <draw:connector draw:style-name="gr15" draw:text-style-name="P11" draw:layer="layout" draw:type="line" svg:x1="45.25cm" svg:y1="10.6cm" svg:x2="48.006cm" svg:y2="10.626cm" draw:start-shape="id22" draw:start-glue-point="7" svg:d="M45250 10600l2756 26" svg:viewBox="0 0 2757 27">
          <text:p/>
        </draw:connector>
        <draw:frame draw:style-name="gr16" draw:text-style-name="P12" draw:layer="layout" svg:width="1.088cm" svg:height="0.645cm" svg:x="45.162cm" svg:y="9.8cm">
          <draw:text-box>
            <text:p><text:span text:style-name="T6">non</text:span></text:p>
          </draw:text-box>
        </draw:frame>
        <draw:frame draw:style-name="gr17" draw:text-style-name="P12" draw:layer="layout" svg:width="0.971cm" svg:height="0.645cm" svg:x="41.25cm" svg:y="8.6cm">
          <draw:text-box>
            <text:p><text:span text:style-name="T6">oui</text:span></text:p>
          </draw:text-box>
        </draw:frame>
        <draw:connector draw:style-name="gr15" draw:text-style-name="P11" draw:layer="layout" draw:type="lines" svg:x1="30.471cm" svg:y1="20.879cm" svg:x2="30.475cm" svg:y2="22.05cm" draw:start-shape="id23" draw:start-glue-point="6" draw:end-shape="id24" draw:end-glue-point="0" svg:d="M30471 20879v519l4 133v519" svg:viewBox="0 0 5 1172">
          <text:p/>
        </draw:connector>
        <draw:connector draw:style-name="gr15" draw:text-style-name="P11" draw:layer="layout" draw:type="lines" svg:x1="38.875cm" svg:y1="22.5cm" svg:x2="40cm" svg:y2="16.2cm" draw:start-shape="id21" draw:start-glue-point="4" draw:end-shape="id25" draw:end-glue-point="3" svg:d="M38875 22500v-518l607-5782h518" svg:viewBox="0 0 1126 6301">
          <text:p/>
        </draw:connector>
        <draw:frame draw:style-name="gr31" draw:text-style-name="P27" draw:layer="layout" svg:width="2.75cm" svg:height="0.602cm" svg:x="10cm" svg:y="22.3cm">
          <draw:text-box>
            <text:p text:style-name="P26"><text:span text:style-name="T17">match/case</text:span></text:p>
          </draw:text-box>
        </draw:frame>
        <draw:frame draw:style-name="gr34" draw:text-style-name="P27" draw:layer="layout" svg:width="3.25cm" svg:height="0.602cm" svg:x="51cm" svg:y="2.898cm">
          <draw:text-box>
            <text:p text:style-name="P26"><text:span text:style-name="T17">Actualiser #</text:span></text:p>
          </draw:text-box>
        </draw:frame>
        <draw:frame draw:style-name="gr34" draw:text-style-name="P27" draw:layer="layout" svg:width="3.25cm" svg:height="0.953cm" svg:x="50.6cm" svg:y="8.397cm">
          <draw:text-box>
            <text:p text:style-name="P26"><text:span text:style-name="T17">Ajouter</text:span></text:p>
            <text:p text:style-name="P26"><text:span text:style-name="T17">IDopaque</text:span></text:p>
          </draw:text-box>
        </draw:frame>
        <draw:frame draw:style-name="gr34" draw:text-style-name="P27" draw:layer="layout" svg:width="3.25cm" svg:height="1.655cm" svg:x="51cm" svg:y="3.6cm">
          <draw:text-box>
            <text:p text:style-name="P26"><text:span text:style-name="T17">Pour effacer les fichiers les plus anciens</text:span></text:p>
          </draw:text-box>
        </draw:frame>
        <draw:frame draw:style-name="gr31" draw:text-style-name="P18" draw:layer="layout" svg:width="1.5cm" svg:height="0.602cm" svg:x="34.75cm" svg:y="37.748cm">
          <draw:text-box>
            <text:p text:style-name="P17"><text:span text:style-name="T10">mp3</text:span></text:p>
          </draw:text-box>
        </draw:frame>
        <draw:custom-shape draw:style-name="gr35" draw:text-style-name="P29" xml:id="id26" draw:id="id26" draw:layer="layout" svg:width="3.75cm" svg:height="1.75cm" svg:x="60.65cm" svg:y="31.6cm">
          <text:p text:style-name="P28">Afficher</text:p>
          <text:p text:style-name="P23"><text:span text:style-name="T10">to_show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5" draw:text-style-name="P11" draw:layer="layout" draw:type="lines" svg:x1="58.15cm" svg:y1="32.46cm" svg:x2="60.65cm" svg:y2="32.475cm" draw:start-shape="id17" draw:start-glue-point="1" draw:end-shape="id26" draw:end-glue-point="5" svg:d="M58150 32460h519l1463 15h518" svg:viewBox="0 0 2501 16">
          <text:p/>
        </draw:connector>
        <draw:connector draw:style-name="gr15" draw:text-style-name="P11" draw:layer="layout" draw:type="lines" draw:line-skew="0cm -0.832cm" svg:x1="22.55cm" svg:y1="39.6cm" svg:x2="52.7cm" svg:y2="32.46cm" draw:start-shape="id18" draw:start-glue-point="0" draw:end-shape="id17" draw:end-glue-point="3" svg:d="M22550 39600v-518l28800-6622h1350" svg:viewBox="0 0 30151 7141">
          <text:p/>
        </draw:connector>
        <draw:frame draw:style-name="gr32" draw:text-style-name="P18" draw:layer="layout" svg:width="2cm" svg:height="0.602cm" svg:x="27.25cm" svg:y="36.998cm">
          <draw:text-box>
            <text:p text:style-name="P17"><text:span text:style-name="T10">to_show</text:span></text:p>
          </draw:text-box>
        </draw:frame>
        <draw:custom-shape draw:style-name="gr12" draw:text-style-name="P10" xml:id="id5" draw:id="id5" draw:layer="layout" svg:width="4.75cm" svg:height="1.679cm" svg:x="10.75cm" svg:y="15.871cm">
          <text:p text:style-name="P9"><text:span text:style-name="T5">Décrypt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2" draw:layer="layout" draw:type="line" svg:x1="13.125cm" svg:y1="14.1cm" svg:x2="13.125cm" svg:y2="15.871cm" draw:start-shape="id3" draw:start-glue-point="6" draw:end-shape="id5" draw:end-glue-point="0" svg:d="M13125 14100v1771" svg:viewBox="0 0 1 1772">
          <text:p/>
        </draw:connector>
        <draw:frame draw:style-name="gr36" draw:text-style-name="P15" draw:layer="layout" svg:width="4.6cm" svg:height="0.75cm" svg:x="13.4cm" svg:y="14.55cm">
          <draw:text-box>
            <text:p text:style-name="P14"><text:span text:style-name="T10">crypt_qr_content</text:span></text:p>
          </draw:text-box>
        </draw:frame>
        <draw:frame draw:style-name="gr31" draw:text-style-name="P15" draw:layer="layout" svg:width="3.1cm" svg:height="0.602cm" svg:x="13.4cm" svg:y="18.25cm">
          <draw:text-box>
            <text:p text:style-name="P14"><text:span text:style-name="T10">qr_content</text:span></text:p>
          </draw:text-box>
        </draw:frame>
        <draw:frame draw:style-name="gr19" draw:text-style-name="P15" draw:layer="layout" svg:width="5.6cm" svg:height="0.602cm" draw:transform="rotate (1.33779487165365) translate (5.011cm 17.756cm)">
          <draw:text-box>
            <text:p text:style-name="P14"><text:span text:style-name="T10">crypt_qr_content</text:span></text:p>
          </draw:text-box>
        </draw:frame>
        <draw:custom-shape draw:style-name="gr37" draw:text-style-name="P25" xml:id="id23" draw:id="id23" draw:layer="layout" svg:width="4.5cm" svg:height="2.25cm" svg:x="28.221cm" svg:y="18.629cm">
          <text:p text:style-name="P23"><text:span text:style-name="T14">Adresses des Drive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3" draw:text-style-name="P10" xml:id="id28" draw:id="id28" draw:layer="layout" svg:width="6.25cm" svg:height="2.5cm" svg:x="19.5cm" svg:y="26.25cm">
          <text:p text:style-name="P9"><text:span text:style-name="T7">ID opaque </text:span><text:span text:style-name="T16">est déjà présente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8" draw:text-style-name="P31" xml:id="id27" draw:id="id27" draw:layer="layout" svg:width="5.95cm" svg:height="1.679cm" svg:x="19.65cm" svg:y="19.303cm">
          <text:p text:style-name="P30"><text:span text:style-name="T5">Vérificateur de connexion à interne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22.625cm" svg:y1="20.982cm" svg:x2="22.625cm" svg:y2="22.59cm" draw:start-shape="id27" draw:start-glue-point="2" draw:end-shape="id10" svg:d="M22625 20982v1608" svg:viewBox="0 0 1 1609">
          <text:p/>
        </draw:connector>
        <draw:frame draw:style-name="gr17" draw:text-style-name="P12" draw:layer="layout" svg:width="2.143cm" svg:height="0.645cm" svg:x="20.357cm" svg:y="21.355cm">
          <draw:text-box>
            <text:p><text:span text:style-name="T6">true / false</text:span></text:p>
          </draw:text-box>
        </draw:frame>
        <draw:custom-shape draw:style-name="gr33" draw:text-style-name="P10" xml:id="id10" draw:id="id10" draw:layer="layout" svg:width="6.25cm" svg:height="2.5cm" svg:x="19.5cm" svg:y="22.59cm">
          <text:p text:style-name="P9"><text:span text:style-name="T5">Y a-t-il internet 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15" draw:text-style-name="P11" draw:layer="layout" draw:type="line" svg:x1="22.625cm" svg:y1="25.09cm" svg:x2="22.625cm" svg:y2="26.25cm" draw:start-shape="id10" draw:start-glue-point="6" draw:end-shape="id28" draw:end-glue-point="4" svg:d="M22625 25090v1160" svg:viewBox="0 0 1 1161">
          <text:p/>
        </draw:connector>
        <draw:frame draw:style-name="gr16" draw:text-style-name="P12" draw:layer="layout" svg:width="1.088cm" svg:height="0.645cm" svg:x="21.412cm" svg:y="25.25cm">
          <draw:text-box>
            <text:p><text:span text:style-name="T6">non</text:span></text:p>
          </draw:text-box>
        </draw:frame>
        <draw:frame draw:style-name="gr16" draw:text-style-name="P12" draw:layer="layout" svg:width="1.088cm" svg:height="0.645cm" svg:x="21.25cm" svg:y="28.75cm">
          <draw:text-box>
            <text:p><text:span text:style-name="T6">non</text:span></text:p>
          </draw:text-box>
        </draw:frame>
        <draw:frame draw:style-name="gr16" draw:text-style-name="P12" draw:layer="layout" svg:width="1.088cm" svg:height="0.645cm" svg:x="25.55cm" svg:y="26.8cm">
          <draw:text-box>
            <text:p><text:span text:style-name="T6">oui</text:span></text:p>
          </draw:text-box>
        </draw:frame>
        <draw:custom-shape draw:style-name="gr39" draw:text-style-name="P29" xml:id="id29" draw:id="id29" draw:layer="layout" svg:width="5cm" svg:height="1.75cm" svg:x="23.75cm" svg:y="29.25cm">
          <text:p text:style-name="P28">Afficher</text:p>
          <text:p text:style-name="P23"><text:span text:style-name="T10">« pas de connexion à internet »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5" draw:text-style-name="P11" draw:layer="layout" draw:type="lines" svg:x1="22.625cm" svg:y1="28.75cm" svg:x2="23.75cm" svg:y2="30.125cm" draw:start-shape="id28" draw:start-glue-point="6" draw:end-shape="id29" draw:end-glue-point="5" svg:d="M22625 28750v519l607 856h518" svg:viewBox="0 0 1126 1376">
          <text:p/>
        </draw:connector>
        <draw:connector draw:style-name="gr15" draw:text-style-name="P11" draw:layer="layout" draw:type="lines" draw:line-skew="0cm -0.532cm" svg:x1="25.75cm" svg:y1="27.5cm" svg:x2="52.7cm" svg:y2="32.46cm" draw:start-shape="id28" draw:start-glue-point="7" draw:end-shape="id17" draw:end-glue-point="3" svg:d="M25750 27500h518l25382 4960h1050" svg:viewBox="0 0 26951 4961">
          <text:p/>
        </draw:connector>
        <draw:frame draw:style-name="gr31" draw:text-style-name="P18" draw:layer="layout" svg:width="1.5cm" svg:height="0.602cm" svg:x="31cm" svg:y="28.898cm">
          <draw:text-box>
            <text:p text:style-name="P17"><text:span text:style-name="T10">mp3</text:span></text:p>
          </draw:text-box>
        </draw:frame>
        <draw:frame draw:style-name="gr16" draw:text-style-name="P12" draw:layer="layout" svg:width="1.088cm" svg:height="0.645cm" svg:x="25.534cm" svg:y="23.2cm">
          <draw:text-box>
            <text:p><text:span text:style-name="T6">oui</text:span></text:p>
          </draw:text-box>
        </draw:frame>
        <draw:connector draw:style-name="gr15" draw:text-style-name="P11" draw:layer="layout" draw:type="line" svg:x1="25.75cm" svg:y1="23.84cm" svg:x2="35.75cm" svg:y2="23.75cm" draw:start-shape="id10" draw:start-glue-point="7" draw:end-shape="id21" draw:end-glue-point="5" svg:d="M25750 23840l10000-90" svg:viewBox="0 0 10001 91">
          <text:p/>
        </draw:connector>
        <draw:custom-shape draw:style-name="gr33" draw:text-style-name="P10" xml:id="id30" draw:id="id30" draw:layer="layout" svg:width="6.25cm" svg:height="2.5cm" svg:x="43.75cm" svg:y="22.5cm">
          <text:p text:style-name="P9"><text:span text:style-name="T5">Ont-ils le même MD5 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3" draw:text-style-name="P10" xml:id="id21" draw:id="id21" draw:layer="layout" svg:width="6.25cm" svg:height="2.5cm" svg:x="35.75cm" svg:y="22.5cm">
          <text:p text:style-name="P9"><text:span text:style-name="T7">ID opaque </text:span><text:span text:style-name="T16">est déjà présente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40" draw:text-style-name="P25" xml:id="id20" draw:id="id20" draw:layer="layout" svg:width="4.5cm" svg:height="2.25cm" svg:x="36.633cm" svg:y="26.75cm">
          <text:p text:style-name="P23"><text:span text:style-name="T5">DB des </text:span><text:span text:style-name="T7">IDopaques</text:span></text:p>
          <text:p text:style-name="P23"><text:span text:style-name="T14">déjà rencontrées</text:span>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onnector draw:style-name="gr15" draw:text-style-name="P11" draw:layer="layout" draw:type="lines" svg:x1="36.633cm" svg:y1="27.875cm" svg:x2="22.625cm" svg:y2="26.25cm" draw:start-shape="id20" draw:start-glue-point="5" draw:end-shape="id28" draw:end-glue-point="4" svg:d="M36633 27875h-518l-13490-2143v518" svg:viewBox="0 0 14009 2144">
          <text:p/>
        </draw:connector>
        <draw:connector draw:style-name="gr15" draw:text-style-name="P11" draw:layer="layout" draw:type="line" svg:x1="42cm" svg:y1="23.75cm" svg:x2="43.75cm" svg:y2="23.75cm" draw:start-shape="id21" draw:start-glue-point="7" draw:end-shape="id30" draw:end-glue-point="5" svg:d="M42000 23750h1750" svg:viewBox="0 0 1751 1">
          <text:p/>
        </draw:connector>
        <draw:connector draw:style-name="gr15" draw:text-style-name="P11" draw:layer="layout" draw:type="lines" svg:x1="50cm" svg:y1="23.75cm" svg:x2="52.7cm" svg:y2="32.46cm" draw:start-shape="id30" draw:start-glue-point="7" draw:end-shape="id17" draw:end-glue-point="3" svg:d="M50000 23750h518l1664 8710h518" svg:viewBox="0 0 2701 8711">
          <text:p/>
        </draw:connector>
        <draw:frame draw:style-name="gr16" draw:text-style-name="P12" draw:layer="layout" svg:width="1.088cm" svg:height="0.645cm" svg:x="49.75cm" svg:y="23cm">
          <draw:text-box>
            <text:p><text:span text:style-name="T6">oui</text:span></text:p>
          </draw:text-box>
        </draw:frame>
        <draw:custom-shape draw:style-name="gr41" draw:text-style-name="P31" xml:id="id24" draw:id="id24" draw:layer="layout" svg:width="5.95cm" svg:height="3.429cm" svg:x="27.5cm" svg:y="22.05cm">
          <text:p text:style-name="P30"><text:span text:style-name="T18">Re-constructeur des liens externes</text:span></text:p>
          <text:p text:style-name="P30"><text:span text:style-name="T18"/></text:p>
          <text:p text:style-name="P30"><text:span text:style-name="T18">Télécharger et nommer </text:span><text:span text:style-name="T7">IDopaques.mp3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6" draw:text-style-name="P12" draw:layer="layout" svg:width="1.088cm" svg:height="0.645cm" svg:x="42cm" svg:y="23cm">
          <draw:text-box>
            <text:p><text:span text:style-name="T6">oui</text:span></text:p>
          </draw:text-box>
        </draw:frame>
        <draw:frame draw:style-name="gr16" draw:text-style-name="P12" draw:layer="layout" svg:width="1.088cm" svg:height="0.645cm" svg:x="39.412cm" svg:y="21.605cm">
          <draw:text-box>
            <text:p><text:span text:style-name="T6">non</text:span></text:p>
          </draw:text-box>
        </draw:frame>
      </draw:page>
      <draw:page draw:name="page2" draw:style-name="dp1" draw:master-page-name="Standard">
        <draw:custom-shape draw:style-name="gr42" draw:text-style-name="P31" xml:id="id31" draw:id="id31" draw:layer="layout" svg:width="7cm" svg:height="2cm" svg:x="5.25cm" svg:y="2.8cm">
          <text:p text:style-name="P30"><text:span text:style-name="T18">Suffixe = </text:span><text:span text:style-name="T19">"l"</text:span></text:p>
          <text:p text:style-name="P30"><text:span text:style-name="T19">lir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3" draw:text-style-name="P31" xml:id="id32" draw:id="id32" draw:layer="layout" svg:width="7cm" svg:height="2cm" svg:x="5.25cm" svg:y="5.6cm">
          <text:p text:style-name="P30"><text:span text:style-name="T18">Suffixe = </text:span><text:span text:style-name="T19">"c"</text:span></text:p>
          <text:p text:style-name="P30"><text:span text:style-name="T19">cach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4.8cm" svg:x2="8.75cm" svg:y2="5.6cm" draw:start-shape="id31" draw:start-glue-point="6" draw:end-shape="id32" draw:end-glue-point="4" svg:d="M8750 4800v800" svg:viewBox="0 0 1 801">
          <text:p/>
        </draw:connector>
        <draw:custom-shape draw:style-name="gr44" draw:text-style-name="P31" xml:id="id33" draw:id="id33" draw:layer="layout" svg:width="7cm" svg:height="2cm" svg:x="5.25cm" svg:y="8.3cm">
          <text:p text:style-name="P30"><text:span text:style-name="T18">Suffixe = </text:span><text:span text:style-name="T19">"d"</text:span></text:p>
          <text:p text:style-name="P30"><text:span text:style-name="T19">dic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7.6cm" svg:x2="8.75cm" svg:y2="8.3cm" draw:start-shape="id32" draw:start-glue-point="6" draw:end-shape="id33" draw:end-glue-point="4" svg:d="M8750 7600v700" svg:viewBox="0 0 1 701">
          <text:p/>
        </draw:connector>
        <draw:custom-shape draw:style-name="gr45" draw:text-style-name="P31" xml:id="id34" draw:id="id34" draw:layer="layout" svg:width="7cm" svg:height="2cm" svg:x="5.25cm" svg:y="11cm">
          <text:p text:style-name="P30"><text:span text:style-name="T18">Suffixe = </text:span><text:span text:style-name="T19">"e"</text:span></text:p>
          <text:p text:style-name="P30"><text:span text:style-name="T19">épel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10.3cm" svg:x2="8.75cm" svg:y2="11cm" draw:end-shape="id34" draw:end-glue-point="4" svg:d="M8750 10300v700" svg:viewBox="0 0 1 7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1:50:15.100636630</meta:creation-date>
    <dc:date>2026-05-16T16:11:22.620940761</dc:date>
    <meta:editing-duration>PT5H18M50S</meta:editing-duration>
    <meta:editing-cycles>229</meta:editing-cycles>
    <meta:generator>LibreOffice/26.2.3.2$Linux_X86_64 LibreOffice_project/70e089b17412e4cb7773e41413306b17a2328c34</meta:generator>
    <meta:document-statistic meta:object-count="124"/>
  </office:meta>
</office:document-meta>
</file>