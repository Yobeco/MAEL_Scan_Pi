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3465a4" draw:marker-start-width="0.242cm" draw:marker-end-width="0.242cm" svg:stroke-linecap="butt" draw:fill="solid" draw:fill-color="#dee6ef" draw:textarea-horizontal-align="justify" draw:textarea-vertical-align="middle" draw:auto-grow-height="false" fo:min-height="20.972cm" fo:min-width="5.722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40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7cm" fo:min-width="3.648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11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102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52cm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96cm" fo:min-width="2.466cm" fo:padding-top="0.142cm" fo:padding-bottom="0.142cm" fo:padding-left="0.267cm" fo:padding-right="0.267cm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7cm" fo:min-width="2.754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5.966cm" fo:padding-top="0.142cm" fo:padding-bottom="0.142cm" fo:padding-left="0.267cm" fo:padding-right="0.267cm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4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7cm" fo:min-width="4.966cm" fo:padding-top="0.142cm" fo:padding-bottom="0.142cm" fo:padding-left="0.267cm" fo:padding-right="0.267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3.966cm" fo:padding-top="0.142cm" fo:padding-bottom="0.142cm" fo:padding-left="0.267cm" fo:padding-right="0.267cm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3.966cm" fo:padding-top="0.142cm" fo:padding-bottom="0.142cm" fo:padding-left="0.267cm" fo:padding-right="0.267cm" loext:decorative="false"/>
      <style:paragraph-properties style:writing-mode="lr-tb"/>
    </style:style>
    <style:style style:name="gr42" style:family="graphic" style:parent-style-name="objectwithoutfill">
      <style:graphic-properties draw:stroke="dash" draw:stroke-dash="Long_20_Dash" svg:stroke-width="0.028cm" svg:stroke-color="#000000" draw:marker-start-width="0.242cm" draw:marker-end="Extrémités_20_de_20_flèche_20_2" draw:marker-end-width="0.342cm" svg:stroke-linecap="butt" draw:fill="none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style:font-name="FreeMono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cm" fo:margin-bottom="0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>
      <loext:graphic-properties draw:fill="non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margin-top="0cm" fo:margin-bottom="0cm" fo:text-align="center"/>
      <style:text-properties fo:font-size="12pt"/>
    </style:style>
    <style:style style:name="P28" style:family="paragraph">
      <loext:graphic-properties draw:fill-color="#ffffff"/>
      <style:paragraph-properties fo:margin-top="0cm" fo:margin-bottom="0cm" fo:text-align="center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31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style:style style:name="T12" style:family="text">
      <style:text-properties fo:font-size="12pt" style:text-underline-style="none" fo:font-weight="bold" style:font-weight-asian="bold" style:font-weight-complex="bold"/>
    </style:style>
    <style:style style:name="T13" style:family="text">
      <style:text-properties style:font-name="Liberation Sans" fo:font-size="12pt" fo:font-weight="normal" style:font-weight-asian="normal" style:font-weight-complex="normal"/>
    </style:style>
    <style:style style:name="T14" style:family="text">
      <style:text-properties style:font-name="Liberation Sans" fo:font-size="12pt" fo:font-weight="bold" style:font-weight-asian="bold" style:font-weight-complex="bold"/>
    </style:style>
    <style:style style:name="T15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Liberation sans" fo:font-size="12pt" fo:font-weight="normal" style:font-weight-asian="normal" style:font-weight-complex="normal"/>
    </style:style>
    <style:style style:name="T17" style:family="text">
      <style:text-properties style:font-name="FreeMono" fo:font-size="12pt" fo:font-weight="normal" style:letter-kerning="true" style:font-name-asian="Noto Sans CJK SC" style:font-size-asian="12pt" style:font-weight-asian="normal" style:font-name-complex="Noto Sans Devanagari" style:font-size-complex="1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21.25cm" svg:x="10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3">
          <draw:custom-shape draw:style-name="gr4" draw:text-style-name="P3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7">
          <draw:path draw:style-name="gr8" draw:text-style-name="P4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8" draw:text-style-name="P4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8" draw:text-style-name="P4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8" draw:text-style-name="P4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8" draw:text-style-name="P4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8" draw:text-style-name="P4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5" draw:text-style-name="P2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10" draw:text-style-name="P6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1" draw:text-style-name="P8" xml:id="id1" draw:id="id1" draw:layer="layout" svg:width="4.5cm" svg:height="1.75cm" svg:x="10.875cm" svg:y="6.571cm">
          <text:p text:style-name="P7"><text:span text:style-name="T3">scan_bt</text:span></text:p>
          <text:p text:style-name="P7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" draw:id="id2" draw:layer="layout" svg:width="4.75cm" svg:height="1.679cm" svg:x="10.75cm" svg:y="9.121cm">
          <text:p text:style-name="P9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0" xml:id="id3" draw:id="id3" draw:layer="layout" svg:width="6cm" svg:height="2cm" svg:x="10.125cm" svg:y="12.1cm">
          <text:p text:style-name="P9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4" draw:text-style-name="P2" draw:layer="layout" draw:type="line" svg:x1="13.125cm" svg:y1="10.8cm" svg:x2="13.125cm" svg:y2="12.1cm" draw:start-shape="id2" draw:start-glue-point="2" draw:end-shape="id3" draw:end-glue-point="4" svg:d="M13125 10800v1300" svg:viewBox="0 0 1 1301">
          <text:p/>
        </draw:connector>
        <draw:connector draw:style-name="gr14" draw:text-style-name="P11" draw:layer="layout" draw:type="lines" draw:line-skew="-2.732cm" svg:x1="10.125cm" svg:y1="13.1cm" svg:x2="5.475cm" svg:y2="19.35cm" draw:start-shape="id3" draw:start-glue-point="5" draw:end-shape="id4" draw:end-glue-point="0" svg:d="M10125 13100h-3250l-1400 5731v519" svg:viewBox="0 0 4651 6251">
          <text:p/>
        </draw:connector>
        <draw:connector draw:style-name="gr15" draw:text-style-name="P11" draw:layer="layout" draw:type="line" svg:x1="13.125cm" svg:y1="17.55cm" svg:x2="13.125cm" svg:y2="19.471cm" draw:start-shape="id5" draw:start-glue-point="2" draw:end-shape="id6" draw:end-glue-point="0" svg:d="M13125 17550v1921" svg:viewBox="0 0 1 1922">
          <text:p/>
        </draw:connector>
        <draw:frame draw:style-name="gr16" draw:text-style-name="P12" draw:layer="layout" svg:width="1.088cm" svg:height="0.645cm" svg:x="11.75cm" svg:y="14.1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9.25cm" svg:y="12.355cm">
          <draw:text-box>
            <text:p><text:span text:style-name="T6">oui</text:span></text:p>
          </draw:text-box>
        </draw:frame>
        <draw:custom-shape draw:style-name="gr12" draw:text-style-name="P10" xml:id="id4" draw:id="id4" draw:layer="layout" svg:width="4.75cm" svg:height="1.679cm" svg:x="3.1cm" svg:y="19.35cm">
          <text:p text:style-name="P9"><text:span text:style-name="T5">Analyser</text:span></text:p>
          <text:p text:style-name="P9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7" draw:id="id7" draw:layer="layout" svg:width="4.75cm" svg:height="1.679cm" svg:x="3.1cm" svg:y="23.021cm">
          <text:p text:style-name="P9"><text:span text:style-name="T5">Configurer</text:span></text:p>
          <text:p text:style-name="P9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.475cm" svg:y1="21.029cm" svg:x2="5.475cm" svg:y2="23.021cm" draw:start-shape="id4" draw:start-glue-point="2" draw:end-shape="id7" draw:end-glue-point="0" svg:d="M5475 21029v1992" svg:viewBox="0 0 1 1993">
          <text:p/>
        </draw:connector>
        <draw:frame draw:style-name="gr18" draw:text-style-name="P13" draw:layer="layout" svg:width="4.5cm" svg:height="1.335cm" svg:x="1cm" svg:y="21.3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2" draw:text-style-name="P10" xml:id="id6" draw:id="id6" draw:layer="layout" svg:width="4.75cm" svg:height="1.679cm" svg:x="10.75cm" svg:y="19.471cm">
          <text:p text:style-name="P9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9" draw:text-style-name="P15" draw:layer="layout" svg:width="5.6cm" svg:height="0.602cm" svg:x="13.4cm" svg:y="11.148cm">
          <draw:text-box>
            <text:p text:style-name="P14"><text:span text:style-name="T10">crypt_qr_content : str</text:span></text:p>
          </draw:text-box>
        </draw:frame>
        <draw:custom-shape draw:style-name="gr20" draw:text-style-name="P10" xml:id="id8" draw:id="id8" draw:layer="layout" svg:width="6.25cm" svg:height="2cm" svg:x="10cm" svg:y="22.85cm">
          <text:p text:style-name="P9"><text:span text:style-name="T5">C’est un</text:span></text:p>
          <text:p text:style-name="P9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10" xml:id="id9" draw:id="id9" draw:layer="layout" svg:width="6.25cm" svg:height="2cm" svg:x="10cm" svg:y="31.65cm">
          <text:p text:style-name="P9"><text:span text:style-name="T5">C’est un</text:span></text:p>
          <text:p text:style-name="P9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text-style-name="P16" draw:layer="layout" svg:width="3.453cm" svg:height="0.602cm" svg:x="34cm" svg:y="52.898cm">
          <draw:text-box>
            <text:p><text:span text:style-name="T11">Pour plus tard</text:span></text:p>
          </draw:text-box>
        </draw:frame>
        <draw:connector draw:style-name="gr15" draw:text-style-name="P11" draw:layer="layout" draw:type="line" svg:x1="13.125cm" svg:y1="21.15cm" svg:x2="13.125cm" svg:y2="22.85cm" draw:start-shape="id6" draw:start-glue-point="2" draw:end-shape="id8" draw:end-glue-point="4" svg:d="M13125 21150v1700" svg:viewBox="0 0 1 1701">
          <text:p/>
        </draw:connector>
        <draw:connector draw:style-name="gr15" draw:text-style-name="P11" draw:layer="layout" draw:type="line" svg:x1="13.125cm" svg:y1="24.85cm" svg:x2="13.125cm" svg:y2="31.65cm" draw:start-shape="id8" draw:start-glue-point="6" draw:end-shape="id9" draw:end-glue-point="4" svg:d="M13125 24850v6800" svg:viewBox="0 0 1 6801">
          <text:p/>
        </draw:connector>
        <draw:connector draw:style-name="gr15" draw:text-style-name="P11" draw:layer="layout" draw:type="line" svg:x1="16.25cm" svg:y1="23.85cm" svg:x2="19.5cm" svg:y2="23.84cm" draw:start-shape="id8" draw:end-shape="id10" draw:end-glue-point="5" svg:d="M16250 23850l3250-10" svg:viewBox="0 0 3251 11">
          <text:p/>
        </draw:connector>
        <draw:custom-shape draw:style-name="gr22" draw:text-style-name="P10" xml:id="id11" draw:id="id11" draw:layer="layout" svg:width="5.5cm" svg:height="1.679cm" svg:x="19.25cm" svg:y="31.8cm">
          <text:p text:style-name="P9"><text:span text:style-name="T5">Re-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16.25cm" svg:y1="32.65cm" svg:x2="19.25cm" svg:y2="32.639cm" draw:start-shape="id9" draw:start-glue-point="7" draw:end-shape="id11" draw:end-glue-point="3" svg:d="M16250 32650l3000-11" svg:viewBox="0 0 3001 12">
          <text:p/>
        </draw:connector>
        <draw:frame draw:style-name="gr19" draw:text-style-name="P15" draw:layer="layout" svg:width="3.35cm" svg:height="1.304cm" svg:x="16.2cm" svg:y="22.403cm">
          <draw:text-box>
            <text:p text:style-name="P14"><text:span text:style-name="T10">id_IDopaque,</text:span></text:p>
            <text:p text:style-name="P14"><text:span text:style-name="T10">drive_name,</text:span></text:p>
            <text:p text:style-name="P14"><text:span text:style-name="T10">file_id</text:span></text:p>
          </draw:text-box>
        </draw:frame>
        <draw:frame draw:style-name="gr23" draw:text-style-name="P18" draw:layer="layout" svg:width="2.85cm" svg:height="1.655cm" svg:x="16.25cm" svg:y="31.2cm">
          <draw:text-box>
            <text:p text:style-name="P17"><text:span text:style-name="T10">id_assets, language, word</text:span></text:p>
          </draw:text-box>
        </draw:frame>
        <draw:custom-shape draw:style-name="gr20" draw:text-style-name="P10" xml:id="id12" draw:id="id12" draw:layer="layout" svg:width="6.25cm" svg:height="2cm" svg:x="10cm" svg:y="40.85cm">
          <text:p text:style-name="P9"><text:span text:style-name="T5">C’est un</text:span></text:p>
          <text:p text:style-name="P9"><text:span text:style-name="T7">M3SQ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" draw:text-style-name="P20" draw:layer="layout" svg:width="3.35cm" svg:height="1.655cm" svg:x="16.25cm" svg:y="39.9cm">
          <draw:text-box>
            <text:p text:style-name="P19"><text:span text:style-name="T10">id_m3sq,</text:span></text:p>
            <text:p text:style-name="P19"><text:span text:style-name="T10">prefixe,</text:span></text:p>
            <text:p text:style-name="P19"><text:span text:style-name="T10">payload,</text:span></text:p>
            <text:p text:style-name="P19"><text:span text:style-name="T10">suffixe</text:span></text:p>
          </draw:text-box>
        </draw:frame>
        <draw:connector draw:style-name="gr15" draw:text-style-name="P11" draw:layer="layout" draw:type="line" svg:x1="13.125cm" svg:y1="33.65cm" svg:x2="13.125cm" svg:y2="40.85cm" draw:start-shape="id9" draw:start-glue-point="6" draw:end-shape="id12" draw:end-glue-point="4" svg:d="M13125 33650v7200" svg:viewBox="0 0 1 7201">
          <text:p/>
        </draw:connector>
        <draw:frame draw:style-name="gr21" draw:text-style-name="P16" draw:layer="layout" svg:width="2.821cm" svg:height="2.006cm" svg:x="9.929cm" svg:y="39cm">
          <draw:text-box>
            <text:p><text:span text:style-name="T10">M</text:span><text:span text:style-name="T11">AEL </text:span></text:p>
            <text:p><text:span text:style-name="T10">S</text:span><text:span text:style-name="T11">yntax for </text:span></text:p>
            <text:p><text:span text:style-name="T10">S</text:span><text:span text:style-name="T11">ynthetic </text:span></text:p>
            <text:p><text:span text:style-name="T10">S</text:span><text:span text:style-name="T11">peech in </text:span></text:p>
            <text:p><text:span text:style-name="T10">Q</text:span><text:span text:style-name="T11">Rcodes</text:span></text:p>
          </draw:text-box>
        </draw:frame>
        <draw:custom-shape draw:style-name="gr25" draw:text-style-name="P22" xml:id="id17" draw:id="id17" draw:layer="layout" svg:width="5.45cm" svg:height="1.679cm" svg:x="52.7cm" svg:y="31.621cm">
          <text:p text:style-name="P21">Jouer le son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6" draw:text-style-name="P24" xml:id="id14" draw:id="id14" draw:layer="layout" svg:width="7cm" svg:height="1.5cm" svg:x="28.076cm" svg:y="44.744cm">
          <text:p text:style-name="P23"><text:span text:style-name="T5">Configuration de la voix de synthèse selon </text:span><text:span text:style-name="T12">préfix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10" xml:id="id18" draw:id="id18" draw:layer="layout" svg:width="5.5cm" svg:height="3.094cm" svg:x="19.8cm" svg:y="39.6cm">
          <text:p text:style-name="P9"><text:span text:style-name="T5">Construction de</text:span></text:p>
          <text:p text:style-name="P9"><text:span text:style-name="T7">to_say</text:span></text:p>
          <text:p text:style-name="P9"><text:span text:style-name="T7">to_show</text:span></text:p>
          <text:p text:style-name="P9"><text:span text:style-name="T13">Selon </text:span><text:span text:style-name="T14">suffixe </text:span><text:span text:style-name="T13">et</text:span><text:span text:style-name="T14"> paylo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svg:x1="28.125cm" svg:y1="50.5cm" svg:x2="31.576cm" svg:y2="46.244cm" draw:start-shape="id13" draw:start-glue-point="4" draw:end-shape="id14" draw:end-glue-point="6" svg:d="M28125 50500v-518l3451-3219v-519" svg:viewBox="0 0 3452 4257">
          <text:p/>
        </draw:connector>
        <draw:connector draw:style-name="gr15" draw:text-style-name="P11" draw:layer="layout" draw:type="lines" svg:x1="35.625cm" svg:y1="50.5cm" svg:x2="31.576cm" svg:y2="46.244cm" draw:start-shape="id15" draw:start-glue-point="4" draw:end-shape="id14" draw:end-glue-point="6" svg:d="M35625 50500v-518l-4049-3219v-519" svg:viewBox="0 0 4050 4257">
          <text:p/>
        </draw:connector>
        <draw:custom-shape draw:style-name="gr22" draw:text-style-name="P10" xml:id="id16" draw:id="id16" draw:layer="layout" svg:width="5.5cm" svg:height="1.679cm" svg:x="28.8cm" svg:y="40.344cm">
          <text:p text:style-name="P9"><text:span text:style-name="T13">Appel de la voix de synthèse GT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draw:line-skew="0cm -0.282cm" svg:x1="34.3cm" svg:y1="41.183cm" svg:x2="52.7cm" svg:y2="32.46cm" draw:start-shape="id16" draw:start-glue-point="1" draw:end-shape="id17" draw:end-glue-point="3" svg:d="M34300 41183h519l17081-8723h800" svg:viewBox="0 0 18401 8724">
          <text:p/>
        </draw:connector>
        <draw:connector draw:style-name="gr15" draw:text-style-name="P11" draw:layer="layout" draw:type="line" svg:x1="25.3cm" svg:y1="41.147cm" svg:x2="28.8cm" svg:y2="41.183cm" draw:start-shape="id18" draw:start-glue-point="1" draw:end-shape="id16" draw:end-glue-point="3" svg:d="M25300 41147l3500 36" svg:viewBox="0 0 3501 37">
          <text:p/>
        </draw:connector>
        <draw:frame draw:style-name="gr28" draw:text-style-name="P18" draw:layer="layout" svg:width="2cm" svg:height="0.602cm" svg:x="26cm" svg:y="41.339cm">
          <draw:text-box>
            <text:p text:style-name="P17"><text:span text:style-name="T10">to_say</text:span></text:p>
          </draw:text-box>
        </draw:frame>
        <draw:connector draw:style-name="gr15" draw:text-style-name="P11" draw:layer="layout" draw:type="lines" svg:x1="21.625cm" svg:y1="46cm" svg:x2="22.55cm" svg:y2="42.694cm" draw:start-shape="id19" draw:start-glue-point="4" draw:end-shape="id18" draw:end-glue-point="2" svg:d="M21625 46000v-518l925-2269v-519" svg:viewBox="0 0 926 3307">
          <text:p/>
        </draw:connector>
        <draw:connector draw:style-name="gr15" draw:text-style-name="P11" draw:layer="layout" draw:type="line" svg:x1="16.25cm" svg:y1="41.85cm" svg:x2="19.8cm" svg:y2="41.147cm" draw:start-shape="id12" draw:start-glue-point="7" draw:end-shape="id18" draw:end-glue-point="3" svg:d="M16250 41850l3550-703" svg:viewBox="0 0 3551 704">
          <text:p/>
        </draw:connector>
        <draw:connector draw:style-name="gr15" draw:text-style-name="P11" draw:layer="layout" draw:type="lines" svg:x1="16.25cm" svg:y1="41.85cm" svg:x2="28.076cm" svg:y2="45.494cm" draw:start-shape="id12" draw:start-glue-point="7" draw:end-shape="id14" draw:end-glue-point="5" svg:d="M16250 41850h518l10790 3644h518" svg:viewBox="0 0 11827 3645">
          <text:p/>
        </draw:connector>
        <draw:connector draw:style-name="gr15" draw:text-style-name="P11" draw:layer="layout" draw:type="line" svg:x1="31.576cm" svg:y1="44.744cm" svg:x2="31.55cm" svg:y2="42.023cm" draw:start-shape="id14" draw:start-glue-point="4" draw:end-shape="id16" draw:end-glue-point="2" svg:d="M31576 44744l-26-2721" svg:viewBox="0 0 27 2722">
          <text:p/>
        </draw:connector>
        <draw:connector draw:style-name="gr15" draw:text-style-name="P11" draw:layer="layout" draw:type="lines" svg:x1="24.75cm" svg:y1="32.639cm" svg:x2="52.7cm" svg:y2="32.46cm" draw:start-shape="id11" draw:start-glue-point="1" draw:end-shape="id17" draw:end-glue-point="3" svg:d="M24750 32639h519l26913-179h518" svg:viewBox="0 0 27951 180">
          <text:p/>
        </draw:connector>
        <draw:frame draw:style-name="gr29" draw:text-style-name="P18" draw:layer="layout" svg:width="1.5cm" svg:height="0.602cm" svg:x="31.5cm" svg:y="31.85cm">
          <draw:text-box>
            <text:p text:style-name="P17"><text:span text:style-name="T10">mp3</text:span></text:p>
          </draw:text-box>
        </draw:frame>
        <draw:connector draw:style-name="gr15" draw:text-style-name="P11" draw:layer="layout" draw:type="lines" svg:x1="30.471cm" svg:y1="20.879cm" svg:x2="30.475cm" svg:y2="22.05cm" draw:start-shape="id20" draw:start-glue-point="6" draw:end-shape="id21" draw:end-glue-point="0" svg:d="M30471 20879v518l4 134v519" svg:viewBox="0 0 5 1172">
          <text:p/>
        </draw:connector>
        <draw:connector draw:style-name="gr15" draw:text-style-name="P11" draw:layer="layout" draw:type="lines" svg:x1="38.875cm" svg:y1="22.5cm" svg:x2="41.375cm" svg:y2="17.5cm" draw:start-shape="id22" draw:start-glue-point="4" draw:end-shape="id23" draw:end-glue-point="6" svg:d="M38875 22500v-518l2500-3963v-519" svg:viewBox="0 0 2501 5001">
          <text:p/>
        </draw:connector>
        <draw:frame draw:style-name="gr29" draw:text-style-name="P26" draw:layer="layout" svg:width="2.75cm" svg:height="0.602cm" svg:x="10cm" svg:y="22.3cm">
          <draw:text-box>
            <text:p text:style-name="P25"><text:span text:style-name="T15">match/case</text:span></text:p>
          </draw:text-box>
        </draw:frame>
        <draw:custom-shape draw:style-name="gr30" draw:text-style-name="P28" xml:id="id24" draw:id="id24" draw:layer="layout" svg:width="3.75cm" svg:height="1.75cm" svg:x="60.65cm" svg:y="31.6cm">
          <text:p text:style-name="P27">Afficher</text:p>
          <text:p text:style-name="P23"><text:span text:style-name="T10">to_show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58.15cm" svg:y1="32.46cm" svg:x2="60.65cm" svg:y2="32.475cm" draw:start-shape="id17" draw:start-glue-point="1" draw:end-shape="id24" draw:end-glue-point="5" svg:d="M58150 32460h519l1463 15h518" svg:viewBox="0 0 2501 16">
          <text:p/>
        </draw:connector>
        <draw:connector draw:style-name="gr15" draw:text-style-name="P11" draw:layer="layout" draw:type="lines" draw:line-skew="0cm -0.832cm" svg:x1="22.55cm" svg:y1="39.6cm" svg:x2="52.7cm" svg:y2="32.46cm" draw:start-shape="id18" draw:start-glue-point="0" draw:end-shape="id17" draw:end-glue-point="3" svg:d="M22550 39600v-518l28800-6622h1350" svg:viewBox="0 0 30151 7141">
          <text:p/>
        </draw:connector>
        <draw:frame draw:style-name="gr28" draw:text-style-name="P18" draw:layer="layout" svg:width="2cm" svg:height="0.602cm" svg:x="31.5cm" svg:y="35.898cm">
          <draw:text-box>
            <text:p text:style-name="P17"><text:span text:style-name="T10">to_show</text:span></text:p>
          </draw:text-box>
        </draw:frame>
        <draw:custom-shape draw:style-name="gr12" draw:text-style-name="P10" xml:id="id5" draw:id="id5" draw:layer="layout" svg:width="4.75cm" svg:height="1.679cm" svg:x="10.75cm" svg:y="15.871cm">
          <text:p text:style-name="P9"><text:span text:style-name="T5">Décrypt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draw:type="line" svg:x1="13.125cm" svg:y1="14.1cm" svg:x2="13.125cm" svg:y2="15.871cm" draw:start-shape="id3" draw:start-glue-point="6" draw:end-shape="id5" draw:end-glue-point="0" svg:d="M13125 14100v1771" svg:viewBox="0 0 1 1772">
          <text:p/>
        </draw:connector>
        <draw:frame draw:style-name="gr31" draw:text-style-name="P15" draw:layer="layout" svg:width="4.6cm" svg:height="0.75cm" svg:x="13.4cm" svg:y="14.55cm">
          <draw:text-box>
            <text:p text:style-name="P14"><text:span text:style-name="T10">crypt_qr_content</text:span></text:p>
          </draw:text-box>
        </draw:frame>
        <draw:frame draw:style-name="gr29" draw:text-style-name="P15" draw:layer="layout" svg:width="3.1cm" svg:height="0.602cm" svg:x="13.4cm" svg:y="18.25cm">
          <draw:text-box>
            <text:p text:style-name="P14"><text:span text:style-name="T10">qr_content</text:span></text:p>
          </draw:text-box>
        </draw:frame>
        <draw:frame draw:style-name="gr19" draw:text-style-name="P15" draw:layer="layout" svg:width="5.6cm" svg:height="0.602cm" draw:transform="rotate (1.33779487165365) translate (5.011cm 17.756cm)">
          <draw:text-box>
            <text:p text:style-name="P14"><text:span text:style-name="T10">crypt_qr_content</text:span></text:p>
          </draw:text-box>
        </draw:frame>
        <draw:custom-shape draw:style-name="gr32" draw:text-style-name="P24" xml:id="id20" draw:id="id20" draw:layer="layout" svg:width="4.5cm" svg:height="1.879cm" svg:x="28.221cm" svg:y="19cm">
          <text:p text:style-name="P23"><text:span text:style-name="T13">Adresses des Driv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3" draw:text-style-name="P10" xml:id="id26" draw:id="id26" draw:layer="layout" svg:width="6.25cm" svg:height="2.5cm" svg:x="19.5cm" svg:y="26.2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4" draw:text-style-name="P30" xml:id="id25" draw:id="id25" draw:layer="layout" svg:width="5.95cm" svg:height="1.679cm" svg:x="19.65cm" svg:y="19.303cm">
          <text:p text:style-name="P29"><text:span text:style-name="T5">Vérificateur de connexion à intern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22.625cm" svg:y1="20.982cm" svg:x2="22.625cm" svg:y2="22.59cm" draw:start-shape="id25" draw:start-glue-point="2" draw:end-shape="id10" svg:d="M22625 20982v1608" svg:viewBox="0 0 1 1609">
          <text:p/>
        </draw:connector>
        <draw:frame draw:style-name="gr17" draw:text-style-name="P12" draw:layer="layout" svg:width="2.143cm" svg:height="0.645cm" svg:x="20.357cm" svg:y="21.355cm">
          <draw:text-box>
            <text:p><text:span text:style-name="T6">true / false</text:span></text:p>
          </draw:text-box>
        </draw:frame>
        <draw:connector draw:style-name="gr15" draw:text-style-name="P11" draw:layer="layout" draw:type="line" svg:x1="22.625cm" svg:y1="25.09cm" svg:x2="22.625cm" svg:y2="26.25cm" draw:start-shape="id10" draw:start-glue-point="6" draw:end-shape="id26" draw:end-glue-point="4" svg:d="M22625 25090v1160" svg:viewBox="0 0 1 1161">
          <text:p/>
        </draw:connector>
        <draw:frame draw:style-name="gr16" draw:text-style-name="P12" draw:layer="layout" svg:width="1.088cm" svg:height="0.645cm" svg:x="21.612cm" svg:y="25.0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1.65cm" svg:y="28.6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5.55cm" svg:y="26.8cm">
          <draw:text-box>
            <text:p><text:span text:style-name="T6">oui</text:span></text:p>
          </draw:text-box>
        </draw:frame>
        <draw:custom-shape draw:style-name="gr35" draw:text-style-name="P28" xml:id="id27" draw:id="id27" draw:layer="layout" svg:width="5cm" svg:height="1.75cm" svg:x="23.75cm" svg:y="29.25cm">
          <text:p text:style-name="P27">Afficher</text:p>
          <text:p text:style-name="P23"><text:span text:style-name="T10">« pas de connexion à internet »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22.625cm" svg:y1="28.75cm" svg:x2="23.75cm" svg:y2="30.125cm" draw:start-shape="id26" draw:start-glue-point="6" draw:end-shape="id27" draw:end-glue-point="5" svg:d="M22625 28750v519l607 856h518" svg:viewBox="0 0 1126 1376">
          <text:p/>
        </draw:connector>
        <draw:connector draw:style-name="gr15" draw:text-style-name="P11" draw:layer="layout" draw:type="lines" draw:line-skew="0cm -0.532cm" svg:x1="25.75cm" svg:y1="27.5cm" svg:x2="52.7cm" svg:y2="32.46cm" draw:start-shape="id26" draw:start-glue-point="7" draw:end-shape="id17" draw:end-glue-point="3" svg:d="M25750 27500h518l25382 4960h1050" svg:viewBox="0 0 26951 4961">
          <text:p/>
        </draw:connector>
        <draw:frame draw:style-name="gr29" draw:text-style-name="P18" draw:layer="layout" svg:width="1.5cm" svg:height="0.602cm" svg:x="31cm" svg:y="28.898cm">
          <draw:text-box>
            <text:p text:style-name="P17"><text:span text:style-name="T10">mp3</text:span></text:p>
          </draw:text-box>
        </draw:frame>
        <draw:frame draw:style-name="gr16" draw:text-style-name="P12" draw:layer="layout" svg:width="1.088cm" svg:height="0.645cm" svg:x="25.534cm" svg:y="23.2cm">
          <draw:text-box>
            <text:p><text:span text:style-name="T6">oui</text:span></text:p>
          </draw:text-box>
        </draw:frame>
        <draw:connector draw:style-name="gr15" draw:text-style-name="P11" draw:layer="layout" draw:type="line" svg:x1="25.75cm" svg:y1="23.84cm" svg:x2="35.75cm" svg:y2="23.75cm" draw:start-shape="id10" draw:start-glue-point="7" draw:end-shape="id22" draw:end-glue-point="5" svg:d="M25750 23840l10000-90" svg:viewBox="0 0 10001 91">
          <text:p/>
        </draw:connector>
        <draw:custom-shape draw:style-name="gr33" draw:text-style-name="P10" xml:id="id22" draw:id="id22" draw:layer="layout" svg:width="6.25cm" svg:height="2.5cm" svg:x="35.75cm" svg:y="22.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6" draw:text-style-name="P24" xml:id="id23" draw:id="id23" draw:layer="layout" svg:width="9.75cm" svg:height="2.25cm" svg:x="36.5cm" svg:y="15.25cm">
          <text:p text:style-name="P23"><text:span text:style-name="T5">DB des </text:span><text:span text:style-name="T7">IDopaques</text:span></text:p>
          <text:p text:style-name="P23"><text:span text:style-name="T13">déjà rencontrées</text:span></text:p>
          <text:p text:style-name="P23"><text:span text:style-name="T17">#, IDopaque, titre, MD5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15" draw:text-style-name="P11" draw:layer="layout" draw:type="line" svg:x1="42cm" svg:y1="23.75cm" svg:x2="43.75cm" svg:y2="23.782cm" draw:start-shape="id22" draw:start-glue-point="7" draw:end-shape="id28" draw:end-glue-point="3" svg:d="M42000 23750l1750 32" svg:viewBox="0 0 1751 33">
          <text:p/>
        </draw:connector>
        <draw:connector draw:style-name="gr15" draw:text-style-name="P11" draw:layer="layout" draw:type="lines" svg:x1="48cm" svg:y1="23.782cm" svg:x2="52.7cm" svg:y2="32.46cm" draw:start-shape="id28" draw:start-glue-point="1" draw:end-shape="id17" draw:end-glue-point="3" svg:d="M48000 23782h518l3664 8678h518" svg:viewBox="0 0 4701 8679">
          <text:p/>
        </draw:connector>
        <draw:custom-shape draw:style-name="gr37" draw:text-style-name="P30" xml:id="id21" draw:id="id21" draw:layer="layout" svg:width="5.95cm" svg:height="3.429cm" svg:x="27.5cm" svg:y="22.05cm">
          <text:p text:style-name="P29"><text:span text:style-name="T18">Re-constructeur des liens externes</text:span></text:p>
          <text:p text:style-name="P29"><text:span text:style-name="T18"/></text:p>
          <text:p text:style-name="P29"><text:span text:style-name="T18">Télécharger et nommer </text:span><text:span text:style-name="T7">IDopaques.mp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6" draw:text-style-name="P12" draw:layer="layout" svg:width="1.088cm" svg:height="0.645cm" svg:x="42cm" svg:y="23cm">
          <draw:text-box>
            <text:p><text:span text:style-name="T6">oui</text:span></text:p>
          </draw:text-box>
        </draw:frame>
        <draw:frame draw:style-name="gr16" draw:text-style-name="P12" draw:layer="layout" svg:width="1.088cm" svg:height="0.645cm" svg:x="39cm" svg:y="21.75cm">
          <draw:text-box>
            <text:p><text:span text:style-name="T6">non</text:span></text:p>
          </draw:text-box>
        </draw:frame>
        <draw:custom-shape draw:style-name="gr33" draw:text-style-name="P10" xml:id="id10" draw:id="id10" draw:layer="layout" svg:width="6.25cm" svg:height="2.5cm" svg:x="19.5cm" svg:y="22.59cm">
          <text:p text:style-name="P9"><text:span text:style-name="T5">Y a-t-il internet 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29" draw:text-style-name="P18" draw:layer="layout" svg:width="1.5cm" svg:height="0.602cm" svg:x="50.15cm" svg:y="27.25cm">
          <draw:text-box>
            <text:p text:style-name="P17"><text:span text:style-name="T10">mp3</text:span></text:p>
          </draw:text-box>
        </draw:frame>
        <draw:custom-shape draw:style-name="gr38" draw:text-style-name="P31" xml:id="id28" draw:id="id28" draw:layer="layout" svg:width="4.25cm" svg:height="2.75cm" svg:x="43.75cm" svg:y="22.407cm">
          <text:p text:style-name="P9">Actualiser #<text:line-break/><text:span text:style-name="T19">Pour effacer les fichiers les plus anciens</text:span><text:span text:style-name="T19"><text:line-break/></text:span><text:span text:style-name="T19"><text:line-break/></text:span><text:span text:style-name="T19">Remplacer l’ancien fichier</text:span></text:p>
          <text:p text:style-name="P9"><text:span text:style-name="T19">IDopaque.mp3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draw:type="lines" svg:x1="45.875cm" svg:y1="22.407cm" svg:x2="41.375cm" svg:y2="17.5cm" draw:start-shape="id28" draw:start-glue-point="0" draw:end-shape="id23" draw:end-glue-point="6" svg:d="M45875 22407v-518l-4500-3870v-519" svg:viewBox="0 0 4501 4908">
          <text:p/>
        </draw:connector>
        <draw:custom-shape draw:style-name="gr39" draw:text-style-name="P24" xml:id="id19" draw:id="id19" draw:layer="layout" svg:width="8.25cm" svg:height="3cm" svg:x="17.5cm" svg:y="46cm">
          <text:p text:style-name="P23"><text:span text:style-name="T14">lettres_names</text:span></text:p>
          <text:p text:style-name="P23"><text:span text:style-name="T13">Correspondances :</text:span></text:p>
          <text:p text:style-name="P23"><text:span text:style-name="T13">« é » → « e accent aigü »</text:span></text:p>
          <text:p text:style-name="P23"><text:span text:style-name="T13">« , » → « virgule »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ustom-shape draw:style-name="gr40" draw:text-style-name="P24" xml:id="id13" draw:id="id13" draw:layer="layout" svg:width="6.75cm" svg:height="2.25cm" svg:x="24.75cm" svg:y="50.5cm">
          <text:p text:style-name="P23"><text:span text:style-name="T14">GTTS</text:span></text:p>
          <text:p text:style-name="P23"><text:span text:style-name="T13">Correspondances :</text:span></text:p>
          <text:p text:style-name="P23"><text:span text:style-name="T13">préfixes → langu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1" draw:text-style-name="P24" xml:id="id15" draw:id="id15" draw:layer="layout" svg:width="6.75cm" svg:height="2.25cm" svg:x="32.25cm" svg:y="50.5cm">
          <text:p text:style-name="P23"><text:span text:style-name="T14">TTS XXX ?</text:span></text:p>
          <text:p text:style-name="P23"><text:span text:style-name="T13">Correspondances :</text:span></text:p>
          <text:p text:style-name="P23"><text:span text:style-name="T13">préfixes → langu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1" draw:text-style-name="P16" draw:layer="layout" svg:width="4.508cm" svg:height="0.953cm" svg:x="32.242cm" svg:y="42.5cm">
          <draw:text-box>
            <text:p><text:span text:style-name="T11">- Trouver autre API</text:span></text:p>
            <text:p><text:span text:style-name="T11">- TTS locale</text:span></text:p>
          </draw:text-box>
        </draw:frame>
        <draw:connector draw:style-name="gr42" draw:text-style-name="P2" draw:layer="layout" draw:type="curve" svg:x1="36.5cm" svg:y1="16.375cm" svg:x2="19.5cm" svg:y2="27.5cm" draw:start-shape="id23" draw:start-glue-point="5" draw:end-shape="id26" draw:end-glue-point="5" svg:d="M36500 16375c-26277 0-17777 11125-17000 11125" svg:viewBox="0 0 18922 11126">
          <text:p/>
        </draw:connector>
        <draw:frame draw:style-name="gr29" draw:text-style-name="P18" draw:layer="layout" svg:width="1.5cm" svg:height="0.602cm" svg:x="39.5cm" svg:y="38.898cm">
          <draw:text-box>
            <text:p text:style-name="P17"><text:span text:style-name="T10">mp3</text:span></text:p>
          </draw:text-box>
        </draw:frame>
        <draw:custom-shape draw:style-name="gr38" draw:text-style-name="P31" xml:id="id29" draw:id="id29" draw:layer="layout" svg:width="4cm" svg:height="1.25cm" svg:x="38cm" svg:y="19.75cm">
          <text:p text:style-name="P9">Ajouter</text:p>
          <text:p text:style-name="P9">IDopaque.mp3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1cm" svg:height="0.602cm" svg:x="13.4cm" svg:y="21.398cm">
          <draw:text-box>
            <text:p text:style-name="P14"><text:span text:style-name="T10">tuple</text:span></text:p>
          </draw:text-box>
        </draw:frame>
        <draw:connector draw:style-name="gr15" draw:text-style-name="P11" draw:layer="layout" draw:type="lines" draw:line-skew="7.232cm" svg:x1="42cm" svg:y1="20.375cm" svg:x2="52.7cm" svg:y2="32.46cm" draw:start-shape="id29" draw:start-glue-point="1" draw:end-shape="id17" draw:end-glue-point="3" svg:d="M42000 20375h7750l2432 12085h518" svg:viewBox="0 0 10701 12086">
          <text:p/>
        </draw:connector>
      </draw:page>
      <draw:page draw:name="page2" draw:style-name="dp1" draw:master-page-name="Standard">
        <draw:custom-shape draw:style-name="gr43" draw:text-style-name="P30" xml:id="id30" draw:id="id30" draw:layer="layout" svg:width="7cm" svg:height="2cm" svg:x="5.25cm" svg:y="2.8cm">
          <text:p text:style-name="P29"><text:span text:style-name="T18">Suffixe = </text:span><text:span text:style-name="T20">"l"</text:span></text:p>
          <text:p text:style-name="P29"><text:span text:style-name="T20">li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30" xml:id="id31" draw:id="id31" draw:layer="layout" svg:width="7cm" svg:height="2cm" svg:x="5.25cm" svg:y="5.6cm">
          <text:p text:style-name="P29"><text:span text:style-name="T18">Suffixe = </text:span><text:span text:style-name="T20">"c"</text:span></text:p>
          <text:p text:style-name="P29"><text:span text:style-name="T20">cac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4.8cm" svg:x2="8.75cm" svg:y2="5.6cm" draw:start-shape="id30" draw:start-glue-point="6" draw:end-shape="id31" draw:end-glue-point="4" svg:d="M8750 4800v800" svg:viewBox="0 0 1 801">
          <text:p/>
        </draw:connector>
        <draw:custom-shape draw:style-name="gr45" draw:text-style-name="P30" xml:id="id32" draw:id="id32" draw:layer="layout" svg:width="7cm" svg:height="2cm" svg:x="5.25cm" svg:y="8.3cm">
          <text:p text:style-name="P29"><text:span text:style-name="T18">Suffixe = </text:span><text:span text:style-name="T20">"d"</text:span></text:p>
          <text:p text:style-name="P29"><text:span text:style-name="T20">di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7.6cm" svg:x2="8.75cm" svg:y2="8.3cm" draw:start-shape="id31" draw:start-glue-point="6" draw:end-shape="id32" draw:end-glue-point="4" svg:d="M8750 7600v700" svg:viewBox="0 0 1 701">
          <text:p/>
        </draw:connector>
        <draw:custom-shape draw:style-name="gr46" draw:text-style-name="P30" xml:id="id33" draw:id="id33" draw:layer="layout" svg:width="7cm" svg:height="2cm" svg:x="5.25cm" svg:y="11cm">
          <text:p text:style-name="P29"><text:span text:style-name="T18">Suffixe = </text:span><text:span text:style-name="T20">"e"</text:span></text:p>
          <text:p text:style-name="P29"><text:span text:style-name="T20">épel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10.3cm" svg:x2="8.75cm" svg:y2="11cm" draw:end-shape="id33" draw:end-glue-point="4" svg:d="M8750 103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20:44:03.671717596</dc:date>
    <meta:editing-duration>PT9H51M12S</meta:editing-duration>
    <meta:editing-cycles>265</meta:editing-cycles>
    <meta:generator>LibreOffice/26.2.3.2$Linux_X86_64 LibreOffice_project/70e089b17412e4cb7773e41413306b17a2328c34</meta:generator>
    <meta:document-statistic meta:object-count="119"/>
  </office:meta>
</office:document-meta>
</file>